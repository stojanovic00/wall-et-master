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103ADB5D3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solid" draw:fill-color="#e5e5e5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2f2f2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7.2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e5e5e5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solid" draw:fill-color="#f2f2f2"/>
    </style:style>
    <style:style style:name="P12" style:family="paragraph">
      <style:paragraph-properties fo:text-align="start" style:writing-mode="lr-tb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1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5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2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3" style:family="text">
      <style:text-properties fo:color="#000000" loext:opacity="100%" style:font-name="Arial" fo:font-size="9.89999961853027pt" fo:font-weight="bold" style:font-name-asian="Arial" style:font-size-asian="9.89999961853027pt" style:font-weight-asian="bold" style:font-name-complex="Arial" style:font-size-complex="9.89999961853027pt" style:font-weight-complex="bold"/>
    </style:style>
    <style:style style:name="T4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5" style:family="text">
      <style:text-properties fo:color="#000000" loext:opacity="100%" style:font-name="Arial" fo:font-size="3.90000009536743pt" fo:font-weight="normal" style:font-name-asian="Arial" style:font-size-asian="3.90000009536743pt" style:font-weight-asian="normal" style:font-name-complex="Arial" style:font-size-complex="3.90000009536743pt" style:font-weight-complex="normal"/>
    </style:style>
    <style:style style:name="T6" style:family="text">
      <style:text-properties fo:color="#000000" loext:opacity="100%" style:font-name="Arial" fo:font-size="9.89999961853027pt" fo:font-style="italic" fo:font-weight="normal" style:font-name-asian="Arial" style:font-size-asian="9.89999961853027pt" style:font-style-asian="italic" style:font-weight-asian="normal" style:font-name-complex="Arial" style:font-size-complex="9.89999961853027pt" style:font-style-complex="italic" style:font-weight-complex="normal"/>
    </style:style>
    <style:style style:name="T7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8" style:family="text">
      <style:text-properties fo:color="#000000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9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0" style:family="text">
      <style:text-properties fo:color="#000000" loext:opacity="100%" style:font-name="Arial" fo:font-weight="bold" style:font-name-asian="Arial" style:font-size-asian="18pt" style:font-weight-asian="bold" style:font-name-complex="Arial" style:font-size-complex="18pt" style:font-weight-complex="bold"/>
    </style:style>
    <style:style style:name="T11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12" style:family="text">
      <style:text-properties fo:color="#000000" loext:opacity="100%" style:font-name="Wingdings" fo:font-size="14.1000003814697pt" fo:font-weight="normal" style:font-name-asian="Wingdings" style:font-size-asian="14.1000003814697pt" style:font-weight-asian="normal" style:font-name-complex="Wingdings" style:font-size-complex="14.1000003814697pt" style:font-weight-complex="normal"/>
    </style:style>
    <style:style style:name="T13" style:family="text">
      <style:text-properties fo:color="#000000" loext:opacity="100%" style:font-name="Arial" fo:font-size="1pt" fo:font-weight="normal" style:font-name-asian="Arial" style:font-size-asian="1pt" style:font-weight-asian="normal" style:font-name-complex="Arial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167cm" svg:height="2.391cm" svg:x="2.667cm" svg:y="1.718cm">
          <draw:image xlink:href="Pictures/10000000000000ED00000103ADB5D3D0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5cm" svg:x="20.007cm" svg:y="1.01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5cm" svg:height="0.395cm" svg:x="4.835cm" svg:y="3.79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453cm" svg:height="0.395cm" svg:x="5.067cm" svg:y="1.871cm">
          <draw:text-box>
            <text:p text:style-name="P2"><text:span text:style-name="T2">У</text:span><text:span text:style-name="T2">Н</text:span><text:span text:style-name="T2">И</text:span><text:span text:style-name="T2">В</text:span><text:span text:style-name="T2">Е</text:span><text:span text:style-name="T2">Р</text:span><text:span text:style-name="T2">З</text:span><text:span text:style-name="T2">И</text:span><text:span text:style-name="T2">Т</text:span><text:span text:style-name="T2">Е</text:span><text:span text:style-name="T2">Т</text:span><text:span text:style-name="T2"> </text:span><text:span text:style-name="T2">У</text:span><text:span text:style-name="T2"> </text:span><text:span text:style-name="T2">Н</text:span><text:span text:style-name="T2">О</text:span><text:span text:style-name="T2">В</text:span><text:span text:style-name="T2">О</text:span><text:span text:style-name="T2">М</text:span><text:span text:style-name="T2"> </text:span><text:span text:style-name="T2">С</text:span><text:span text:style-name="T2">А</text:span><text:span text:style-name="T2">Д</text:span><text:span text:style-name="T2">У</text:span><text:span text:style-name="T2"> </text:span></text:p>
          </draw:text-box>
        </draw:frame>
        <draw:frame draw:style-name="gr3" draw:text-style-name="P4" draw:layer="layout" svg:width="5.719cm" svg:height="0.395cm" svg:x="10.377cm" svg:y="1.871cm">
          <draw:text-box>
            <text:p text:style-name="P2"><text:span text:style-name="T2"><text:s/></text:span><text:span text:style-name="T3">ФАКУЛТЕТ ТЕХНИЧКИХ НАУКА <text:s/></text:span></text:p>
          </draw:text-box>
        </draw:frame>
        <draw:frame draw:style-name="gr3" draw:text-style-name="P4" draw:layer="layout" svg:width="8.196cm" svg:height="0.395cm" svg:x="5.75cm" svg:y="2.311cm">
          <draw:text-box>
            <text:p text:style-name="P2"><text:span text:style-name="T2">2</text:span><text:span text:style-name="T2">1</text:span><text:span text:style-name="T2">0</text:span><text:span text:style-name="T2">0</text:span><text:span text:style-name="T2">0</text:span><text:span text:style-name="T2"> </text:span><text:span text:style-name="T2">Н</text:span><text:span text:style-name="T2">О</text:span><text:span text:style-name="T2">В</text:span><text:span text:style-name="T2">И</text:span><text:span text:style-name="T2"> </text:span><text:span text:style-name="T2">С</text:span><text:span text:style-name="T2">А</text:span><text:span text:style-name="T2"> </text:span><text:span text:style-name="T2">Д</text:span><text:span text:style-name="T2">,</text:span><text:span text:style-name="T2"> </text:span><text:span text:style-name="T2">Т</text:span><text:span text:style-name="T2">р</text:span><text:span text:style-name="T2">г</text:span><text:span text:style-name="T2"> </text:span><text:span text:style-name="T2">Д</text:span><text:span text:style-name="T2"> </text:span><text:span text:style-name="T2">о</text:span><text:span text:style-name="T2">с</text:span><text:span text:style-name="T2">и</text:span><text:span text:style-name="T2">т</text:span><text:span text:style-name="T2">е</text:span><text:span text:style-name="T2">ј</text:span><text:span text:style-name="T2">а</text:span><text:span text:style-name="T2"> </text:span><text:span text:style-name="T2">О</text:span><text:span text:style-name="T2">б</text:span><text:span text:style-name="T2">р</text:span><text:span text:style-name="T2">а</text:span><text:span text:style-name="T2">д</text:span><text:span text:style-name="T2">о</text:span><text:span text:style-name="T2">в</text:span><text:span text:style-name="T2"> </text:span><text:span text:style-name="T2">и</text:span><text:span text:style-name="T2"> </text:span><text:span text:style-name="T2">ћ</text:span><text:span text:style-name="T2">а</text:span><text:span text:style-name="T2"> </text:span><text:span text:style-name="T2">6</text:span><text:span text:style-name="T2"> </text:span><text:span text:style-name="T2"><text:s/></text:span></text:p>
          </draw:text-box>
        </draw:frame>
        <draw:polygon draw:style-name="gr4" draw:text-style-name="P5" draw:layer="layout" svg:width="0.051cm" svg:height="0.055cm" svg:x="2.477cm" svg:y="1.591cm" svg:viewBox="0 0 52 56" draw:points="0,0 52,0 52,56 0,56">
          <text:p/>
        </draw:polygon>
        <draw:polygon draw:style-name="gr4" draw:text-style-name="P5" draw:layer="layout" svg:width="0.051cm" svg:height="0.051cm" svg:x="2.477cm" svg:y="1.591cm" svg:viewBox="0 0 52 52" draw:points="0,0 52,0 52,52 0,52">
          <text:p/>
        </draw:polygon>
        <draw:polygon draw:style-name="gr4" draw:text-style-name="P5" draw:layer="layout" svg:width="2.451cm" svg:height="0.051cm" svg:x="2.528cm" svg:y="1.591cm" svg:viewBox="0 0 2452 52" draw:points="0,0 2452,0 2452,52 0,52">
          <text:p/>
        </draw:polygon>
        <draw:polygon draw:style-name="gr4" draw:text-style-name="P5" draw:layer="layout" svg:width="0.05cm" svg:height="0.004cm" svg:x="4.979cm" svg:y="1.642cm" svg:viewBox="0 0 51 5" draw:points="0,0 51,0 51,5 0,5">
          <text:p/>
        </draw:polygon>
        <draw:polygon draw:style-name="gr4" draw:text-style-name="P5" draw:layer="layout" svg:width="0.05cm" svg:height="0.051cm" svg:x="4.979cm" svg:y="1.591cm" svg:viewBox="0 0 51 52" draw:points="0,0 51,0 51,52 0,52">
          <text:p/>
        </draw:polygon>
        <draw:polygon draw:style-name="gr4" draw:text-style-name="P5" draw:layer="layout" svg:width="10.955cm" svg:height="0.051cm" svg:x="5.029cm" svg:y="1.591cm" svg:viewBox="0 0 10956 52" draw:points="0,0 10956,0 10956,52 0,52">
          <text:p/>
        </draw:polygon>
        <draw:polygon draw:style-name="gr4" draw:text-style-name="P5" draw:layer="layout" svg:width="0.051cm" svg:height="0.004cm" svg:x="15.984cm" svg:y="1.642cm" svg:viewBox="0 0 52 5" draw:points="0,0 52,0 52,5 0,5">
          <text:p/>
        </draw:polygon>
        <draw:polygon draw:style-name="gr4" draw:text-style-name="P5" draw:layer="layout" svg:width="0.051cm" svg:height="0.051cm" svg:x="15.984cm" svg:y="1.591cm" svg:viewBox="0 0 52 52" draw:points="0,0 52,0 52,52 0,52">
          <text:p/>
        </draw:polygon>
        <draw:polygon draw:style-name="gr4" draw:text-style-name="P5" draw:layer="layout" svg:width="3.949cm" svg:height="0.051cm" svg:x="16.035cm" svg:y="1.591cm" svg:viewBox="0 0 3950 52" draw:points="0,0 3950,0 3950,52 0,52">
          <text:p/>
        </draw:polygon>
        <draw:polygon draw:style-name="gr4" draw:text-style-name="P5" draw:layer="layout" svg:width="0.052cm" svg:height="0.055cm" svg:x="19.984cm" svg:y="1.591cm" svg:viewBox="0 0 53 56" draw:points="0,0 53,0 53,56 0,56">
          <text:p/>
        </draw:polygon>
        <draw:polygon draw:style-name="gr4" draw:text-style-name="P5" draw:layer="layout" svg:width="0.052cm" svg:height="0.051cm" svg:x="19.984cm" svg:y="1.591cm" svg:viewBox="0 0 53 52" draw:points="0,0 53,0 53,52 0,52">
          <text:p/>
        </draw:polygon>
        <draw:polygon draw:style-name="gr4" draw:text-style-name="P5" draw:layer="layout" svg:width="0.051cm" svg:height="0.606cm" svg:x="2.477cm" svg:y="1.646cm" svg:viewBox="0 0 52 607" draw:points="0,0 52,0 52,607 0,607">
          <text:p/>
        </draw:polygon>
        <draw:polygon draw:style-name="gr4" draw:text-style-name="P5" draw:layer="layout" svg:width="0.05cm" svg:height="0.606cm" svg:x="4.979cm" svg:y="1.646cm" svg:viewBox="0 0 51 607" draw:points="0,0 51,0 51,607 0,607">
          <text:p/>
        </draw:polygon>
        <draw:polygon draw:style-name="gr4" draw:text-style-name="P5" draw:layer="layout" svg:width="0.051cm" svg:height="0.606cm" svg:x="15.984cm" svg:y="1.646cm" svg:viewBox="0 0 52 607" draw:points="0,0 52,0 52,607 0,607">
          <text:p/>
        </draw:polygon>
        <draw:polygon draw:style-name="gr4" draw:text-style-name="P5" draw:layer="layout" svg:width="0.052cm" svg:height="0.606cm" svg:x="19.984cm" svg:y="1.646cm" svg:viewBox="0 0 53 607" draw:points="0,0 53,0 53,607 0,607">
          <text:p/>
        </draw:polygon>
        <draw:frame draw:style-name="gr3" draw:text-style-name="P4" draw:layer="layout" svg:width="0.897cm" svg:height="0.395cm" svg:x="16.255cm" svg:y="1.765cm">
          <draw:text-box>
            <text:p text:style-name="P2"><text:span text:style-name="T2">Б</text:span><text:span text:style-name="T2">р</text:span><text:span text:style-name="T2">о</text:span><text:span text:style-name="T2">ј</text:span><text:span text:style-name="T2">:</text:span><text:span text:style-name="T2"> </text:span></text:p>
          </draw:text-box>
        </draw:frame>
        <draw:polygon draw:style-name="gr4" draw:text-style-name="P5" draw:layer="layout" svg:width="0.051cm" svg:height="0.017cm" svg:x="2.477cm" svg:y="2.252cm" svg:viewBox="0 0 52 18" draw:points="0,0 52,0 52,18 0,18">
          <text:p/>
        </draw:polygon>
        <draw:polygon draw:style-name="gr4" draw:text-style-name="P5" draw:layer="layout" svg:width="0.05cm" svg:height="0.017cm" svg:x="4.979cm" svg:y="2.252cm" svg:viewBox="0 0 51 18" draw:points="0,0 51,0 51,18 0,18">
          <text:p/>
        </draw:polygon>
        <draw:polygon draw:style-name="gr4" draw:text-style-name="P5" draw:layer="layout" svg:width="0.051cm" svg:height="0.017cm" svg:x="15.984cm" svg:y="2.252cm" svg:viewBox="0 0 52 18" draw:points="0,0 52,0 52,18 0,18">
          <text:p/>
        </draw:polygon>
        <draw:polygon draw:style-name="gr4" draw:text-style-name="P5" draw:layer="layout" svg:width="3.949cm" svg:height="0.017cm" svg:x="16.035cm" svg:y="2.252cm" svg:viewBox="0 0 3950 18" draw:points="0,0 3950,0 3950,18 0,18">
          <text:p/>
        </draw:polygon>
        <draw:polygon draw:style-name="gr4" draw:text-style-name="P5" draw:layer="layout" svg:width="0.052cm" svg:height="0.017cm" svg:x="19.984cm" svg:y="2.252cm" svg:viewBox="0 0 53 18" draw:points="0,0 53,0 53,18 0,18">
          <text:p/>
        </draw:polygon>
        <draw:polygon draw:style-name="gr4" draw:text-style-name="P5" draw:layer="layout" svg:width="0.051cm" svg:height="0.609cm" svg:x="2.477cm" svg:y="2.269cm" svg:viewBox="0 0 52 610" draw:points="0,0 52,0 52,610 0,610">
          <text:p/>
        </draw:polygon>
        <draw:polygon draw:style-name="gr4" draw:text-style-name="P5" draw:layer="layout" svg:width="0.05cm" svg:height="0.609cm" svg:x="4.979cm" svg:y="2.269cm" svg:viewBox="0 0 51 610" draw:points="0,0 51,0 51,610 0,610">
          <text:p/>
        </draw:polygon>
        <draw:polygon draw:style-name="gr4" draw:text-style-name="P5" draw:layer="layout" svg:width="0.051cm" svg:height="0.609cm" svg:x="15.984cm" svg:y="2.269cm" svg:viewBox="0 0 52 610" draw:points="0,0 52,0 52,610 0,610">
          <text:p/>
        </draw:polygon>
        <draw:polygon draw:style-name="gr4" draw:text-style-name="P5" draw:layer="layout" svg:width="0.052cm" svg:height="0.609cm" svg:x="19.984cm" svg:y="2.269cm" svg:viewBox="0 0 53 610" draw:points="0,0 53,0 53,610 0,610">
          <text:p/>
        </draw:polygon>
        <draw:polygon draw:style-name="gr5" draw:text-style-name="P6" draw:layer="layout" svg:width="10.95cm" svg:height="1.254cm" svg:x="5.029cm" svg:y="2.933cm" svg:viewBox="0 0 10951 1255" draw:points="0,0 10951,0 10951,1255 0,1255">
          <text:p/>
        </draw:polygon>
        <draw:polygon draw:style-name="gr5" draw:text-style-name="P6" draw:layer="layout" svg:width="10.95cm" svg:height="0.567cm" svg:x="5.029cm" svg:y="3.277cm" svg:viewBox="0 0 10951 568" draw:points="0,0 10951,0 10951,568 0,568">
          <text:p/>
        </draw:polygon>
        <draw:frame draw:style-name="gr3" draw:text-style-name="P4" draw:layer="layout" svg:width="2.093cm" svg:height="0.395cm" svg:x="16.255cm" svg:y="2.387cm">
          <draw:text-box>
            <text:p text:style-name="P2"><text:span text:style-name="T2">Е2 119/2023 </text:span></text:p>
          </draw:text-box>
        </draw:frame>
        <draw:frame draw:style-name="gr6" draw:text-style-name="P7" draw:layer="layout" svg:width="6.694cm" svg:height="0.556cm" svg:x="7.355cm" svg:y="3.29cm">
          <draw:text-box>
            <text:p text:style-name="P2"><text:span text:style-name="T4">З</text:span><text:span text:style-name="T4">А</text:span><text:span text:style-name="T4">Д</text:span><text:span text:style-name="T4">А</text:span><text:span text:style-name="T4">Т</text:span><text:span text:style-name="T4">А</text:span><text:span text:style-name="T4">К</text:span><text:span text:style-name="T4"> </text:span><text:span text:style-name="T4">З</text:span><text:span text:style-name="T4">А</text:span><text:span text:style-name="T4"> </text:span><text:span text:style-name="T4">М</text:span><text:span text:style-name="T4">А</text:span><text:span text:style-name="T4">С</text:span><text:span text:style-name="T4">Т</text:span><text:span text:style-name="T4">Е</text:span><text:span text:style-name="T4">Р</text:span><text:span text:style-name="T4"> </text:span><text:span text:style-name="T4">Р</text:span><text:span text:style-name="T4">А</text:span><text:span text:style-name="T4">Д</text:span><text:span text:style-name="T4"> </text:span></text:p>
          </draw:text-box>
        </draw:frame>
        <draw:polygon draw:style-name="gr4" draw:text-style-name="P5" draw:layer="layout" svg:width="0.051cm" svg:height="0.055cm" svg:x="2.477cm" svg:y="2.878cm" svg:viewBox="0 0 52 56" draw:points="0,0 52,0 52,56 0,56">
          <text:p/>
        </draw:polygon>
        <draw:polygon draw:style-name="gr4" draw:text-style-name="P5" draw:layer="layout" svg:width="0.05cm" svg:height="0.055cm" svg:x="4.979cm" svg:y="2.878cm" svg:viewBox="0 0 51 56" draw:points="0,0 51,0 51,56 0,56">
          <text:p/>
        </draw:polygon>
        <draw:polygon draw:style-name="gr4" draw:text-style-name="P5" draw:layer="layout" svg:width="10.955cm" svg:height="0.051cm" svg:x="5.029cm" svg:y="2.878cm" svg:viewBox="0 0 10956 52" draw:points="0,0 10956,0 10956,52 0,52">
          <text:p/>
        </draw:polygon>
        <draw:polygon draw:style-name="gr5" draw:text-style-name="P6" draw:layer="layout" svg:width="10.955cm" svg:height="0.004cm" svg:x="5.029cm" svg:y="2.929cm" svg:viewBox="0 0 10956 5" draw:points="0,0 10956,0 10956,5 0,5">
          <text:p/>
        </draw:polygon>
        <draw:polygon draw:style-name="gr4" draw:text-style-name="P5" draw:layer="layout" svg:width="0.051cm" svg:height="0.055cm" svg:x="15.984cm" svg:y="2.878cm" svg:viewBox="0 0 52 56" draw:points="0,0 52,0 52,56 0,56">
          <text:p/>
        </draw:polygon>
        <draw:polygon draw:style-name="gr4" draw:text-style-name="P5" draw:layer="layout" svg:width="3.949cm" svg:height="0.051cm" svg:x="16.035cm" svg:y="2.878cm" svg:viewBox="0 0 3950 52" draw:points="0,0 3950,0 3950,52 0,52">
          <text:p/>
        </draw:polygon>
        <draw:polygon draw:style-name="gr4" draw:text-style-name="P5" draw:layer="layout" svg:width="0.052cm" svg:height="0.055cm" svg:x="19.984cm" svg:y="2.878cm" svg:viewBox="0 0 53 56" draw:points="0,0 53,0 53,56 0,56">
          <text:p/>
        </draw:polygon>
        <draw:polygon draw:style-name="gr4" draw:text-style-name="P5" draw:layer="layout" svg:width="0.051cm" svg:height="0.611cm" svg:x="2.477cm" svg:y="2.933cm" svg:viewBox="0 0 52 612" draw:points="0,0 52,0 52,612 0,612">
          <text:p/>
        </draw:polygon>
        <draw:polygon draw:style-name="gr4" draw:text-style-name="P5" draw:layer="layout" svg:width="0.05cm" svg:height="0.611cm" svg:x="4.979cm" svg:y="2.933cm" svg:viewBox="0 0 51 612" draw:points="0,0 51,0 51,612 0,612">
          <text:p/>
        </draw:polygon>
        <draw:polygon draw:style-name="gr4" draw:text-style-name="P5" draw:layer="layout" svg:width="0.051cm" svg:height="0.611cm" svg:x="15.984cm" svg:y="2.933cm" svg:viewBox="0 0 52 612" draw:points="0,0 52,0 52,612 0,612">
          <text:p/>
        </draw:polygon>
        <draw:polygon draw:style-name="gr4" draw:text-style-name="P5" draw:layer="layout" svg:width="0.052cm" svg:height="0.611cm" svg:x="19.984cm" svg:y="2.933cm" svg:viewBox="0 0 53 612" draw:points="0,0 53,0 53,612 0,612">
          <text:p/>
        </draw:polygon>
        <draw:frame draw:style-name="gr3" draw:text-style-name="P4" draw:layer="layout" svg:width="1.209cm" svg:height="0.395cm" svg:x="16.255cm" svg:y="3.052cm">
          <draw:text-box>
            <text:p text:style-name="P2"><text:span text:style-name="T2">Д</text:span><text:span text:style-name="T2">а</text:span><text:span text:style-name="T2">т</text:span><text:span text:style-name="T2">у</text:span><text:span text:style-name="T2">м</text:span><text:span text:style-name="T2">:</text:span><text:span text:style-name="T2"> </text:span></text:p>
          </draw:text-box>
        </draw:frame>
        <draw:polygon draw:style-name="gr4" draw:text-style-name="P5" draw:layer="layout" svg:width="0.051cm" svg:height="0.033cm" svg:x="2.477cm" svg:y="3.544cm" svg:viewBox="0 0 52 34" draw:points="0,0 52,0 52,34 0,34">
          <text:p/>
        </draw:polygon>
        <draw:polygon draw:style-name="gr4" draw:text-style-name="P5" draw:layer="layout" svg:width="0.05cm" svg:height="0.033cm" svg:x="4.979cm" svg:y="3.544cm" svg:viewBox="0 0 51 34" draw:points="0,0 51,0 51,34 0,34">
          <text:p/>
        </draw:polygon>
        <draw:polygon draw:style-name="gr4" draw:text-style-name="P5" draw:layer="layout" svg:width="0.051cm" svg:height="0.033cm" svg:x="15.984cm" svg:y="3.544cm" svg:viewBox="0 0 52 34" draw:points="0,0 52,0 52,34 0,34">
          <text:p/>
        </draw:polygon>
        <draw:polygon draw:style-name="gr4" draw:text-style-name="P5" draw:layer="layout" svg:width="3.949cm" svg:height="0.033cm" svg:x="16.035cm" svg:y="3.544cm" svg:viewBox="0 0 3950 34" draw:points="0,0 3950,0 3950,34 0,34">
          <text:p/>
        </draw:polygon>
        <draw:polygon draw:style-name="gr4" draw:text-style-name="P5" draw:layer="layout" svg:width="0.052cm" svg:height="0.033cm" svg:x="19.984cm" svg:y="3.544cm" svg:viewBox="0 0 53 34" draw:points="0,0 53,0 53,34 0,34">
          <text:p/>
        </draw:polygon>
        <draw:polygon draw:style-name="gr4" draw:text-style-name="P5" draw:layer="layout" svg:width="0.051cm" svg:height="0.61cm" svg:x="2.477cm" svg:y="3.577cm" svg:viewBox="0 0 52 611" draw:points="0,0 52,0 52,611 0,611">
          <text:p/>
        </draw:polygon>
        <draw:polygon draw:style-name="gr4" draw:text-style-name="P5" draw:layer="layout" svg:width="0.051cm" svg:height="0.051cm" svg:x="2.477cm" svg:y="4.187cm" svg:viewBox="0 0 52 52" draw:points="0,0 52,0 52,52 0,52">
          <text:p/>
        </draw:polygon>
        <draw:polygon draw:style-name="gr4" draw:text-style-name="P5" draw:layer="layout" svg:width="0.051cm" svg:height="0.051cm" svg:x="2.477cm" svg:y="4.187cm" svg:viewBox="0 0 52 52" draw:points="0,0 52,0 52,52 0,52">
          <text:p/>
        </draw:polygon>
        <draw:polygon draw:style-name="gr4" draw:text-style-name="P5" draw:layer="layout" svg:width="2.451cm" svg:height="0.051cm" svg:x="2.528cm" svg:y="4.187cm" svg:viewBox="0 0 2452 52" draw:points="0,0 2452,0 2452,52 0,52">
          <text:p/>
        </draw:polygon>
        <draw:polygon draw:style-name="gr4" draw:text-style-name="P5" draw:layer="layout" svg:width="0.05cm" svg:height="0.61cm" svg:x="4.979cm" svg:y="3.577cm" svg:viewBox="0 0 51 611" draw:points="0,0 51,0 51,611 0,611">
          <text:p/>
        </draw:polygon>
        <draw:polygon draw:style-name="gr4" draw:text-style-name="P5" draw:layer="layout" svg:width="0.05cm" svg:height="0.051cm" svg:x="4.979cm" svg:y="4.187cm" svg:viewBox="0 0 51 52" draw:points="0,0 51,0 51,52 0,52">
          <text:p/>
        </draw:polygon>
        <draw:polygon draw:style-name="gr4" draw:text-style-name="P5" draw:layer="layout" svg:width="10.955cm" svg:height="0.051cm" svg:x="5.029cm" svg:y="4.187cm" svg:viewBox="0 0 10956 52" draw:points="0,0 10956,0 10956,52 0,52">
          <text:p/>
        </draw:polygon>
        <draw:polygon draw:style-name="gr4" draw:text-style-name="P5" draw:layer="layout" svg:width="0.051cm" svg:height="0.61cm" svg:x="15.984cm" svg:y="3.577cm" svg:viewBox="0 0 52 611" draw:points="0,0 52,0 52,611 0,611">
          <text:p/>
        </draw:polygon>
        <draw:polygon draw:style-name="gr4" draw:text-style-name="P5" draw:layer="layout" svg:width="0.051cm" svg:height="0.051cm" svg:x="15.984cm" svg:y="4.187cm" svg:viewBox="0 0 52 52" draw:points="0,0 52,0 52,52 0,52">
          <text:p/>
        </draw:polygon>
        <draw:polygon draw:style-name="gr4" draw:text-style-name="P5" draw:layer="layout" svg:width="3.949cm" svg:height="0.051cm" svg:x="16.035cm" svg:y="4.187cm" svg:viewBox="0 0 3950 52" draw:points="0,0 3950,0 3950,52 0,52">
          <text:p/>
        </draw:polygon>
        <draw:polygon draw:style-name="gr4" draw:text-style-name="P5" draw:layer="layout" svg:width="0.052cm" svg:height="0.61cm" svg:x="19.984cm" svg:y="3.577cm" svg:viewBox="0 0 53 611" draw:points="0,0 53,0 53,611 0,611">
          <text:p/>
        </draw:polygon>
        <draw:polygon draw:style-name="gr4" draw:text-style-name="P5" draw:layer="layout" svg:width="0.052cm" svg:height="0.051cm" svg:x="19.984cm" svg:y="4.187cm" svg:viewBox="0 0 53 52" draw:points="0,0 53,0 53,52 0,52">
          <text:p/>
        </draw:polygon>
        <draw:polygon draw:style-name="gr4" draw:text-style-name="P5" draw:layer="layout" svg:width="0.052cm" svg:height="0.051cm" svg:x="19.984cm" svg:y="4.187cm" svg:viewBox="0 0 53 52" draw:points="0,0 53,0 53,52 0,52">
          <text:p/>
        </draw:polygon>
        <draw:frame draw:style-name="gr3" draw:text-style-name="P4" draw:layer="layout" svg:width="0.35cm" svg:height="0.395cm" svg:x="16.255cm" svg:y="3.696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139cm" svg:height="0.158cm" svg:x="2.503cm" svg:y="4.24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8.368cm" svg:height="0.395cm" svg:x="11.72cm" svg:y="4.627cm">
          <draw:text-box>
            <text:p text:style-name="P2"><text:span text:style-name="T6">(Податке уноси предметни наставник - ментор) </text:span></text:p>
          </draw:text-box>
        </draw:frame>
        <draw:frame draw:style-name="gr8" draw:text-style-name="P9" draw:layer="layout" svg:width="2.821cm" svg:height="0.513cm" svg:x="2.693cm" svg:y="5.404cm">
          <draw:text-box>
            <text:p text:style-name="P2"><text:span text:style-name="T7">СТУДИЈСКИ </text:span></text:p>
          </draw:text-box>
        </draw:frame>
        <draw:frame draw:style-name="gr8" draw:text-style-name="P9" draw:layer="layout" svg:width="2.484cm" svg:height="0.513cm" svg:x="2.693cm" svg:y="5.933cm">
          <draw:text-box>
            <text:p text:style-name="P2"><text:span text:style-name="T7">ПРОГРАМ: </text:span></text:p>
          </draw:text-box>
        </draw:frame>
        <draw:polygon draw:style-name="gr4" draw:text-style-name="P5" draw:layer="layout" svg:width="0.051cm" svg:height="0.055cm" svg:x="2.477cm" svg:y="5.123cm" svg:viewBox="0 0 52 56" draw:points="0,0 52,0 52,56 0,56">
          <text:p/>
        </draw:polygon>
        <draw:polygon draw:style-name="gr4" draw:text-style-name="P5" draw:layer="layout" svg:width="0.051cm" svg:height="0.05cm" svg:x="2.477cm" svg:y="5.123cm" svg:viewBox="0 0 52 51" draw:points="0,0 52,0 52,51 0,51">
          <text:p/>
        </draw:polygon>
        <draw:polygon draw:style-name="gr4" draw:text-style-name="P5" draw:layer="layout" svg:width="3.717cm" svg:height="0.05cm" svg:x="2.528cm" svg:y="5.123cm" svg:viewBox="0 0 3718 51" draw:points="0,0 3718,0 3718,51 0,51">
          <text:p/>
        </draw:polygon>
        <draw:polygon draw:style-name="gr4" draw:text-style-name="P5" draw:layer="layout" svg:width="0.017cm" svg:height="0.006cm" svg:x="6.244cm" svg:y="5.173cm" svg:viewBox="0 0 18 7" draw:points="0,0 18,0 18,7 0,7">
          <text:p/>
        </draw:polygon>
        <draw:polygon draw:style-name="gr4" draw:text-style-name="P5" draw:layer="layout" svg:width="0.051cm" svg:height="0.05cm" svg:x="6.244cm" svg:y="5.123cm" svg:viewBox="0 0 52 51" draw:points="0,0 52,0 52,51 0,51">
          <text:p/>
        </draw:polygon>
        <draw:polygon draw:style-name="gr4" draw:text-style-name="P5" draw:layer="layout" svg:width="13.689cm" svg:height="0.05cm" svg:x="6.295cm" svg:y="5.123cm" svg:viewBox="0 0 13690 51" draw:points="0,0 13690,0 13690,51 0,51">
          <text:p/>
        </draw:polygon>
        <draw:polygon draw:style-name="gr4" draw:text-style-name="P5" draw:layer="layout" svg:width="0.052cm" svg:height="0.055cm" svg:x="19.984cm" svg:y="5.123cm" svg:viewBox="0 0 53 56" draw:points="0,0 53,0 53,56 0,56">
          <text:p/>
        </draw:polygon>
        <draw:polygon draw:style-name="gr4" draw:text-style-name="P5" draw:layer="layout" svg:width="0.052cm" svg:height="0.05cm" svg:x="19.984cm" svg:y="5.123cm" svg:viewBox="0 0 53 51" draw:points="0,0 53,0 53,51 0,51">
          <text:p/>
        </draw:polygon>
        <draw:polygon draw:style-name="gr4" draw:text-style-name="P5" draw:layer="layout" svg:width="0.051cm" svg:height="1.265cm" svg:x="2.477cm" svg:y="5.178cm" svg:viewBox="0 0 52 1266" draw:points="0,0 52,0 52,1266 0,1266">
          <text:p/>
        </draw:polygon>
        <draw:polygon draw:style-name="gr4" draw:text-style-name="P5" draw:layer="layout" svg:width="0.017cm" svg:height="1.265cm" svg:x="6.244cm" svg:y="5.178cm" svg:viewBox="0 0 18 1266" draw:points="0,0 18,0 18,1266 0,1266">
          <text:p/>
        </draw:polygon>
        <draw:polygon draw:style-name="gr4" draw:text-style-name="P5" draw:layer="layout" svg:width="0.052cm" svg:height="1.265cm" svg:x="19.984cm" svg:y="5.178cm" svg:viewBox="0 0 53 1266" draw:points="0,0 53,0 53,1266 0,1266">
          <text:p/>
        </draw:polygon>
        <draw:frame draw:style-name="gr8" draw:text-style-name="P9" draw:layer="layout" svg:width="5.795cm" svg:height="0.513cm" svg:x="6.444cm" svg:y="5.404cm">
          <draw:text-box>
            <text:p text:style-name="P2"><text:span text:style-name="T7">Рачунарство и аутоматика </text:span></text:p>
          </draw:text-box>
        </draw:frame>
        <draw:frame draw:style-name="gr8" draw:text-style-name="P9" draw:layer="layout" svg:width="3.588cm" svg:height="0.513cm" svg:x="2.693cm" svg:y="6.69cm">
          <draw:text-box>
            <text:p text:style-name="P2"><text:span text:style-name="T7">РУКОВОДИЛАЦ </text:span></text:p>
          </draw:text-box>
        </draw:frame>
        <draw:frame draw:style-name="gr8" draw:text-style-name="P9" draw:layer="layout" svg:width="3.095cm" svg:height="0.513cm" svg:x="2.693cm" svg:y="7.215cm">
          <draw:text-box>
            <text:p text:style-name="P2"><text:span text:style-name="T7">СТУДИЈСКОГ </text:span></text:p>
          </draw:text-box>
        </draw:frame>
        <draw:frame draw:style-name="gr8" draw:text-style-name="P9" draw:layer="layout" svg:width="2.789cm" svg:height="0.513cm" svg:x="2.693cm" svg:y="7.745cm">
          <draw:text-box>
            <text:p text:style-name="P2"><text:span text:style-name="T7">ПРОГРАМА: </text:span></text:p>
          </draw:text-box>
        </draw:frame>
        <draw:polygon draw:style-name="gr4" draw:text-style-name="P5" draw:layer="layout" svg:width="0.051cm" svg:height="0.017cm" svg:x="2.477cm" svg:y="6.443cm" svg:viewBox="0 0 52 18" draw:points="0,0 52,0 52,18 0,18">
          <text:p/>
        </draw:polygon>
        <draw:polygon draw:style-name="gr4" draw:text-style-name="P5" draw:layer="layout" svg:width="3.717cm" svg:height="0.017cm" svg:x="2.528cm" svg:y="6.443cm" svg:viewBox="0 0 3718 18" draw:points="0,0 3718,0 3718,18 0,18">
          <text:p/>
        </draw:polygon>
        <draw:polygon draw:style-name="gr4" draw:text-style-name="P5" draw:layer="layout" svg:width="0.017cm" svg:height="0.017cm" svg:x="6.244cm" svg:y="6.443cm" svg:viewBox="0 0 18 18" draw:points="0,0 18,0 18,18 0,18">
          <text:p/>
        </draw:polygon>
        <draw:polygon draw:style-name="gr4" draw:text-style-name="P5" draw:layer="layout" svg:width="13.723cm" svg:height="0.017cm" svg:x="6.261cm" svg:y="6.443cm" svg:viewBox="0 0 13724 18" draw:points="0,0 13724,0 13724,18 0,18">
          <text:p/>
        </draw:polygon>
        <draw:polygon draw:style-name="gr4" draw:text-style-name="P5" draw:layer="layout" svg:width="0.052cm" svg:height="0.017cm" svg:x="19.984cm" svg:y="6.443cm" svg:viewBox="0 0 53 18" draw:points="0,0 53,0 53,18 0,18">
          <text:p/>
        </draw:polygon>
        <draw:polygon draw:style-name="gr4" draw:text-style-name="P5" draw:layer="layout" svg:width="0.051cm" svg:height="2.02cm" svg:x="2.477cm" svg:y="6.46cm" svg:viewBox="0 0 52 2021" draw:points="0,0 52,0 52,2021 0,2021">
          <text:p/>
        </draw:polygon>
        <draw:polygon draw:style-name="gr4" draw:text-style-name="P5" draw:layer="layout" svg:width="0.051cm" svg:height="0.05cm" svg:x="2.477cm" svg:y="8.48cm" svg:viewBox="0 0 52 51" draw:points="0,0 52,0 52,51 0,51">
          <text:p/>
        </draw:polygon>
        <draw:polygon draw:style-name="gr4" draw:text-style-name="P5" draw:layer="layout" svg:width="0.051cm" svg:height="0.05cm" svg:x="2.477cm" svg:y="8.48cm" svg:viewBox="0 0 52 51" draw:points="0,0 52,0 52,51 0,51">
          <text:p/>
        </draw:polygon>
        <draw:polygon draw:style-name="gr4" draw:text-style-name="P5" draw:layer="layout" svg:width="3.717cm" svg:height="0.05cm" svg:x="2.528cm" svg:y="8.48cm" svg:viewBox="0 0 3718 51" draw:points="0,0 3718,0 3718,51 0,51">
          <text:p/>
        </draw:polygon>
        <draw:polygon draw:style-name="gr4" draw:text-style-name="P5" draw:layer="layout" svg:width="0.017cm" svg:height="2.02cm" svg:x="6.244cm" svg:y="6.46cm" svg:viewBox="0 0 18 2021" draw:points="0,0 18,0 18,2021 0,2021">
          <text:p/>
        </draw:polygon>
        <draw:polygon draw:style-name="gr4" draw:text-style-name="P5" draw:layer="layout" svg:width="0.051cm" svg:height="0.05cm" svg:x="6.244cm" svg:y="8.48cm" svg:viewBox="0 0 52 51" draw:points="0,0 52,0 52,51 0,51">
          <text:p/>
        </draw:polygon>
        <draw:polygon draw:style-name="gr4" draw:text-style-name="P5" draw:layer="layout" svg:width="13.689cm" svg:height="0.05cm" svg:x="6.295cm" svg:y="8.48cm" svg:viewBox="0 0 13690 51" draw:points="0,0 13690,0 13690,51 0,51">
          <text:p/>
        </draw:polygon>
        <draw:polygon draw:style-name="gr4" draw:text-style-name="P5" draw:layer="layout" svg:width="0.052cm" svg:height="2.02cm" svg:x="19.984cm" svg:y="6.46cm" svg:viewBox="0 0 53 2021" draw:points="0,0 53,0 53,2021 0,2021">
          <text:p/>
        </draw:polygon>
        <draw:polygon draw:style-name="gr4" draw:text-style-name="P5" draw:layer="layout" svg:width="0.052cm" svg:height="0.05cm" svg:x="19.984cm" svg:y="8.48cm" svg:viewBox="0 0 53 51" draw:points="0,0 53,0 53,51 0,51">
          <text:p/>
        </draw:polygon>
        <draw:polygon draw:style-name="gr4" draw:text-style-name="P5" draw:layer="layout" svg:width="0.052cm" svg:height="0.05cm" svg:x="19.984cm" svg:y="8.48cm" svg:viewBox="0 0 53 51" draw:points="0,0 53,0 53,51 0,51">
          <text:p/>
        </draw:polygon>
        <draw:frame draw:style-name="gr8" draw:text-style-name="P9" draw:layer="layout" svg:width="6.115cm" svg:height="0.513cm" svg:x="6.444cm" svg:y="6.69cm">
          <draw:text-box>
            <text:p text:style-name="P2"><text:span text:style-name="T7">проф. др. Милан Видаковић </text:span></text:p>
          </draw:text-box>
        </draw:frame>
        <draw:frame draw:style-name="gr9" draw:text-style-name="P10" draw:layer="layout" svg:width="0.211cm" svg:height="0.239cm" svg:x="2.503cm" svg:y="8.54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543cm" svg:height="0.395cm" svg:x="2.693cm" svg:y="8.967cm">
          <draw:text-box>
            <text:p text:style-name="P2"><text:span text:style-name="T2">Студент: </text:span></text:p>
          </draw:text-box>
        </draw:frame>
        <draw:frame draw:style-name="gr3" draw:text-style-name="P4" draw:layer="layout" svg:width="3.9cm" svg:height="0.395cm" svg:x="5.707cm" svg:y="8.967cm">
          <draw:text-box>
            <text:p text:style-name="P2"><text:span text:style-name="T2">Александар Стојановић</text:span></text:p>
          </draw:text-box>
        </draw:frame>
        <draw:frame draw:style-name="gr3" draw:text-style-name="P4" draw:layer="layout" svg:width="2.31cm" svg:height="0.395cm" svg:x="13.448cm" svg:y="8.967cm">
          <draw:text-box>
            <text:p text:style-name="P2"><text:span text:style-name="T2">Број индекса: </text:span></text:p>
          </draw:text-box>
        </draw:frame>
        <draw:polygon draw:style-name="gr4" draw:text-style-name="P5" draw:layer="layout" svg:width="0.051cm" svg:height="0.055cm" svg:x="2.477cm" svg:y="8.78cm" svg:viewBox="0 0 52 56" draw:points="0,0 52,0 52,56 0,56">
          <text:p/>
        </draw:polygon>
        <draw:polygon draw:style-name="gr4" draw:text-style-name="P5" draw:layer="layout" svg:width="0.051cm" svg:height="0.051cm" svg:x="2.477cm" svg:y="8.78cm" svg:viewBox="0 0 52 52" draw:points="0,0 52,0 52,52 0,52">
          <text:p/>
        </draw:polygon>
        <draw:polygon draw:style-name="gr4" draw:text-style-name="P5" draw:layer="layout" svg:width="2.984cm" svg:height="0.051cm" svg:x="2.528cm" svg:y="8.78cm" svg:viewBox="0 0 2985 52" draw:points="0,0 2985,0 2985,52 0,52">
          <text:p/>
        </draw:polygon>
        <draw:polygon draw:style-name="gr4" draw:text-style-name="P5" draw:layer="layout" svg:width="0.017cm" svg:height="0.004cm" svg:x="5.512cm" svg:y="8.831cm" svg:viewBox="0 0 18 5" draw:points="0,0 18,0 18,5 0,5">
          <text:p/>
        </draw:polygon>
        <draw:polygon draw:style-name="gr4" draw:text-style-name="P5" draw:layer="layout" svg:width="0.051cm" svg:height="0.051cm" svg:x="5.512cm" svg:y="8.78cm" svg:viewBox="0 0 52 52" draw:points="0,0 52,0 52,52 0,52">
          <text:p/>
        </draw:polygon>
        <draw:polygon draw:style-name="gr4" draw:text-style-name="P5" draw:layer="layout" svg:width="7.685cm" svg:height="0.051cm" svg:x="5.563cm" svg:y="8.78cm" svg:viewBox="0 0 7686 52" draw:points="0,0 7686,0 7686,52 0,52">
          <text:p/>
        </draw:polygon>
        <draw:polygon draw:style-name="gr4" draw:text-style-name="P5" draw:layer="layout" svg:width="0.017cm" svg:height="0.004cm" svg:x="13.248cm" svg:y="8.831cm" svg:viewBox="0 0 18 5" draw:points="0,0 18,0 18,5 0,5">
          <text:p/>
        </draw:polygon>
        <draw:polygon draw:style-name="gr4" draw:text-style-name="P5" draw:layer="layout" svg:width="0.051cm" svg:height="0.051cm" svg:x="13.248cm" svg:y="8.78cm" svg:viewBox="0 0 52 52" draw:points="0,0 52,0 52,52 0,52">
          <text:p/>
        </draw:polygon>
        <draw:polygon draw:style-name="gr4" draw:text-style-name="P5" draw:layer="layout" svg:width="2.702cm" svg:height="0.051cm" svg:x="13.299cm" svg:y="8.78cm" svg:viewBox="0 0 2703 52" draw:points="0,0 2703,0 2703,52 0,52">
          <text:p/>
        </draw:polygon>
        <draw:polygon draw:style-name="gr4" draw:text-style-name="P5" draw:layer="layout" svg:width="0.017cm" svg:height="0.004cm" svg:x="16.001cm" svg:y="8.831cm" svg:viewBox="0 0 18 5" draw:points="0,0 18,0 18,5 0,5">
          <text:p/>
        </draw:polygon>
        <draw:polygon draw:style-name="gr4" draw:text-style-name="P5" draw:layer="layout" svg:width="0.051cm" svg:height="0.051cm" svg:x="16.001cm" svg:y="8.78cm" svg:viewBox="0 0 52 52" draw:points="0,0 52,0 52,52 0,52">
          <text:p/>
        </draw:polygon>
        <draw:polygon draw:style-name="gr4" draw:text-style-name="P5" draw:layer="layout" svg:width="3.932cm" svg:height="0.051cm" svg:x="16.052cm" svg:y="8.78cm" svg:viewBox="0 0 3933 52" draw:points="0,0 3933,0 3933,52 0,52">
          <text:p/>
        </draw:polygon>
        <draw:polygon draw:style-name="gr4" draw:text-style-name="P5" draw:layer="layout" svg:width="0.052cm" svg:height="0.055cm" svg:x="19.984cm" svg:y="8.78cm" svg:viewBox="0 0 53 56" draw:points="0,0 53,0 53,56 0,56">
          <text:p/>
        </draw:polygon>
        <draw:polygon draw:style-name="gr4" draw:text-style-name="P5" draw:layer="layout" svg:width="0.052cm" svg:height="0.051cm" svg:x="19.984cm" svg:y="8.78cm" svg:viewBox="0 0 53 52" draw:points="0,0 53,0 53,52 0,52">
          <text:p/>
        </draw:polygon>
        <draw:polygon draw:style-name="gr4" draw:text-style-name="P5" draw:layer="layout" svg:width="0.051cm" svg:height="0.649cm" svg:x="2.477cm" svg:y="8.835cm" svg:viewBox="0 0 52 650" draw:points="0,0 52,0 52,650 0,650">
          <text:p/>
        </draw:polygon>
        <draw:polygon draw:style-name="gr4" draw:text-style-name="P5" draw:layer="layout" svg:width="0.017cm" svg:height="0.649cm" svg:x="5.512cm" svg:y="8.835cm" svg:viewBox="0 0 18 650" draw:points="0,0 18,0 18,650 0,650">
          <text:p/>
        </draw:polygon>
        <draw:polygon draw:style-name="gr4" draw:text-style-name="P5" draw:layer="layout" svg:width="0.017cm" svg:height="0.649cm" svg:x="13.248cm" svg:y="8.835cm" svg:viewBox="0 0 18 650" draw:points="0,0 18,0 18,650 0,650">
          <text:p/>
        </draw:polygon>
        <draw:polygon draw:style-name="gr4" draw:text-style-name="P5" draw:layer="layout" svg:width="0.017cm" svg:height="0.649cm" svg:x="16.001cm" svg:y="8.835cm" svg:viewBox="0 0 18 650" draw:points="0,0 18,0 18,650 0,650">
          <text:p/>
        </draw:polygon>
        <draw:polygon draw:style-name="gr4" draw:text-style-name="P5" draw:layer="layout" svg:width="0.052cm" svg:height="0.649cm" svg:x="19.984cm" svg:y="8.835cm" svg:viewBox="0 0 53 650" draw:points="0,0 53,0 53,650 0,650">
          <text:p/>
        </draw:polygon>
        <draw:frame draw:style-name="gr3" draw:text-style-name="P4" draw:layer="layout" svg:width="2.093cm" svg:height="0.395cm" svg:x="16.196cm" svg:y="8.967cm">
          <draw:text-box>
            <text:p text:style-name="P2"><text:span text:style-name="T2">Е2 119/2023 </text:span></text:p>
          </draw:text-box>
        </draw:frame>
        <draw:frame draw:style-name="gr3" draw:text-style-name="P4" draw:layer="layout" svg:width="1.409cm" svg:height="0.395cm" svg:x="2.693cm" svg:y="9.658cm">
          <draw:text-box>
            <text:p text:style-name="P2"><text:span text:style-name="T2">Област: </text:span></text:p>
          </draw:text-box>
        </draw:frame>
        <draw:polygon draw:style-name="gr4" draw:text-style-name="P5" draw:layer="layout" svg:width="0.051cm" svg:height="0.017cm" svg:x="2.477cm" svg:y="9.484cm" svg:viewBox="0 0 52 18" draw:points="0,0 52,0 52,18 0,18">
          <text:p/>
        </draw:polygon>
        <draw:polygon draw:style-name="gr4" draw:text-style-name="P5" draw:layer="layout" svg:width="2.984cm" svg:height="0.017cm" svg:x="2.528cm" svg:y="9.484cm" svg:viewBox="0 0 2985 18" draw:points="0,0 2985,0 2985,18 0,18">
          <text:p/>
        </draw:polygon>
        <draw:polygon draw:style-name="gr4" draw:text-style-name="P5" draw:layer="layout" svg:width="0.017cm" svg:height="0.017cm" svg:x="5.512cm" svg:y="9.484cm" svg:viewBox="0 0 18 18" draw:points="0,0 18,0 18,18 0,18">
          <text:p/>
        </draw:polygon>
        <draw:polygon draw:style-name="gr4" draw:text-style-name="P5" draw:layer="layout" svg:width="7.719cm" svg:height="0.017cm" svg:x="5.529cm" svg:y="9.484cm" svg:viewBox="0 0 7720 18" draw:points="0,0 7720,0 7720,18 0,18">
          <text:p/>
        </draw:polygon>
        <draw:polygon draw:style-name="gr4" draw:text-style-name="P5" draw:layer="layout" svg:width="0.017cm" svg:height="0.017cm" svg:x="13.248cm" svg:y="9.484cm" svg:viewBox="0 0 18 18" draw:points="0,0 18,0 18,18 0,18">
          <text:p/>
        </draw:polygon>
        <draw:polygon draw:style-name="gr4" draw:text-style-name="P5" draw:layer="layout" svg:width="2.736cm" svg:height="0.017cm" svg:x="13.265cm" svg:y="9.484cm" svg:viewBox="0 0 2737 18" draw:points="0,0 2737,0 2737,18 0,18">
          <text:p/>
        </draw:polygon>
        <draw:polygon draw:style-name="gr4" draw:text-style-name="P5" draw:layer="layout" svg:width="0.017cm" svg:height="0.017cm" svg:x="16.001cm" svg:y="9.484cm" svg:viewBox="0 0 18 18" draw:points="0,0 18,0 18,18 0,18">
          <text:p/>
        </draw:polygon>
        <draw:polygon draw:style-name="gr4" draw:text-style-name="P5" draw:layer="layout" svg:width="3.966cm" svg:height="0.017cm" svg:x="16.018cm" svg:y="9.484cm" svg:viewBox="0 0 3967 18" draw:points="0,0 3967,0 3967,18 0,18">
          <text:p/>
        </draw:polygon>
        <draw:polygon draw:style-name="gr4" draw:text-style-name="P5" draw:layer="layout" svg:width="0.052cm" svg:height="0.017cm" svg:x="19.984cm" svg:y="9.484cm" svg:viewBox="0 0 53 18" draw:points="0,0 53,0 53,18 0,18">
          <text:p/>
        </draw:polygon>
        <draw:polygon draw:style-name="gr4" draw:text-style-name="P5" draw:layer="layout" svg:width="0.051cm" svg:height="0.69cm" svg:x="2.477cm" svg:y="9.501cm" svg:viewBox="0 0 52 691" draw:points="0,0 52,0 52,691 0,691">
          <text:p/>
        </draw:polygon>
        <draw:polygon draw:style-name="gr4" draw:text-style-name="P5" draw:layer="layout" svg:width="0.017cm" svg:height="0.69cm" svg:x="5.512cm" svg:y="9.501cm" svg:viewBox="0 0 18 691" draw:points="0,0 18,0 18,691 0,691">
          <text:p/>
        </draw:polygon>
        <draw:polygon draw:style-name="gr4" draw:text-style-name="P5" draw:layer="layout" svg:width="0.052cm" svg:height="0.69cm" svg:x="19.984cm" svg:y="9.501cm" svg:viewBox="0 0 53 691" draw:points="0,0 53,0 53,691 0,691">
          <text:p/>
        </draw:polygon>
        <draw:frame draw:style-name="gr3" draw:text-style-name="P4" draw:layer="layout" svg:width="7.343cm" svg:height="0.395cm" svg:x="5.707cm" svg:y="9.658cm">
          <draw:text-box>
            <text:p text:style-name="P2"><text:span text:style-name="T2">Дистрибуирани системи и програмски језици</text:span></text:p>
          </draw:text-box>
        </draw:frame>
        <draw:frame draw:style-name="gr3" draw:text-style-name="P4" draw:layer="layout" svg:width="1.431cm" svg:height="0.395cm" svg:x="2.693cm" svg:y="10.36cm">
          <draw:text-box>
            <text:p text:style-name="P2"><text:span text:style-name="T2">Ментор: </text:span></text:p>
          </draw:text-box>
        </draw:frame>
        <draw:polygon draw:style-name="gr4" draw:text-style-name="P5" draw:layer="layout" svg:width="0.051cm" svg:height="0.017cm" svg:x="2.477cm" svg:y="10.191cm" svg:viewBox="0 0 52 18" draw:points="0,0 52,0 52,18 0,18">
          <text:p/>
        </draw:polygon>
        <draw:polygon draw:style-name="gr4" draw:text-style-name="P5" draw:layer="layout" svg:width="2.984cm" svg:height="0.017cm" svg:x="2.528cm" svg:y="10.191cm" svg:viewBox="0 0 2985 18" draw:points="0,0 2985,0 2985,18 0,18">
          <text:p/>
        </draw:polygon>
        <draw:polygon draw:style-name="gr4" draw:text-style-name="P5" draw:layer="layout" svg:width="0.017cm" svg:height="0.017cm" svg:x="5.512cm" svg:y="10.191cm" svg:viewBox="0 0 18 18" draw:points="0,0 18,0 18,18 0,18">
          <text:p/>
        </draw:polygon>
        <draw:polygon draw:style-name="gr4" draw:text-style-name="P5" draw:layer="layout" svg:width="14.455cm" svg:height="0.017cm" svg:x="5.529cm" svg:y="10.191cm" svg:viewBox="0 0 14456 18" draw:points="0,0 14456,0 14456,18 0,18">
          <text:p/>
        </draw:polygon>
        <draw:polygon draw:style-name="gr4" draw:text-style-name="P5" draw:layer="layout" svg:width="0.052cm" svg:height="0.017cm" svg:x="19.984cm" svg:y="10.191cm" svg:viewBox="0 0 53 18" draw:points="0,0 53,0 53,18 0,18">
          <text:p/>
        </draw:polygon>
        <draw:polygon draw:style-name="gr4" draw:text-style-name="P5" draw:layer="layout" svg:width="0.051cm" svg:height="0.69cm" svg:x="2.477cm" svg:y="10.208cm" svg:viewBox="0 0 52 691" draw:points="0,0 52,0 52,691 0,691">
          <text:p/>
        </draw:polygon>
        <draw:polygon draw:style-name="gr4" draw:text-style-name="P5" draw:layer="layout" svg:width="0.017cm" svg:height="0.69cm" svg:x="5.512cm" svg:y="10.208cm" svg:viewBox="0 0 18 691" draw:points="0,0 18,0 18,691 0,691">
          <text:p/>
        </draw:polygon>
        <draw:polygon draw:style-name="gr4" draw:text-style-name="P5" draw:layer="layout" svg:width="0.052cm" svg:height="0.69cm" svg:x="19.984cm" svg:y="10.208cm" svg:viewBox="0 0 53 691" draw:points="0,0 53,0 53,691 0,691">
          <text:p/>
        </draw:polygon>
        <draw:polygon draw:style-name="gr10" draw:text-style-name="P11" draw:layer="layout" svg:width="17.452cm" svg:height="2.205cm" svg:x="2.528cm" svg:y="10.949cm" svg:viewBox="0 0 17453 2206" draw:points="0,0 17453,0 17453,2206 0,2206">
          <text:p/>
        </draw:polygon>
        <draw:polygon draw:style-name="gr10" draw:text-style-name="P11" draw:layer="layout" svg:width="17.122cm" svg:height="0.406cm" svg:x="2.693cm" svg:y="10.949cm" svg:viewBox="0 0 17123 407" draw:points="0,0 17123,0 17123,407 0,407">
          <text:p/>
        </draw:polygon>
        <draw:frame draw:style-name="gr3" draw:text-style-name="P4" draw:layer="layout" svg:width="3.604cm" svg:height="0.395cm" svg:x="5.707cm" svg:y="10.36cm">
          <draw:text-box>
            <text:p text:style-name="P2"><text:span text:style-name="T2">проф др. Гајић Душан</text:span></text:p>
          </draw:text-box>
        </draw:frame>
        <draw:polygon draw:style-name="gr10" draw:text-style-name="P11" draw:layer="layout" svg:width="17.122cm" svg:height="0.406cm" svg:x="2.693cm" svg:y="11.355cm" svg:viewBox="0 0 17123 407" draw:points="0,0 17123,0 17123,407 0,407">
          <text:p/>
        </draw:polygon>
        <draw:frame draw:style-name="gr3" draw:text-style-name="P4" draw:layer="layout" svg:width="17.377cm" svg:height="0.395cm" svg:x="2.769cm" svg:y="10.961cm">
          <draw:text-box>
            <text:p text:style-name="P2"><text:span text:style-name="T2">НА ОСНОВУ ПОДНЕТЕ ПРИЈАВЕ, ПРИЛОЖЕНЕ ДОКУМЕНТАЦИЈЕ И ОДРЕДБИ СТАТУТА ФАКУЛТЕТА </text:span></text:p>
          </draw:text-box>
        </draw:frame>
        <draw:polygon draw:style-name="gr10" draw:text-style-name="P11" draw:layer="layout" svg:width="17.122cm" svg:height="0.407cm" svg:x="2.693cm" svg:y="11.761cm" svg:viewBox="0 0 17123 408" draw:points="0,0 17123,0 17123,408 0,408">
          <text:p/>
        </draw:polygon>
        <draw:frame draw:style-name="gr3" draw:text-style-name="P4" draw:layer="layout" svg:width="12.197cm" svg:height="0.395cm" svg:x="2.753cm" svg:y="11.368cm">
          <draw:text-box>
            <text:p text:style-name="P2"><text:span text:style-name="T2">ИЗДАЈЕ СЕ ЗАДАТАК ЗА <text:s/>МАСТЕР РАД, СА СЛЕДЕЋИМ ЕЛЕМЕНТИМА: </text:span></text:p>
          </draw:text-box>
        </draw:frame>
        <draw:frame draw:style-name="gr3" draw:text-style-name="P4" draw:layer="layout" svg:width="0.35cm" svg:height="0.395cm" svg:x="3.328cm" svg:y="11.774cm">
          <draw:text-box>
            <text:p text:style-name="P2"><text:span text:style-name="T2">- </text:span></text:p>
          </draw:text-box>
        </draw:frame>
        <draw:polygon draw:style-name="gr10" draw:text-style-name="P11" draw:layer="layout" svg:width="17.122cm" svg:height="0.406cm" svg:x="2.693cm" svg:y="12.168cm" svg:viewBox="0 0 17123 407" draw:points="0,0 17123,0 17123,407 0,407">
          <text:p/>
        </draw:polygon>
        <draw:frame draw:style-name="gr3" draw:text-style-name="P4" draw:layer="layout" svg:width="3.694cm" svg:height="0.395cm" svg:x="3.963cm" svg:y="11.774cm">
          <draw:text-box>
            <text:p text:style-name="P2"><text:span text:style-name="T2">проблем – тема рада; </text:span></text:p>
          </draw:text-box>
        </draw:frame>
        <draw:frame draw:style-name="gr3" draw:text-style-name="P4" draw:layer="layout" svg:width="0.35cm" svg:height="0.395cm" svg:x="3.328cm" svg:y="12.181cm">
          <draw:text-box>
            <text:p text:style-name="P2"><text:span text:style-name="T2">- </text:span></text:p>
          </draw:text-box>
        </draw:frame>
        <draw:polygon draw:style-name="gr10" draw:text-style-name="P11" draw:layer="layout" svg:width="17.122cm" svg:height="0.402cm" svg:x="2.693cm" svg:y="12.574cm" svg:viewBox="0 0 17123 403" draw:points="0,0 17123,0 17123,403 0,403">
          <text:p/>
        </draw:polygon>
        <draw:frame draw:style-name="gr3" draw:text-style-name="P4" draw:layer="layout" svg:width="16.532cm" svg:height="0.395cm" svg:x="3.963cm" svg:y="12.181cm">
          <draw:text-box>
            <text:p text:style-name="P2"><text:span text:style-name="T2">начин <text:s/>решавања <text:s/>проблема <text:s/>и <text:s/>начин <text:s/>практичне <text:s/>провере <text:s/>резултата <text:s/>рада, <text:s/>ако <text:s/>је <text:s/>таква <text:s/>провера </text:span></text:p>
          </draw:text-box>
        </draw:frame>
        <draw:polygon draw:style-name="gr10" draw:text-style-name="P11" draw:layer="layout" svg:width="17.122cm" svg:height="0.178cm" svg:x="2.693cm" svg:y="12.976cm" svg:viewBox="0 0 17123 179" draw:points="0,0 17123,0 17123,179 0,179">
          <text:p/>
        </draw:polygon>
        <draw:frame draw:style-name="gr3" draw:text-style-name="P4" draw:layer="layout" svg:width="1.938cm" svg:height="0.395cm" svg:x="3.963cm" svg:y="12.583cm">
          <draw:text-box>
            <text:p text:style-name="P2"><text:span text:style-name="T2">неопходна; </text:span></text:p>
          </draw:text-box>
        </draw:frame>
        <draw:frame draw:style-name="gr3" draw:text-style-name="P4" draw:layer="layout" svg:width="0.35cm" svg:height="0.395cm" svg:x="11.382cm" svg:y="12.98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5cm" svg:x="11.382cm" svg:y="13.3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5cm" svg:x="11.382cm" svg:y="13.802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0.051cm" svg:height="0.055cm" svg:x="2.477cm" svg:y="10.898cm" svg:viewBox="0 0 52 56" draw:points="0,0 52,0 52,56 0,56">
          <text:p/>
        </draw:polygon>
        <draw:polygon draw:style-name="gr4" draw:text-style-name="P5" draw:layer="layout" svg:width="2.984cm" svg:height="0.051cm" svg:x="2.528cm" svg:y="10.898cm" svg:viewBox="0 0 2985 52" draw:points="0,0 2985,0 2985,52 0,52">
          <text:p/>
        </draw:polygon>
        <draw:polygon draw:style-name="gr10" draw:text-style-name="P11" draw:layer="layout" svg:width="2.984cm" svg:height="0.004cm" svg:x="2.528cm" svg:y="10.949cm" svg:viewBox="0 0 2985 5" draw:points="0,0 2985,0 2985,5 0,5">
          <text:p/>
        </draw:polygon>
        <draw:polygon draw:style-name="gr10" draw:text-style-name="P11" draw:layer="layout" svg:width="0.051cm" svg:height="0.004cm" svg:x="5.512cm" svg:y="10.949cm" svg:viewBox="0 0 52 5" draw:points="0,0 52,0 52,5 0,5">
          <text:p/>
        </draw:polygon>
        <draw:polygon draw:style-name="gr4" draw:text-style-name="P5" draw:layer="layout" svg:width="0.051cm" svg:height="0.051cm" svg:x="5.512cm" svg:y="10.898cm" svg:viewBox="0 0 52 52" draw:points="0,0 52,0 52,52 0,52">
          <text:p/>
        </draw:polygon>
        <draw:polygon draw:style-name="gr4" draw:text-style-name="P5" draw:layer="layout" svg:width="14.421cm" svg:height="0.051cm" svg:x="5.563cm" svg:y="10.898cm" svg:viewBox="0 0 14422 52" draw:points="0,0 14422,0 14422,52 0,52">
          <text:p/>
        </draw:polygon>
        <draw:polygon draw:style-name="gr10" draw:text-style-name="P11" draw:layer="layout" svg:width="14.421cm" svg:height="0.004cm" svg:x="5.563cm" svg:y="10.949cm" svg:viewBox="0 0 14422 5" draw:points="0,0 14422,0 14422,5 0,5">
          <text:p/>
        </draw:polygon>
        <draw:polygon draw:style-name="gr4" draw:text-style-name="P5" draw:layer="layout" svg:width="0.052cm" svg:height="0.055cm" svg:x="19.984cm" svg:y="10.898cm" svg:viewBox="0 0 53 56" draw:points="0,0 53,0 53,56 0,56">
          <text:p/>
        </draw:polygon>
        <draw:polygon draw:style-name="gr4" draw:text-style-name="P5" draw:layer="layout" svg:width="0.051cm" svg:height="2.201cm" svg:x="2.477cm" svg:y="10.953cm" svg:viewBox="0 0 52 2202" draw:points="0,0 52,0 52,2202 0,2202">
          <text:p/>
        </draw:polygon>
        <draw:polygon draw:style-name="gr4" draw:text-style-name="P5" draw:layer="layout" svg:width="0.051cm" svg:height="0.051cm" svg:x="2.477cm" svg:y="13.154cm" svg:viewBox="0 0 52 52" draw:points="0,0 52,0 52,52 0,52">
          <text:p/>
        </draw:polygon>
        <draw:polygon draw:style-name="gr4" draw:text-style-name="P5" draw:layer="layout" svg:width="0.051cm" svg:height="0.051cm" svg:x="2.477cm" svg:y="13.154cm" svg:viewBox="0 0 52 52" draw:points="0,0 52,0 52,52 0,52">
          <text:p/>
        </draw:polygon>
        <draw:polygon draw:style-name="gr4" draw:text-style-name="P5" draw:layer="layout" svg:width="17.456cm" svg:height="0.051cm" svg:x="2.528cm" svg:y="13.154cm" svg:viewBox="0 0 17457 52" draw:points="0,0 17457,0 17457,52 0,52">
          <text:p/>
        </draw:polygon>
        <draw:polygon draw:style-name="gr4" draw:text-style-name="P5" draw:layer="layout" svg:width="0.052cm" svg:height="2.201cm" svg:x="19.984cm" svg:y="10.953cm" svg:viewBox="0 0 53 2202" draw:points="0,0 53,0 53,2202 0,2202">
          <text:p/>
        </draw:polygon>
        <draw:polygon draw:style-name="gr4" draw:text-style-name="P5" draw:layer="layout" svg:width="0.052cm" svg:height="0.051cm" svg:x="19.984cm" svg:y="13.154cm" svg:viewBox="0 0 53 52" draw:points="0,0 53,0 53,52 0,52">
          <text:p/>
        </draw:polygon>
        <draw:polygon draw:style-name="gr4" draw:text-style-name="P5" draw:layer="layout" svg:width="0.052cm" svg:height="0.051cm" svg:x="19.984cm" svg:y="13.154cm" svg:viewBox="0 0 53 52" draw:points="0,0 53,0 53,52 0,52">
          <text:p/>
        </draw:polygon>
        <draw:frame draw:style-name="gr3" draw:text-style-name="P4" draw:layer="layout" svg:width="0.35cm" svg:height="0.395cm" svg:x="11.382cm" svg:y="14.208cm">
          <draw:text-box>
            <text:p text:style-name="P2"><text:span text:style-name="T2"><text:s/></text:span></text:p>
          </draw:text-box>
        </draw:frame>
        <draw:frame draw:style-name="gr8" draw:text-style-name="P9" draw:layer="layout" svg:width="6.008cm" svg:height="0.513cm" svg:x="2.503cm" svg:y="13.647cm">
          <draw:text-box>
            <text:p text:style-name="P2"><text:span text:style-name="T9">НАСЛОВ <text:s/>МАСТЕР <text:s/>РАДА: </text:span></text:p>
          </draw:text-box>
        </draw:frame>
        <draw:polygon draw:style-name="gr4" draw:text-style-name="P5" draw:layer="layout" svg:width="0.051cm" svg:height="0.055cm" svg:x="2.477cm" svg:y="14.263cm" svg:viewBox="0 0 52 56" draw:points="0,0 52,0 52,56 0,56">
          <text:p/>
        </draw:polygon>
        <draw:polygon draw:style-name="gr4" draw:text-style-name="P5" draw:layer="layout" svg:width="0.051cm" svg:height="0.051cm" svg:x="2.477cm" svg:y="14.263cm" svg:viewBox="0 0 52 52" draw:points="0,0 52,0 52,52 0,52">
          <text:p/>
        </draw:polygon>
        <draw:polygon draw:style-name="gr4" draw:text-style-name="P5" draw:layer="layout" svg:width="17.456cm" svg:height="0.051cm" svg:x="2.528cm" svg:y="14.263cm" svg:viewBox="0 0 17457 52" draw:points="0,0 17457,0 17457,52 0,52">
          <text:p/>
        </draw:polygon>
        <draw:polygon draw:style-name="gr4" draw:text-style-name="P5" draw:layer="layout" svg:width="0.052cm" svg:height="0.055cm" svg:x="19.984cm" svg:y="14.263cm" svg:viewBox="0 0 53 56" draw:points="0,0 53,0 53,56 0,56">
          <text:p/>
        </draw:polygon>
        <draw:polygon draw:style-name="gr4" draw:text-style-name="P5" draw:layer="layout" svg:width="0.052cm" svg:height="0.051cm" svg:x="19.984cm" svg:y="14.263cm" svg:viewBox="0 0 53 52" draw:points="0,0 53,0 53,52 0,52">
          <text:p/>
        </draw:polygon>
        <draw:polygon draw:style-name="gr4" draw:text-style-name="P5" draw:layer="layout" svg:width="0.051cm" svg:height="1.267cm" svg:x="2.477cm" svg:y="14.318cm" svg:viewBox="0 0 52 1268" draw:points="0,0 52,0 52,1268 0,1268">
          <text:p/>
        </draw:polygon>
        <draw:polygon draw:style-name="gr4" draw:text-style-name="P5" draw:layer="layout" svg:width="0.051cm" svg:height="0.051cm" svg:x="2.477cm" svg:y="15.585cm" svg:viewBox="0 0 52 52" draw:points="0,0 52,0 52,52 0,52">
          <text:p/>
        </draw:polygon>
        <draw:polygon draw:style-name="gr4" draw:text-style-name="P5" draw:layer="layout" svg:width="0.051cm" svg:height="0.051cm" svg:x="2.477cm" svg:y="15.585cm" svg:viewBox="0 0 52 52" draw:points="0,0 52,0 52,52 0,52">
          <text:p/>
        </draw:polygon>
        <draw:polygon draw:style-name="gr4" draw:text-style-name="P5" draw:layer="layout" svg:width="17.456cm" svg:height="0.051cm" svg:x="2.528cm" svg:y="15.585cm" svg:viewBox="0 0 17457 52" draw:points="0,0 17457,0 17457,52 0,52">
          <text:p/>
        </draw:polygon>
        <draw:polygon draw:style-name="gr4" draw:text-style-name="P5" draw:layer="layout" svg:width="0.052cm" svg:height="1.267cm" svg:x="19.984cm" svg:y="14.318cm" svg:viewBox="0 0 53 1268" draw:points="0,0 53,0 53,1268 0,1268">
          <text:p/>
        </draw:polygon>
        <draw:polygon draw:style-name="gr4" draw:text-style-name="P5" draw:layer="layout" svg:width="0.052cm" svg:height="0.051cm" svg:x="19.984cm" svg:y="15.585cm" svg:viewBox="0 0 53 52" draw:points="0,0 53,0 53,52 0,52">
          <text:p/>
        </draw:polygon>
        <draw:polygon draw:style-name="gr4" draw:text-style-name="P5" draw:layer="layout" svg:width="0.052cm" svg:height="0.051cm" svg:x="19.984cm" svg:y="15.585cm" svg:viewBox="0 0 53 52" draw:points="0,0 53,0 53,52 0,52">
          <text:p/>
        </draw:polygon>
        <draw:frame draw:style-name="gr11" draw:text-style-name="P13" draw:layer="layout" svg:width="17.284cm" svg:height="2.54cm" svg:x="2.854cm" svg:y="14.39cm">
          <draw:text-box>
            <text:p text:style-name="P12"><text:span text:style-name="T10">Дизајн и имплементација ЕИП-7702-компатибилног</text:span></text:p>
            <text:p text:style-name="P12"><text:span text:style-name="T10">вишепотписног новчаника</text:span></text:p>
          </draw:text-box>
        </draw:frame>
        <draw:frame draw:style-name="gr8" draw:text-style-name="P9" draw:layer="layout" svg:width="4.042cm" svg:height="0.513cm" svg:x="2.503cm" svg:y="16.082cm">
          <draw:text-box>
            <text:p text:style-name="P2"><text:span text:style-name="T9">ТЕКСТ ЗАДАТКА: </text:span></text:p>
          </draw:text-box>
        </draw:frame>
        <draw:frame draw:style-name="gr3" draw:text-style-name="P4" draw:layer="layout" svg:width="17.558cm" svg:height="0.395cm" svg:x="2.693cm" svg:y="16.868cm">
          <draw:text-box>
            <text:p text:style-name="P2"><text:span text:style-name="T2">Размотрити <text:s/>проблем <text:s/>доказа <text:s/>нултог <text:s/>знања <text:s/>и <text:s/>њиховог <text:s/>значаја <text:s/>у <text:s/>криптографији. <text:s/>Размотрити <text:s/>примене </text:span></text:p>
          </draw:text-box>
        </draw:frame>
        <draw:frame draw:style-name="gr3" draw:text-style-name="P4" draw:layer="layout" svg:width="17.07cm" svg:height="0.395cm" svg:x="2.693cm" svg:y="17.27cm">
          <draw:text-box>
            <text:p text:style-name="P2"><text:span text:style-name="T2">доказа <text:s/>нултог <text:s/>знања <text:s/>у <text:s/>свакодневном <text:s/>животу. <text:s/>Размотрити <text:s/>интерактивне <text:s/>и <text:s/>неинтерактивне <text:s/>доказе </text:span></text:p>
          </draw:text-box>
        </draw:frame>
        <draw:frame draw:style-name="gr3" draw:text-style-name="P4" draw:layer="layout" svg:width="1.159cm" svg:height="0.395cm" svg:x="2.693cm" svg:y="17.676cm">
          <draw:text-box>
            <text:p text:style-name="P2"><text:span text:style-name="T2">нултог </text:span></text:p>
          </draw:text-box>
        </draw:frame>
        <draw:frame draw:style-name="gr3" draw:text-style-name="P4" draw:layer="layout" svg:width="1.229cm" svg:height="0.395cm" svg:x="4.022cm" svg:y="17.676cm">
          <draw:text-box>
            <text:p text:style-name="P2"><text:span text:style-name="T2">знања. </text:span></text:p>
          </draw:text-box>
        </draw:frame>
        <draw:frame draw:style-name="gr3" draw:text-style-name="P4" draw:layer="layout" svg:width="2.037cm" svg:height="0.395cm" svg:x="5.438cm" svg:y="17.676cm">
          <draw:text-box>
            <text:p text:style-name="P2"><text:span text:style-name="T2">Размотрити </text:span></text:p>
          </draw:text-box>
        </draw:frame>
        <draw:frame draw:style-name="gr3" draw:text-style-name="P4" draw:layer="layout" svg:width="1.524cm" svg:height="0.395cm" svg:x="7.634cm" svg:y="17.676cm">
          <draw:text-box>
            <text:p text:style-name="P2"><text:span text:style-name="T2">проблем </text:span></text:p>
          </draw:text-box>
        </draw:frame>
        <draw:frame draw:style-name="gr3" draw:text-style-name="P4" draw:layer="layout" svg:width="1.91cm" svg:height="0.395cm" svg:x="9.33cm" svg:y="17.676cm">
          <draw:text-box>
            <text:p text:style-name="P2"><text:span text:style-name="T2">квадратног </text:span></text:p>
          </draw:text-box>
        </draw:frame>
        <draw:frame draw:style-name="gr3" draw:text-style-name="P4" draw:layer="layout" svg:width="1.337cm" svg:height="0.395cm" svg:x="11.416cm" svg:y="17.676cm">
          <draw:text-box>
            <text:p text:style-name="P2"><text:span text:style-name="T2">остатка </text:span></text:p>
          </draw:text-box>
        </draw:frame>
        <draw:frame draw:style-name="gr3" draw:text-style-name="P4" draw:layer="layout" svg:width="0.35cm" svg:height="0.395cm" svg:x="12.944cm" svg:y="17.676cm">
          <draw:text-box>
            <text:p text:style-name="P2"><text:span text:style-name="T2">и </text:span></text:p>
          </draw:text-box>
        </draw:frame>
        <draw:frame draw:style-name="gr3" draw:text-style-name="P4" draw:layer="layout" svg:width="1.414cm" svg:height="0.395cm" svg:x="13.422cm" svg:y="17.676cm">
          <draw:text-box>
            <text:p text:style-name="P2"><text:span text:style-name="T2">његовог </text:span></text:p>
          </draw:text-box>
        </draw:frame>
        <draw:frame draw:style-name="gr3" draw:text-style-name="P4" draw:layer="layout" svg:width="1.206cm" svg:height="0.395cm" svg:x="15.008cm" svg:y="17.676cm">
          <draw:text-box>
            <text:p text:style-name="P2"><text:span text:style-name="T2">доказа </text:span></text:p>
          </draw:text-box>
        </draw:frame>
        <draw:frame draw:style-name="gr3" draw:text-style-name="P4" draw:layer="layout" svg:width="0.35cm" svg:height="0.395cm" svg:x="16.399cm" svg:y="17.676cm">
          <draw:text-box>
            <text:p text:style-name="P2"><text:span text:style-name="T2">у </text:span></text:p>
          </draw:text-box>
        </draw:frame>
        <draw:frame draw:style-name="gr3" draw:text-style-name="P4" draw:layer="layout" svg:width="2.567cm" svg:height="0.395cm" svg:x="16.856cm" svg:y="17.676cm">
          <draw:text-box>
            <text:p text:style-name="P2"><text:span text:style-name="T2">интерактивним </text:span></text:p>
          </draw:text-box>
        </draw:frame>
        <draw:frame draw:style-name="gr3" draw:text-style-name="P4" draw:layer="layout" svg:width="0.35cm" svg:height="0.395cm" svg:x="19.614cm" svg:y="17.676cm">
          <draw:text-box>
            <text:p text:style-name="P2"><text:span text:style-name="T2">и </text:span></text:p>
          </draw:text-box>
        </draw:frame>
        <draw:frame draw:style-name="gr3" draw:text-style-name="P4" draw:layer="layout" svg:width="17.08cm" svg:height="0.395cm" svg:x="2.693cm" svg:y="18.083cm">
          <draw:text-box>
            <text:p text:style-name="P2"><text:span text:style-name="T2">неинтерактивним доказима нултог знања. Размотрити и упоредити следеће неинтерактивне протоколе </text:span></text:p>
          </draw:text-box>
        </draw:frame>
        <draw:frame draw:style-name="gr3" draw:text-style-name="P4" draw:layer="layout" svg:width="16.973cm" svg:height="0.395cm" svg:x="2.693cm" svg:y="18.489cm">
          <draw:text-box>
            <text:p text:style-name="P2"><text:span text:style-name="T2">нултог <text:s/>знања: ZK-SNARK, ZK-STARK i <text:s/>Bulletproofs. Користећи ZK-SNARK протокол доказати проблем </text:span></text:p>
          </draw:text-box>
        </draw:frame>
        <draw:polygon draw:style-name="gr4" draw:text-style-name="P5" draw:layer="layout" svg:width="0.051cm" svg:height="0.055cm" svg:x="2.477cm" svg:y="16.694cm" svg:viewBox="0 0 52 56" draw:points="0,0 52,0 52,56 0,56">
          <text:p/>
        </draw:polygon>
        <draw:polygon draw:style-name="gr4" draw:text-style-name="P5" draw:layer="layout" svg:width="0.051cm" svg:height="0.051cm" svg:x="2.477cm" svg:y="16.694cm" svg:viewBox="0 0 52 52" draw:points="0,0 52,0 52,52 0,52">
          <text:p/>
        </draw:polygon>
        <draw:polygon draw:style-name="gr4" draw:text-style-name="P5" draw:layer="layout" svg:width="17.456cm" svg:height="0.051cm" svg:x="2.528cm" svg:y="16.694cm" svg:viewBox="0 0 17457 52" draw:points="0,0 17457,0 17457,52 0,52">
          <text:p/>
        </draw:polygon>
        <draw:polygon draw:style-name="gr4" draw:text-style-name="P5" draw:layer="layout" svg:width="0.052cm" svg:height="0.055cm" svg:x="19.984cm" svg:y="16.694cm" svg:viewBox="0 0 53 56" draw:points="0,0 53,0 53,56 0,56">
          <text:p/>
        </draw:polygon>
        <draw:polygon draw:style-name="gr4" draw:text-style-name="P5" draw:layer="layout" svg:width="0.052cm" svg:height="0.051cm" svg:x="19.984cm" svg:y="16.694cm" svg:viewBox="0 0 53 52" draw:points="0,0 53,0 53,52 0,52">
          <text:p/>
        </draw:polygon>
        <draw:polygon draw:style-name="gr4" draw:text-style-name="P5" draw:layer="layout" svg:width="0.051cm" svg:height="6.766cm" svg:x="2.477cm" svg:y="16.749cm" svg:viewBox="0 0 52 6767" draw:points="0,0 52,0 52,6767 0,6767">
          <text:p/>
        </draw:polygon>
        <draw:polygon draw:style-name="gr4" draw:text-style-name="P5" draw:layer="layout" svg:width="0.051cm" svg:height="0.051cm" svg:x="2.477cm" svg:y="23.515cm" svg:viewBox="0 0 52 52" draw:points="0,0 52,0 52,52 0,52">
          <text:p/>
        </draw:polygon>
        <draw:polygon draw:style-name="gr4" draw:text-style-name="P5" draw:layer="layout" svg:width="0.051cm" svg:height="0.051cm" svg:x="2.477cm" svg:y="23.515cm" svg:viewBox="0 0 52 52" draw:points="0,0 52,0 52,52 0,52">
          <text:p/>
        </draw:polygon>
        <draw:polygon draw:style-name="gr4" draw:text-style-name="P5" draw:layer="layout" svg:width="17.456cm" svg:height="0.051cm" svg:x="2.528cm" svg:y="23.515cm" svg:viewBox="0 0 17457 52" draw:points="0,0 17457,0 17457,52 0,52">
          <text:p/>
        </draw:polygon>
        <draw:polygon draw:style-name="gr4" draw:text-style-name="P5" draw:layer="layout" svg:width="0.052cm" svg:height="6.766cm" svg:x="19.984cm" svg:y="16.749cm" svg:viewBox="0 0 53 6767" draw:points="0,0 53,0 53,6767 0,6767">
          <text:p/>
        </draw:polygon>
        <draw:polygon draw:style-name="gr4" draw:text-style-name="P5" draw:layer="layout" svg:width="0.052cm" svg:height="0.051cm" svg:x="19.984cm" svg:y="23.515cm" svg:viewBox="0 0 53 52" draw:points="0,0 53,0 53,52 0,52">
          <text:p/>
        </draw:polygon>
        <draw:polygon draw:style-name="gr4" draw:text-style-name="P5" draw:layer="layout" svg:width="0.052cm" svg:height="0.051cm" svg:x="19.984cm" svg:y="23.515cm" svg:viewBox="0 0 53 52" draw:points="0,0 53,0 53,52 0,52">
          <text:p/>
        </draw:polygon>
        <draw:frame draw:style-name="gr3" draw:text-style-name="P4" draw:layer="layout" svg:width="13.732cm" svg:height="0.395cm" svg:x="2.693cm" svg:y="18.895cm">
          <draw:text-box>
            <text:p text:style-name="P2"><text:span text:style-name="T2">квадратног остатка у програмском језику Python <text:s/>TODO TODO TODO TODO TODO. </text:span></text:p>
          </draw:text-box>
        </draw:frame>
        <draw:frame draw:style-name="gr9" draw:text-style-name="P10" draw:layer="layout" svg:width="0.211cm" svg:height="0.239cm" svg:x="2.503cm" svg:y="23.578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211cm" svg:height="0.239cm" svg:x="2.503cm" svg:y="23.8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5.718cm" svg:height="0.395cm" svg:x="2.693cm" svg:y="24.201cm">
          <draw:text-box>
            <text:p text:style-name="P2"><text:span text:style-name="T2">Руководилац студијског програма: </text:span></text:p>
          </draw:text-box>
        </draw:frame>
        <draw:polygon draw:style-name="gr4" draw:text-style-name="P5" draw:layer="layout" svg:width="0.051cm" svg:height="0.055cm" svg:x="2.477cm" svg:y="24.057cm" svg:viewBox="0 0 52 56" draw:points="0,0 52,0 52,56 0,56">
          <text:p/>
        </draw:polygon>
        <draw:polygon draw:style-name="gr4" draw:text-style-name="P5" draw:layer="layout" svg:width="0.051cm" svg:height="0.051cm" svg:x="2.477cm" svg:y="24.057cm" svg:viewBox="0 0 52 52" draw:points="0,0 52,0 52,52 0,52">
          <text:p/>
        </draw:polygon>
        <draw:polygon draw:style-name="gr4" draw:text-style-name="P5" draw:layer="layout" svg:width="8.722cm" svg:height="0.051cm" svg:x="2.528cm" svg:y="24.057cm" svg:viewBox="0 0 8723 52" draw:points="0,0 8723,0 8723,52 0,52">
          <text:p/>
        </draw:polygon>
        <draw:polygon draw:style-name="gr4" draw:text-style-name="P5" draw:layer="layout" svg:width="0.017cm" svg:height="0.004cm" svg:x="11.25cm" svg:y="24.108cm" svg:viewBox="0 0 18 5" draw:points="0,0 18,0 18,5 0,5">
          <text:p/>
        </draw:polygon>
        <draw:polygon draw:style-name="gr4" draw:text-style-name="P5" draw:layer="layout" svg:width="0.051cm" svg:height="0.051cm" svg:x="11.25cm" svg:y="24.057cm" svg:viewBox="0 0 52 52" draw:points="0,0 52,0 52,52 0,52">
          <text:p/>
        </draw:polygon>
        <draw:polygon draw:style-name="gr4" draw:text-style-name="P5" draw:layer="layout" svg:width="8.683cm" svg:height="0.051cm" svg:x="11.301cm" svg:y="24.057cm" svg:viewBox="0 0 8684 52" draw:points="0,0 8684,0 8684,52 0,52">
          <text:p/>
        </draw:polygon>
        <draw:polygon draw:style-name="gr4" draw:text-style-name="P5" draw:layer="layout" svg:width="0.052cm" svg:height="0.055cm" svg:x="19.984cm" svg:y="24.057cm" svg:viewBox="0 0 53 56" draw:points="0,0 53,0 53,56 0,56">
          <text:p/>
        </draw:polygon>
        <draw:polygon draw:style-name="gr4" draw:text-style-name="P5" draw:layer="layout" svg:width="0.052cm" svg:height="0.051cm" svg:x="19.984cm" svg:y="24.057cm" svg:viewBox="0 0 53 52" draw:points="0,0 53,0 53,52 0,52">
          <text:p/>
        </draw:polygon>
        <draw:polygon draw:style-name="gr4" draw:text-style-name="P5" draw:layer="layout" svg:width="0.051cm" svg:height="0.559cm" svg:x="2.477cm" svg:y="24.112cm" svg:viewBox="0 0 52 560" draw:points="0,0 52,0 52,560 0,560">
          <text:p/>
        </draw:polygon>
        <draw:polygon draw:style-name="gr4" draw:text-style-name="P5" draw:layer="layout" svg:width="0.017cm" svg:height="0.559cm" svg:x="11.25cm" svg:y="24.112cm" svg:viewBox="0 0 18 560" draw:points="0,0 18,0 18,560 0,560">
          <text:p/>
        </draw:polygon>
        <draw:polygon draw:style-name="gr4" draw:text-style-name="P5" draw:layer="layout" svg:width="0.052cm" svg:height="0.559cm" svg:x="19.984cm" svg:y="24.112cm" svg:viewBox="0 0 53 560" draw:points="0,0 53,0 53,560 0,560">
          <text:p/>
        </draw:polygon>
        <draw:frame draw:style-name="gr3" draw:text-style-name="P4" draw:layer="layout" svg:width="2.32cm" svg:height="0.395cm" svg:x="11.445cm" svg:y="24.201cm">
          <draw:text-box>
            <text:p text:style-name="P2"><text:span text:style-name="T2">Ментор рада: </text:span></text:p>
          </draw:text-box>
        </draw:frame>
        <draw:frame draw:style-name="gr3" draw:text-style-name="P4" draw:layer="layout" svg:width="0.35cm" svg:height="0.395cm" svg:x="2.693cm" svg:y="24.912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0.051cm" svg:height="0.017cm" svg:x="2.477cm" svg:y="24.671cm" svg:viewBox="0 0 52 18" draw:points="0,0 52,0 52,18 0,18">
          <text:p/>
        </draw:polygon>
        <draw:polygon draw:style-name="gr4" draw:text-style-name="P5" draw:layer="layout" svg:width="8.722cm" svg:height="0.017cm" svg:x="2.528cm" svg:y="24.671cm" svg:viewBox="0 0 8723 18" draw:points="0,0 8723,0 8723,18 0,18">
          <text:p/>
        </draw:polygon>
        <draw:polygon draw:style-name="gr4" draw:text-style-name="P5" draw:layer="layout" svg:width="0.017cm" svg:height="0.017cm" svg:x="11.25cm" svg:y="24.671cm" svg:viewBox="0 0 18 18" draw:points="0,0 18,0 18,18 0,18">
          <text:p/>
        </draw:polygon>
        <draw:polygon draw:style-name="gr4" draw:text-style-name="P5" draw:layer="layout" svg:width="8.717cm" svg:height="0.017cm" svg:x="11.267cm" svg:y="24.671cm" svg:viewBox="0 0 8718 18" draw:points="0,0 8718,0 8718,18 0,18">
          <text:p/>
        </draw:polygon>
        <draw:polygon draw:style-name="gr4" draw:text-style-name="P5" draw:layer="layout" svg:width="0.052cm" svg:height="0.017cm" svg:x="19.984cm" svg:y="24.671cm" svg:viewBox="0 0 53 18" draw:points="0,0 53,0 53,18 0,18">
          <text:p/>
        </draw:polygon>
        <draw:polygon draw:style-name="gr4" draw:text-style-name="P5" draw:layer="layout" svg:width="0.051cm" svg:height="1.041cm" svg:x="2.477cm" svg:y="24.688cm" svg:viewBox="0 0 52 1042" draw:points="0,0 52,0 52,1042 0,1042">
          <text:p/>
        </draw:polygon>
        <draw:polygon draw:style-name="gr4" draw:text-style-name="P5" draw:layer="layout" svg:width="0.051cm" svg:height="0.051cm" svg:x="2.477cm" svg:y="25.729cm" svg:viewBox="0 0 52 52" draw:points="0,0 52,0 52,52 0,52">
          <text:p/>
        </draw:polygon>
        <draw:polygon draw:style-name="gr4" draw:text-style-name="P5" draw:layer="layout" svg:width="0.051cm" svg:height="0.051cm" svg:x="2.477cm" svg:y="25.729cm" svg:viewBox="0 0 52 52" draw:points="0,0 52,0 52,52 0,52">
          <text:p/>
        </draw:polygon>
        <draw:polygon draw:style-name="gr4" draw:text-style-name="P5" draw:layer="layout" svg:width="8.722cm" svg:height="0.051cm" svg:x="2.528cm" svg:y="25.729cm" svg:viewBox="0 0 8723 52" draw:points="0,0 8723,0 8723,52 0,52">
          <text:p/>
        </draw:polygon>
        <draw:polygon draw:style-name="gr4" draw:text-style-name="P5" draw:layer="layout" svg:width="0.017cm" svg:height="1.041cm" svg:x="11.25cm" svg:y="24.688cm" svg:viewBox="0 0 18 1042" draw:points="0,0 18,0 18,1042 0,1042">
          <text:p/>
        </draw:polygon>
        <draw:polygon draw:style-name="gr4" draw:text-style-name="P5" draw:layer="layout" svg:width="0.051cm" svg:height="0.051cm" svg:x="11.25cm" svg:y="25.729cm" svg:viewBox="0 0 52 52" draw:points="0,0 52,0 52,52 0,52">
          <text:p/>
        </draw:polygon>
        <draw:polygon draw:style-name="gr4" draw:text-style-name="P5" draw:layer="layout" svg:width="8.683cm" svg:height="0.051cm" svg:x="11.301cm" svg:y="25.729cm" svg:viewBox="0 0 8684 52" draw:points="0,0 8684,0 8684,52 0,52">
          <text:p/>
        </draw:polygon>
        <draw:polygon draw:style-name="gr4" draw:text-style-name="P5" draw:layer="layout" svg:width="0.052cm" svg:height="1.041cm" svg:x="19.984cm" svg:y="24.688cm" svg:viewBox="0 0 53 1042" draw:points="0,0 53,0 53,1042 0,1042">
          <text:p/>
        </draw:polygon>
        <draw:polygon draw:style-name="gr4" draw:text-style-name="P5" draw:layer="layout" svg:width="0.052cm" svg:height="0.051cm" svg:x="19.984cm" svg:y="25.729cm" svg:viewBox="0 0 53 52" draw:points="0,0 53,0 53,52 0,52">
          <text:p/>
        </draw:polygon>
        <draw:polygon draw:style-name="gr4" draw:text-style-name="P5" draw:layer="layout" svg:width="0.052cm" svg:height="0.051cm" svg:x="19.984cm" svg:y="25.729cm" svg:viewBox="0 0 53 52" draw:points="0,0 53,0 53,52 0,52">
          <text:p/>
        </draw:polygon>
        <draw:frame draw:style-name="gr3" draw:text-style-name="P4" draw:layer="layout" svg:width="0.35cm" svg:height="0.395cm" svg:x="11.445cm" svg:y="24.912cm">
          <draw:text-box>
            <text:p text:style-name="P2"><text:span text:style-name="T2"><text:s/></text:span></text:p>
          </draw:text-box>
        </draw:frame>
        <draw:frame draw:style-name="gr12" draw:text-style-name="P14" draw:layer="layout" svg:width="0.283cm" svg:height="0.319cm" svg:x="2.503cm" svg:y="25.795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2.375cm" svg:height="0.395cm" svg:x="2.592cm" svg:y="26.355cm">
          <draw:text-box>
            <text:p text:style-name="P2"><text:span text:style-name="T2">Примерак за: <text:s/></text:span></text:p>
          </draw:text-box>
        </draw:frame>
        <draw:frame draw:style-name="gr6" draw:text-style-name="P7" draw:layer="layout" svg:width="0.494cm" svg:height="0.674cm" svg:x="4.971cm" svg:y="26.144cm">
          <draw:text-box>
            <text:p text:style-name="P2"><text:span text:style-name="T12"></text:span></text:p>
          </draw:text-box>
        </draw:frame>
        <draw:frame draw:style-name="gr3" draw:text-style-name="P4" draw:layer="layout" svg:width="2.051cm" svg:height="0.395cm" svg:x="5.411cm" svg:y="26.355cm">
          <draw:text-box>
            <text:p text:style-name="P2"><text:span text:style-name="T2"><text:s/>- Студента; </text:span></text:p>
          </draw:text-box>
        </draw:frame>
        <draw:frame draw:style-name="gr6" draw:text-style-name="P7" draw:layer="layout" svg:width="0.494cm" svg:height="0.674cm" svg:x="7.457cm" svg:y="26.144cm">
          <draw:text-box>
            <text:p text:style-name="P2"><text:span text:style-name="T12"></text:span></text:p>
          </draw:text-box>
        </draw:frame>
        <draw:polygon draw:style-name="gr4" draw:text-style-name="P5" draw:layer="layout" svg:width="0.017cm" svg:height="0.017cm" svg:x="2.494cm" svg:y="26.11cm" svg:viewBox="0 0 18 18" draw:points="0,0 18,0 18,18 0,18">
          <text:p/>
        </draw:polygon>
        <draw:polygon draw:style-name="gr4" draw:text-style-name="P5" draw:layer="layout" svg:width="0.017cm" svg:height="0.017cm" svg:x="2.494cm" svg:y="26.11cm" svg:viewBox="0 0 18 18" draw:points="0,0 18,0 18,18 0,18">
          <text:p/>
        </draw:polygon>
        <draw:polygon draw:style-name="gr4" draw:text-style-name="P5" draw:layer="layout" svg:width="17.491cm" svg:height="0.017cm" svg:x="2.511cm" svg:y="26.11cm" svg:viewBox="0 0 17492 18" draw:points="0,0 17492,0 17492,18 0,18">
          <text:p/>
        </draw:polygon>
        <draw:polygon draw:style-name="gr4" draw:text-style-name="P5" draw:layer="layout" svg:width="0.017cm" svg:height="0.017cm" svg:x="20.002cm" svg:y="26.11cm" svg:viewBox="0 0 18 18" draw:points="0,0 18,0 18,18 0,18">
          <text:p/>
        </draw:polygon>
        <draw:polygon draw:style-name="gr4" draw:text-style-name="P5" draw:layer="layout" svg:width="0.017cm" svg:height="0.017cm" svg:x="20.002cm" svg:y="26.11cm" svg:viewBox="0 0 18 18" draw:points="0,0 18,0 18,18 0,18">
          <text:p/>
        </draw:polygon>
        <draw:polygon draw:style-name="gr4" draw:text-style-name="P5" draw:layer="layout" svg:width="0.017cm" svg:height="0.686cm" svg:x="2.494cm" svg:y="26.127cm" svg:viewBox="0 0 18 687" draw:points="0,0 18,0 18,687 0,687">
          <text:p/>
        </draw:polygon>
        <draw:polygon draw:style-name="gr4" draw:text-style-name="P5" draw:layer="layout" svg:width="0.017cm" svg:height="0.017cm" svg:x="2.494cm" svg:y="26.813cm" svg:viewBox="0 0 18 18" draw:points="0,0 18,0 18,18 0,18">
          <text:p/>
        </draw:polygon>
        <draw:polygon draw:style-name="gr4" draw:text-style-name="P5" draw:layer="layout" svg:width="0.017cm" svg:height="0.017cm" svg:x="2.494cm" svg:y="26.813cm" svg:viewBox="0 0 18 18" draw:points="0,0 18,0 18,18 0,18">
          <text:p/>
        </draw:polygon>
        <draw:polygon draw:style-name="gr4" draw:text-style-name="P5" draw:layer="layout" svg:width="17.491cm" svg:height="0.017cm" svg:x="2.511cm" svg:y="26.813cm" svg:viewBox="0 0 17492 18" draw:points="0,0 17492,0 17492,18 0,18">
          <text:p/>
        </draw:polygon>
        <draw:polygon draw:style-name="gr4" draw:text-style-name="P5" draw:layer="layout" svg:width="0.017cm" svg:height="0.686cm" svg:x="20.002cm" svg:y="26.127cm" svg:viewBox="0 0 18 687" draw:points="0,0 18,0 18,687 0,687">
          <text:p/>
        </draw:polygon>
        <draw:polygon draw:style-name="gr4" draw:text-style-name="P5" draw:layer="layout" svg:width="0.017cm" svg:height="0.017cm" svg:x="20.002cm" svg:y="26.813cm" svg:viewBox="0 0 18 18" draw:points="0,0 18,0 18,18 0,18">
          <text:p/>
        </draw:polygon>
        <draw:polygon draw:style-name="gr4" draw:text-style-name="P5" draw:layer="layout" svg:width="0.017cm" svg:height="0.017cm" svg:x="20.002cm" svg:y="26.813cm" svg:viewBox="0 0 18 18" draw:points="0,0 18,0 18,18 0,18">
          <text:p/>
        </draw:polygon>
        <draw:frame draw:style-name="gr3" draw:text-style-name="P4" draw:layer="layout" svg:width="1.841cm" svg:height="0.395cm" svg:x="7.897cm" svg:y="26.355cm">
          <draw:text-box>
            <text:p text:style-name="P2"><text:span text:style-name="T2"><text:s/>- Ментора </text:span></text:p>
          </draw:text-box>
        </draw:frame>
        <draw:frame draw:style-name="gr13" draw:text-style-name="P15" draw:layer="layout" svg:width="0.033cm" svg:height="0.039cm" svg:x="20.007cm" svg:y="26.9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35cm" svg:height="0.395cm" svg:x="20.007cm" svg:y="27.09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5cm" svg:x="20.007cm" svg:y="27.609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4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7-01T17:17:00.819763274</meta:print-date>
    <meta:printed-by>PDF files</meta:printed-by>
    <dc:date>2026-07-01T17:17:36.078626871</dc:date>
    <meta:editing-duration>PT22S</meta:editing-duration>
    <meta:editing-cycles>1</meta:editing-cycles>
    <meta:document-statistic meta:object-count="279"/>
    <meta:generator>LibreOffice/25.2.7.2$Linux_X86_64 LibreOffice_project/520$Build-2</meta:generator>
  </office:meta>
</office:document-meta>
</file>
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103ADB5D3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6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0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5e5e5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6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26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8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48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9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58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0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8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11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5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8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9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25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2f2f2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1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6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0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6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13.72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0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14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6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0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4.402cm" fo:min-width="16.94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9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4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2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e5e5e5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P12" style:family="paragraph">
      <loext:graphic-properties draw:fill="solid" draw:fill-color="#f2f2f2"/>
    </style:style>
    <style:style style:name="P1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16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7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loext:opacity="100%" style:font-name="Liberation Sans" fo:font-size="12pt" fo:font-style="italic" fo:font-weight="bold" style:font-name-asian="Liberation Sans" style:font-size-asian="12pt" style:font-style-asian="italic" style:font-weight-asian="bold" style:font-name-complex="Liberation Sans" style:font-size-complex="12pt" style:font-style-complex="italic" style:font-weight-complex="bold"/>
    </style:style>
    <style:style style:name="T2" style:family="text">
      <style:text-properties fo:color="#000000" loext:opacity="100%" style:font-name="Liberation Sans" fo:font-size="9.89999961853027pt" fo:font-weight="normal" style:font-name-asian="Liberation Sans" style:font-size-asian="9.89999961853027pt" style:font-weight-asian="normal" style:font-name-complex="Liberation Sans" style:font-size-complex="9.89999961853027pt" style:font-weight-complex="normal"/>
    </style:style>
    <style:style style:name="T3" style:family="text">
      <style:text-properties fo:color="#000000" loext:opacity="100%" style:font-name="Liberation Sans" fo:font-size="9.89999961853027pt" fo:font-weight="bold" style:font-name-asian="Liberation Sans" style:font-size-asian="9.89999961853027pt" style:font-weight-asian="bold" style:font-name-complex="Liberation Sans" style:font-size-complex="9.89999961853027pt" style:font-weight-complex="bold"/>
    </style:style>
    <style:style style:name="T4" style:family="text">
      <style:text-properties fo:color="#000000" loext:opacity="100%" style:font-name="Liberation Sans" fo:font-size="14.1000003814697pt" fo:font-weight="bold" style:font-name-asian="Liberation Sans" style:font-size-asian="14.1000003814697pt" style:font-weight-asian="bold" style:font-name-complex="Liberation Sans" style:font-size-complex="14.1000003814697pt" style:font-weight-complex="bold"/>
    </style:style>
    <style:style style:name="T5" style:family="text">
      <style:text-properties fo:color="#000000" loext:opacity="100%" style:font-name="Liberation Sans" fo:font-size="3.90000009536743pt" fo:font-weight="normal" style:font-name-asian="Liberation Sans" style:font-size-asian="3.90000009536743pt" style:font-weight-asian="normal" style:font-name-complex="Liberation Sans" style:font-size-complex="3.90000009536743pt" style:font-weight-complex="normal"/>
    </style:style>
    <style:style style:name="T6" style:family="text">
      <style:text-properties fo:color="#000000" loext:opacity="100%" style:font-name="Liberation Sans" fo:font-size="9.89999961853027pt" fo:font-style="italic" fo:font-weight="normal" style:font-name-asian="Liberation Sans" style:font-size-asian="9.89999961853027pt" style:font-style-asian="italic" style:font-weight-asian="normal" style:font-name-complex="Liberation Sans" style:font-size-complex="9.89999961853027pt" style:font-style-complex="italic" style:font-weight-complex="normal"/>
    </style:style>
    <style:style style:name="T7" style:family="text">
      <style:text-properties fo:color="#000000" loext:opacity="100%" style:font-name="Liberation Sans" fo:font-size="13pt" fo:font-weight="normal" style:font-name-asian="Liberation Sans" style:font-size-asian="13pt" style:font-weight-asian="normal" style:font-name-complex="Liberation Sans" style:font-size-complex="13pt" style:font-weight-complex="normal"/>
    </style:style>
    <style:style style:name="T8" style:family="text">
      <style:text-properties fo:color="#000000" loext:opacity="100%" style:font-name="Liberation Sans" fo:font-size="6pt" fo:font-weight="normal" style:font-name-asian="Liberation Sans" style:font-size-asian="6pt" style:font-weight-asian="normal" style:font-name-complex="Liberation Sans" style:font-size-complex="6pt" style:font-weight-complex="normal"/>
    </style:style>
    <style:style style:name="T9" style:family="text">
      <style:text-properties fo:color="#000000" loext:opacity="100%" style:font-name="Liberation Sans" fo:font-size="13pt" fo:font-weight="bold" style:font-name-asian="Liberation Sans" style:font-size-asian="13pt" style:font-weight-asian="bold" style:font-name-complex="Liberation Sans" style:font-size-complex="13pt" style:font-weight-complex="bold"/>
    </style:style>
    <style:style style:name="T10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11" style:family="text">
      <style:text-properties fo:color="#000000" loext:opacity="100%" style:font-name="Liberation Sans" fo:font-size="14pt" fo:font-style="italic" fo:font-weight="bold" style:font-name-asian="Liberation Sans" style:font-size-asian="14pt" style:font-style-asian="italic" style:font-weight-asian="bold" style:font-name-complex="Liberation Sans" style:font-size-complex="14pt" style:font-style-complex="italic" style:font-weight-complex="bold"/>
    </style:style>
    <style:style style:name="T12" style:family="text">
      <style:text-properties fo:color="#000000" loext:opacity="100%" style:font-name="Liberation Sans" fo:font-size="8.10000038146973pt" fo:font-weight="normal" style:font-name-asian="Liberation Sans" style:font-size-asian="8.10000038146973pt" style:font-weight-asian="normal" style:font-name-complex="Liberation Sans" style:font-size-complex="8.10000038146973pt" style:font-weight-complex="normal"/>
    </style:style>
    <style:style style:name="T13" style:family="text">
      <style:text-properties fo:color="#000000" loext:opacity="100%" style:font-name="Logix" fo:font-size="14.1000003814697pt" fo:font-weight="normal" style:font-name-asian="Logix" style:font-size-asian="14.1000003814697pt" style:font-weight-asian="normal" style:font-name-complex="Logix" style:font-size-complex="14.1000003814697pt" style:font-weight-complex="normal"/>
    </style:style>
    <style:style style:name="T14" style:family="text">
      <style:text-properties fo:color="#000000" loext:opacity="100%" style:font-name="Liberation Sans" fo:font-size="1pt" fo:font-weight="normal" style:font-name-asian="Liberation Sans" style:font-size-asian="1pt" style:font-weight-asian="normal" style:font-name-complex="Liberation Sans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704cm" svg:x="0cm" svg:y="0cm" svg:viewBox="0 0 21000 29705" draw:points="0,0 21000,0 21000,29705 0,29705">
          <text:p/>
        </draw:polygon>
        <draw:frame draw:style-name="gr2" draw:text-style-name="P2" draw:layer="layout" svg:width="2.166cm" svg:height="2.39cm" svg:x="2.667cm" svg:y="1.717cm">
          <draw:image xlink:href="Pictures/10000000000000ED00000103ADB5D3D0.png" xlink:type="simple" xlink:show="embed" xlink:actuate="onLoad" draw:mime-type="image/png">
            <text:p/>
          </draw:image>
        </draw:frame>
        <draw:frame draw:style-name="gr3" draw:text-style-name="P4" draw:layer="layout" svg:width="0.422cm" svg:height="0.475cm" svg:x="20.007cm" svg:y="1.016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348cm" svg:height="0.386cm" svg:x="4.835cm" svg:y="3.79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5.388cm" svg:height="0.386cm" svg:x="5.067cm" svg:y="1.873cm">
          <draw:text-box>
            <text:p text:style-name="P3"><text:span text:style-name="T2">УНИВЕРЗИТЕТ У НОВОМ САДУ </text:span></text:p>
          </draw:text-box>
        </draw:frame>
        <draw:frame draw:style-name="gr6" draw:text-style-name="P5" draw:layer="layout" svg:width="5.65cm" svg:height="0.386cm" svg:x="10.377cm" svg:y="1.873cm">
          <draw:text-box>
            <text:p text:style-name="P3"><text:span text:style-name="T2"><text:s/></text:span><text:span text:style-name="T3">ФАКУЛТЕТ ТЕХНИЧКИХ НАУКА <text:s/></text:span></text:p>
          </draw:text-box>
        </draw:frame>
        <draw:polygon draw:style-name="gr7" draw:text-style-name="P6" draw:layer="layout" svg:width="0.052cm" svg:height="0.056cm" svg:x="2.476cm" svg:y="1.591cm" svg:viewBox="0 0 53 57" draw:points="0,0 53,0 53,57 0,57">
          <text:p/>
        </draw:polygon>
        <draw:polygon draw:style-name="gr7" draw:text-style-name="P6" draw:layer="layout" svg:width="0.052cm" svg:height="0.052cm" svg:x="2.476cm" svg:y="1.591cm" svg:viewBox="0 0 53 53" draw:points="0,0 53,0 53,53 0,53">
          <text:p/>
        </draw:polygon>
        <draw:polygon draw:style-name="gr7" draw:text-style-name="P6" draw:layer="layout" svg:width="2.451cm" svg:height="0.052cm" svg:x="2.528cm" svg:y="1.591cm" svg:viewBox="0 0 2452 53" draw:points="0,0 2452,0 2452,53 0,53">
          <text:p/>
        </draw:polygon>
        <draw:polygon draw:style-name="gr7" draw:text-style-name="P6" draw:layer="layout" svg:width="0.052cm" svg:height="0.005cm" svg:x="4.978cm" svg:y="1.642cm" svg:viewBox="0 0 53 6" draw:points="0,0 53,0 53,6 0,6">
          <text:p/>
        </draw:polygon>
        <draw:polygon draw:style-name="gr7" draw:text-style-name="P6" draw:layer="layout" svg:width="0.052cm" svg:height="0.052cm" svg:x="4.978cm" svg:y="1.591cm" svg:viewBox="0 0 53 53" draw:points="0,0 53,0 53,53 0,53">
          <text:p/>
        </draw:polygon>
        <draw:polygon draw:style-name="gr7" draw:text-style-name="P6" draw:layer="layout" svg:width="10.956cm" svg:height="0.052cm" svg:x="5.028cm" svg:y="1.591cm" svg:viewBox="0 0 10957 53" draw:points="0,0 10957,0 10957,53 0,53">
          <text:p/>
        </draw:polygon>
        <draw:polygon draw:style-name="gr7" draw:text-style-name="P6" draw:layer="layout" svg:width="0.052cm" svg:height="0.005cm" svg:x="15.984cm" svg:y="1.642cm" svg:viewBox="0 0 53 6" draw:points="0,0 53,0 53,6 0,6">
          <text:p/>
        </draw:polygon>
        <draw:polygon draw:style-name="gr7" draw:text-style-name="P6" draw:layer="layout" svg:width="0.052cm" svg:height="0.052cm" svg:x="15.984cm" svg:y="1.591cm" svg:viewBox="0 0 53 53" draw:points="0,0 53,0 53,53 0,53">
          <text:p/>
        </draw:polygon>
        <draw:polygon draw:style-name="gr7" draw:text-style-name="P6" draw:layer="layout" svg:width="3.951cm" svg:height="0.052cm" svg:x="16.034cm" svg:y="1.591cm" svg:viewBox="0 0 3952 53" draw:points="0,0 3952,0 3952,53 0,53">
          <text:p/>
        </draw:polygon>
        <draw:polygon draw:style-name="gr7" draw:text-style-name="P6" draw:layer="layout" svg:width="0.053cm" svg:height="0.056cm" svg:x="19.984cm" svg:y="1.591cm" svg:viewBox="0 0 54 57" draw:points="0,0 54,0 54,57 0,57">
          <text:p/>
        </draw:polygon>
        <draw:polygon draw:style-name="gr7" draw:text-style-name="P6" draw:layer="layout" svg:width="0.053cm" svg:height="0.052cm" svg:x="19.984cm" svg:y="1.591cm" svg:viewBox="0 0 54 53" draw:points="0,0 54,0 54,53 0,53">
          <text:p/>
        </draw:polygon>
        <draw:polygon draw:style-name="gr7" draw:text-style-name="P6" draw:layer="layout" svg:width="0.052cm" svg:height="0.607cm" svg:x="2.476cm" svg:y="1.646cm" svg:viewBox="0 0 53 608" draw:points="0,0 53,0 53,608 0,608">
          <text:p/>
        </draw:polygon>
        <draw:polygon draw:style-name="gr7" draw:text-style-name="P6" draw:layer="layout" svg:width="0.052cm" svg:height="0.607cm" svg:x="4.978cm" svg:y="1.646cm" svg:viewBox="0 0 53 608" draw:points="0,0 53,0 53,608 0,608">
          <text:p/>
        </draw:polygon>
        <draw:polygon draw:style-name="gr7" draw:text-style-name="P6" draw:layer="layout" svg:width="0.052cm" svg:height="0.607cm" svg:x="15.984cm" svg:y="1.646cm" svg:viewBox="0 0 53 608" draw:points="0,0 53,0 53,608 0,608">
          <text:p/>
        </draw:polygon>
        <draw:polygon draw:style-name="gr7" draw:text-style-name="P6" draw:layer="layout" svg:width="0.053cm" svg:height="0.607cm" svg:x="19.984cm" svg:y="1.646cm" svg:viewBox="0 0 54 608" draw:points="0,0 54,0 54,608 0,608">
          <text:p/>
        </draw:polygon>
        <draw:frame draw:style-name="gr8" draw:text-style-name="P5" draw:layer="layout" svg:width="8.098cm" svg:height="0.386cm" svg:x="5.75cm" svg:y="2.313cm">
          <draw:text-box>
            <text:p text:style-name="P3"><text:span text:style-name="T2">21000 НОВИ СА Д, Трг Д оситеја Обрадов и ћа 6 <text:s/></text:span></text:p>
          </draw:text-box>
        </draw:frame>
        <draw:polygon draw:style-name="gr7" draw:text-style-name="P6" draw:layer="layout" svg:width="0.052cm" svg:height="0.019cm" svg:x="2.476cm" svg:y="2.252cm" svg:viewBox="0 0 53 20" draw:points="0,0 53,0 53,20 0,20">
          <text:p/>
        </draw:polygon>
        <draw:polygon draw:style-name="gr7" draw:text-style-name="P6" draw:layer="layout" svg:width="0.052cm" svg:height="0.019cm" svg:x="4.978cm" svg:y="2.252cm" svg:viewBox="0 0 53 20" draw:points="0,0 53,0 53,20 0,20">
          <text:p/>
        </draw:polygon>
        <draw:polygon draw:style-name="gr7" draw:text-style-name="P6" draw:layer="layout" svg:width="0.052cm" svg:height="0.019cm" svg:x="15.984cm" svg:y="2.252cm" svg:viewBox="0 0 53 20" draw:points="0,0 53,0 53,20 0,20">
          <text:p/>
        </draw:polygon>
        <draw:polygon draw:style-name="gr7" draw:text-style-name="P6" draw:layer="layout" svg:width="3.951cm" svg:height="0.019cm" svg:x="16.034cm" svg:y="2.252cm" svg:viewBox="0 0 3952 20" draw:points="0,0 3952,0 3952,20 0,20">
          <text:p/>
        </draw:polygon>
        <draw:polygon draw:style-name="gr7" draw:text-style-name="P6" draw:layer="layout" svg:width="0.053cm" svg:height="0.019cm" svg:x="19.984cm" svg:y="2.252cm" svg:viewBox="0 0 54 20" draw:points="0,0 54,0 54,20 0,20">
          <text:p/>
        </draw:polygon>
        <draw:polygon draw:style-name="gr7" draw:text-style-name="P6" draw:layer="layout" svg:width="0.052cm" svg:height="0.61cm" svg:x="2.476cm" svg:y="2.269cm" svg:viewBox="0 0 53 611" draw:points="0,0 53,0 53,611 0,611">
          <text:p/>
        </draw:polygon>
        <draw:polygon draw:style-name="gr7" draw:text-style-name="P6" draw:layer="layout" svg:width="0.052cm" svg:height="0.61cm" svg:x="4.978cm" svg:y="2.269cm" svg:viewBox="0 0 53 611" draw:points="0,0 53,0 53,611 0,611">
          <text:p/>
        </draw:polygon>
        <draw:polygon draw:style-name="gr7" draw:text-style-name="P6" draw:layer="layout" svg:width="0.052cm" svg:height="0.61cm" svg:x="15.984cm" svg:y="2.269cm" svg:viewBox="0 0 53 611" draw:points="0,0 53,0 53,611 0,611">
          <text:p/>
        </draw:polygon>
        <draw:polygon draw:style-name="gr7" draw:text-style-name="P6" draw:layer="layout" svg:width="0.053cm" svg:height="0.61cm" svg:x="19.984cm" svg:y="2.269cm" svg:viewBox="0 0 54 611" draw:points="0,0 54,0 54,611 0,611">
          <text:p/>
        </draw:polygon>
        <draw:polygon draw:style-name="gr9" draw:text-style-name="P7" draw:layer="layout" svg:width="10.951cm" svg:height="1.255cm" svg:x="5.028cm" svg:y="2.933cm" svg:viewBox="0 0 10952 1256" draw:points="0,0 10952,0 10952,1256 0,1256">
          <text:p/>
        </draw:polygon>
        <draw:polygon draw:style-name="gr9" draw:text-style-name="P7" draw:layer="layout" svg:width="10.951cm" svg:height="0.568cm" svg:x="5.028cm" svg:y="3.277cm" svg:viewBox="0 0 10952 569" draw:points="0,0 10952,0 10952,569 0,569">
          <text:p/>
        </draw:polygon>
        <draw:frame draw:style-name="gr10" draw:text-style-name="P5" draw:layer="layout" svg:width="0.886cm" svg:height="0.386cm" svg:x="16.255cm" svg:y="1.767cm">
          <draw:text-box>
            <text:p text:style-name="P3"><text:span text:style-name="T2">Број: </text:span></text:p>
          </draw:text-box>
        </draw:frame>
        <draw:frame draw:style-name="gr11" draw:text-style-name="P5" draw:layer="layout" svg:width="2.067cm" svg:height="0.386cm" svg:x="16.255cm" svg:y="2.389cm">
          <draw:text-box>
            <text:p text:style-name="P3"><text:span text:style-name="T2">Е2 119/2023 </text:span></text:p>
          </draw:text-box>
        </draw:frame>
        <draw:polygon draw:style-name="gr7" draw:text-style-name="P6" draw:layer="layout" svg:width="0.052cm" svg:height="0.056cm" svg:x="2.476cm" svg:y="2.878cm" svg:viewBox="0 0 53 57" draw:points="0,0 53,0 53,57 0,57">
          <text:p/>
        </draw:polygon>
        <draw:polygon draw:style-name="gr7" draw:text-style-name="P6" draw:layer="layout" svg:width="0.052cm" svg:height="0.056cm" svg:x="4.978cm" svg:y="2.878cm" svg:viewBox="0 0 53 57" draw:points="0,0 53,0 53,57 0,57">
          <text:p/>
        </draw:polygon>
        <draw:polygon draw:style-name="gr7" draw:text-style-name="P6" draw:layer="layout" svg:width="10.956cm" svg:height="0.052cm" svg:x="5.028cm" svg:y="2.878cm" svg:viewBox="0 0 10957 53" draw:points="0,0 10957,0 10957,53 0,53">
          <text:p/>
        </draw:polygon>
        <draw:polygon draw:style-name="gr9" draw:text-style-name="P7" draw:layer="layout" svg:width="10.956cm" svg:height="0.005cm" svg:x="5.028cm" svg:y="2.929cm" svg:viewBox="0 0 10957 6" draw:points="0,0 10957,0 10957,6 0,6">
          <text:p/>
        </draw:polygon>
        <draw:polygon draw:style-name="gr7" draw:text-style-name="P6" draw:layer="layout" svg:width="0.052cm" svg:height="0.056cm" svg:x="15.984cm" svg:y="2.878cm" svg:viewBox="0 0 53 57" draw:points="0,0 53,0 53,57 0,57">
          <text:p/>
        </draw:polygon>
        <draw:polygon draw:style-name="gr7" draw:text-style-name="P6" draw:layer="layout" svg:width="3.951cm" svg:height="0.052cm" svg:x="16.034cm" svg:y="2.878cm" svg:viewBox="0 0 3952 53" draw:points="0,0 3952,0 3952,53 0,53">
          <text:p/>
        </draw:polygon>
        <draw:polygon draw:style-name="gr7" draw:text-style-name="P6" draw:layer="layout" svg:width="0.053cm" svg:height="0.056cm" svg:x="19.984cm" svg:y="2.878cm" svg:viewBox="0 0 54 57" draw:points="0,0 54,0 54,57 0,57">
          <text:p/>
        </draw:polygon>
        <draw:polygon draw:style-name="gr7" draw:text-style-name="P6" draw:layer="layout" svg:width="0.052cm" svg:height="0.612cm" svg:x="2.476cm" svg:y="2.933cm" svg:viewBox="0 0 53 613" draw:points="0,0 53,0 53,613 0,613">
          <text:p/>
        </draw:polygon>
        <draw:polygon draw:style-name="gr7" draw:text-style-name="P6" draw:layer="layout" svg:width="0.052cm" svg:height="0.612cm" svg:x="4.978cm" svg:y="2.933cm" svg:viewBox="0 0 53 613" draw:points="0,0 53,0 53,613 0,613">
          <text:p/>
        </draw:polygon>
        <draw:polygon draw:style-name="gr7" draw:text-style-name="P6" draw:layer="layout" svg:width="0.052cm" svg:height="0.612cm" svg:x="15.984cm" svg:y="2.933cm" svg:viewBox="0 0 53 613" draw:points="0,0 53,0 53,613 0,613">
          <text:p/>
        </draw:polygon>
        <draw:polygon draw:style-name="gr7" draw:text-style-name="P6" draw:layer="layout" svg:width="0.053cm" svg:height="0.612cm" svg:x="19.984cm" svg:y="2.933cm" svg:viewBox="0 0 54 613" draw:points="0,0 54,0 54,613 0,613">
          <text:p/>
        </draw:polygon>
        <draw:frame draw:style-name="gr12" draw:text-style-name="P8" draw:layer="layout" svg:width="6.694cm" svg:height="0.556cm" svg:x="7.355cm" svg:y="3.289cm">
          <draw:text-box>
            <text:p text:style-name="P3"><text:span text:style-name="T4">ЗАДАТАК ЗА МАСТЕР РАД </text:span></text:p>
          </draw:text-box>
        </draw:frame>
        <draw:polygon draw:style-name="gr7" draw:text-style-name="P6" draw:layer="layout" svg:width="0.052cm" svg:height="0.034cm" svg:x="2.476cm" svg:y="3.544cm" svg:viewBox="0 0 53 35" draw:points="0,0 53,0 53,35 0,35">
          <text:p/>
        </draw:polygon>
        <draw:polygon draw:style-name="gr7" draw:text-style-name="P6" draw:layer="layout" svg:width="0.052cm" svg:height="0.034cm" svg:x="4.978cm" svg:y="3.544cm" svg:viewBox="0 0 53 35" draw:points="0,0 53,0 53,35 0,35">
          <text:p/>
        </draw:polygon>
        <draw:polygon draw:style-name="gr7" draw:text-style-name="P6" draw:layer="layout" svg:width="0.052cm" svg:height="0.034cm" svg:x="15.984cm" svg:y="3.544cm" svg:viewBox="0 0 53 35" draw:points="0,0 53,0 53,35 0,35">
          <text:p/>
        </draw:polygon>
        <draw:polygon draw:style-name="gr7" draw:text-style-name="P6" draw:layer="layout" svg:width="3.951cm" svg:height="0.034cm" svg:x="16.034cm" svg:y="3.544cm" svg:viewBox="0 0 3952 35" draw:points="0,0 3952,0 3952,35 0,35">
          <text:p/>
        </draw:polygon>
        <draw:polygon draw:style-name="gr7" draw:text-style-name="P6" draw:layer="layout" svg:width="0.053cm" svg:height="0.034cm" svg:x="19.984cm" svg:y="3.544cm" svg:viewBox="0 0 54 35" draw:points="0,0 54,0 54,35 0,35">
          <text:p/>
        </draw:polygon>
        <draw:polygon draw:style-name="gr7" draw:text-style-name="P6" draw:layer="layout" svg:width="0.052cm" svg:height="0.611cm" svg:x="2.476cm" svg:y="3.577cm" svg:viewBox="0 0 53 612" draw:points="0,0 53,0 53,612 0,612">
          <text:p/>
        </draw:polygon>
        <draw:polygon draw:style-name="gr7" draw:text-style-name="P6" draw:layer="layout" svg:width="0.052cm" svg:height="0.052cm" svg:x="2.476cm" svg:y="4.187cm" svg:viewBox="0 0 53 53" draw:points="0,0 53,0 53,53 0,53">
          <text:p/>
        </draw:polygon>
        <draw:polygon draw:style-name="gr7" draw:text-style-name="P6" draw:layer="layout" svg:width="0.052cm" svg:height="0.052cm" svg:x="2.476cm" svg:y="4.187cm" svg:viewBox="0 0 53 53" draw:points="0,0 53,0 53,53 0,53">
          <text:p/>
        </draw:polygon>
        <draw:polygon draw:style-name="gr7" draw:text-style-name="P6" draw:layer="layout" svg:width="2.451cm" svg:height="0.052cm" svg:x="2.528cm" svg:y="4.187cm" svg:viewBox="0 0 2452 53" draw:points="0,0 2452,0 2452,53 0,53">
          <text:p/>
        </draw:polygon>
        <draw:polygon draw:style-name="gr7" draw:text-style-name="P6" draw:layer="layout" svg:width="0.052cm" svg:height="0.611cm" svg:x="4.978cm" svg:y="3.577cm" svg:viewBox="0 0 53 612" draw:points="0,0 53,0 53,612 0,612">
          <text:p/>
        </draw:polygon>
        <draw:polygon draw:style-name="gr7" draw:text-style-name="P6" draw:layer="layout" svg:width="0.052cm" svg:height="0.052cm" svg:x="4.978cm" svg:y="4.187cm" svg:viewBox="0 0 53 53" draw:points="0,0 53,0 53,53 0,53">
          <text:p/>
        </draw:polygon>
        <draw:polygon draw:style-name="gr7" draw:text-style-name="P6" draw:layer="layout" svg:width="10.956cm" svg:height="0.052cm" svg:x="5.028cm" svg:y="4.187cm" svg:viewBox="0 0 10957 53" draw:points="0,0 10957,0 10957,53 0,53">
          <text:p/>
        </draw:polygon>
        <draw:polygon draw:style-name="gr7" draw:text-style-name="P6" draw:layer="layout" svg:width="0.052cm" svg:height="0.611cm" svg:x="15.984cm" svg:y="3.577cm" svg:viewBox="0 0 53 612" draw:points="0,0 53,0 53,612 0,612">
          <text:p/>
        </draw:polygon>
        <draw:polygon draw:style-name="gr7" draw:text-style-name="P6" draw:layer="layout" svg:width="0.052cm" svg:height="0.052cm" svg:x="15.984cm" svg:y="4.187cm" svg:viewBox="0 0 53 53" draw:points="0,0 53,0 53,53 0,53">
          <text:p/>
        </draw:polygon>
        <draw:polygon draw:style-name="gr7" draw:text-style-name="P6" draw:layer="layout" svg:width="3.951cm" svg:height="0.052cm" svg:x="16.034cm" svg:y="4.187cm" svg:viewBox="0 0 3952 53" draw:points="0,0 3952,0 3952,53 0,53">
          <text:p/>
        </draw:polygon>
        <draw:polygon draw:style-name="gr7" draw:text-style-name="P6" draw:layer="layout" svg:width="0.053cm" svg:height="0.611cm" svg:x="19.984cm" svg:y="3.577cm" svg:viewBox="0 0 54 612" draw:points="0,0 54,0 54,612 0,612">
          <text:p/>
        </draw:polygon>
        <draw:polygon draw:style-name="gr7" draw:text-style-name="P6" draw:layer="layout" svg:width="0.053cm" svg:height="0.052cm" svg:x="19.984cm" svg:y="4.187cm" svg:viewBox="0 0 54 53" draw:points="0,0 54,0 54,53 0,53">
          <text:p/>
        </draw:polygon>
        <draw:polygon draw:style-name="gr7" draw:text-style-name="P6" draw:layer="layout" svg:width="0.053cm" svg:height="0.052cm" svg:x="19.984cm" svg:y="4.187cm" svg:viewBox="0 0 54 53" draw:points="0,0 54,0 54,53 0,53">
          <text:p/>
        </draw:polygon>
        <draw:frame draw:style-name="gr13" draw:text-style-name="P5" draw:layer="layout" svg:width="1.194cm" svg:height="0.386cm" svg:x="16.255cm" svg:y="3.054cm">
          <draw:text-box>
            <text:p text:style-name="P3"><text:span text:style-name="T2">Датум: </text:span></text:p>
          </draw:text-box>
        </draw:frame>
        <draw:frame draw:style-name="gr4" draw:text-style-name="P5" draw:layer="layout" svg:width="0.348cm" svg:height="0.386cm" svg:x="16.255cm" svg:y="3.698cm">
          <draw:text-box>
            <text:p text:style-name="P3"><text:span text:style-name="T2"><text:s/></text:span></text:p>
          </draw:text-box>
        </draw:frame>
        <draw:frame draw:style-name="gr14" draw:text-style-name="P9" draw:layer="layout" svg:width="0.137cm" svg:height="0.158cm" svg:x="2.503cm" svg:y="4.245cm">
          <draw:text-box>
            <text:p text:style-name="P3"><text:span text:style-name="T5"><text:s/></text:span></text:p>
          </draw:text-box>
        </draw:frame>
        <draw:frame draw:style-name="gr15" draw:text-style-name="P5" draw:layer="layout" svg:width="8.267cm" svg:height="0.386cm" svg:x="11.72cm" svg:y="4.629cm">
          <draw:text-box>
            <text:p text:style-name="P3"><text:span text:style-name="T6">(Податке уноси предметни наставник - ментор) </text:span></text:p>
          </draw:text-box>
        </draw:frame>
        <draw:frame draw:style-name="gr16" draw:text-style-name="P10" draw:layer="layout" svg:width="2.821cm" svg:height="0.513cm" svg:x="2.693cm" svg:y="5.404cm">
          <draw:text-box>
            <text:p text:style-name="P3"><text:span text:style-name="T7">СТУДИЈСКИ </text:span></text:p>
          </draw:text-box>
        </draw:frame>
        <draw:polygon draw:style-name="gr7" draw:text-style-name="P6" draw:layer="layout" svg:width="0.052cm" svg:height="0.056cm" svg:x="2.476cm" svg:y="5.123cm" svg:viewBox="0 0 53 57" draw:points="0,0 53,0 53,57 0,57">
          <text:p/>
        </draw:polygon>
        <draw:polygon draw:style-name="gr7" draw:text-style-name="P6" draw:layer="layout" svg:width="0.052cm" svg:height="0.051cm" svg:x="2.476cm" svg:y="5.123cm" svg:viewBox="0 0 53 52" draw:points="0,0 53,0 53,52 0,52">
          <text:p/>
        </draw:polygon>
        <draw:polygon draw:style-name="gr7" draw:text-style-name="P6" draw:layer="layout" svg:width="3.718cm" svg:height="0.051cm" svg:x="2.528cm" svg:y="5.123cm" svg:viewBox="0 0 3719 52" draw:points="0,0 3719,0 3719,52 0,52">
          <text:p/>
        </draw:polygon>
        <draw:polygon draw:style-name="gr7" draw:text-style-name="P6" draw:layer="layout" svg:width="0.019cm" svg:height="0.007cm" svg:x="6.243cm" svg:y="5.173cm" svg:viewBox="0 0 20 8" draw:points="0,0 20,0 20,8 0,8">
          <text:p/>
        </draw:polygon>
        <draw:polygon draw:style-name="gr7" draw:text-style-name="P6" draw:layer="layout" svg:width="0.052cm" svg:height="0.051cm" svg:x="6.243cm" svg:y="5.123cm" svg:viewBox="0 0 53 52" draw:points="0,0 53,0 53,52 0,52">
          <text:p/>
        </draw:polygon>
        <draw:polygon draw:style-name="gr7" draw:text-style-name="P6" draw:layer="layout" svg:width="13.69cm" svg:height="0.051cm" svg:x="6.295cm" svg:y="5.123cm" svg:viewBox="0 0 13691 52" draw:points="0,0 13691,0 13691,52 0,52">
          <text:p/>
        </draw:polygon>
        <draw:polygon draw:style-name="gr7" draw:text-style-name="P6" draw:layer="layout" svg:width="0.053cm" svg:height="0.056cm" svg:x="19.984cm" svg:y="5.123cm" svg:viewBox="0 0 54 57" draw:points="0,0 54,0 54,57 0,57">
          <text:p/>
        </draw:polygon>
        <draw:polygon draw:style-name="gr7" draw:text-style-name="P6" draw:layer="layout" svg:width="0.053cm" svg:height="0.051cm" svg:x="19.984cm" svg:y="5.123cm" svg:viewBox="0 0 54 52" draw:points="0,0 54,0 54,52 0,52">
          <text:p/>
        </draw:polygon>
        <draw:polygon draw:style-name="gr7" draw:text-style-name="P6" draw:layer="layout" svg:width="0.052cm" svg:height="1.266cm" svg:x="2.476cm" svg:y="5.178cm" svg:viewBox="0 0 53 1267" draw:points="0,0 53,0 53,1267 0,1267">
          <text:p/>
        </draw:polygon>
        <draw:polygon draw:style-name="gr7" draw:text-style-name="P6" draw:layer="layout" svg:width="0.019cm" svg:height="1.266cm" svg:x="6.243cm" svg:y="5.178cm" svg:viewBox="0 0 20 1267" draw:points="0,0 20,0 20,1267 0,1267">
          <text:p/>
        </draw:polygon>
        <draw:polygon draw:style-name="gr7" draw:text-style-name="P6" draw:layer="layout" svg:width="0.053cm" svg:height="1.266cm" svg:x="19.984cm" svg:y="5.178cm" svg:viewBox="0 0 54 1267" draw:points="0,0 54,0 54,1267 0,1267">
          <text:p/>
        </draw:polygon>
        <draw:frame draw:style-name="gr17" draw:text-style-name="P10" draw:layer="layout" svg:width="2.484cm" svg:height="0.513cm" svg:x="2.693cm" svg:y="5.933cm">
          <draw:text-box>
            <text:p text:style-name="P3"><text:span text:style-name="T7">ПРОГРАМ: </text:span></text:p>
          </draw:text-box>
        </draw:frame>
        <draw:frame draw:style-name="gr18" draw:text-style-name="P10" draw:layer="layout" svg:width="5.795cm" svg:height="0.513cm" svg:x="6.444cm" svg:y="5.404cm">
          <draw:text-box>
            <text:p text:style-name="P3"><text:span text:style-name="T7">Рачунарство и аутоматика </text:span></text:p>
          </draw:text-box>
        </draw:frame>
        <draw:frame draw:style-name="gr19" draw:text-style-name="P10" draw:layer="layout" svg:width="3.588cm" svg:height="0.513cm" svg:x="2.693cm" svg:y="6.69cm">
          <draw:text-box>
            <text:p text:style-name="P3"><text:span text:style-name="T7">РУКОВОДИЛАЦ </text:span></text:p>
          </draw:text-box>
        </draw:frame>
        <draw:frame draw:style-name="gr20" draw:text-style-name="P10" draw:layer="layout" svg:width="3.095cm" svg:height="0.513cm" svg:x="2.693cm" svg:y="7.215cm">
          <draw:text-box>
            <text:p text:style-name="P3"><text:span text:style-name="T7">СТУДИЈСКОГ </text:span></text:p>
          </draw:text-box>
        </draw:frame>
        <draw:polygon draw:style-name="gr7" draw:text-style-name="P6" draw:layer="layout" svg:width="0.052cm" svg:height="0.018cm" svg:x="2.476cm" svg:y="6.443cm" svg:viewBox="0 0 53 19" draw:points="0,0 53,0 53,19 0,19">
          <text:p/>
        </draw:polygon>
        <draw:polygon draw:style-name="gr7" draw:text-style-name="P6" draw:layer="layout" svg:width="3.718cm" svg:height="0.018cm" svg:x="2.528cm" svg:y="6.443cm" svg:viewBox="0 0 3719 19" draw:points="0,0 3719,0 3719,19 0,19">
          <text:p/>
        </draw:polygon>
        <draw:polygon draw:style-name="gr7" draw:text-style-name="P6" draw:layer="layout" svg:width="0.019cm" svg:height="0.018cm" svg:x="6.243cm" svg:y="6.443cm" svg:viewBox="0 0 20 19" draw:points="0,0 20,0 20,19 0,19">
          <text:p/>
        </draw:polygon>
        <draw:polygon draw:style-name="gr7" draw:text-style-name="P6" draw:layer="layout" svg:width="13.725cm" svg:height="0.018cm" svg:x="6.26cm" svg:y="6.443cm" svg:viewBox="0 0 13726 19" draw:points="0,0 13726,0 13726,19 0,19">
          <text:p/>
        </draw:polygon>
        <draw:polygon draw:style-name="gr7" draw:text-style-name="P6" draw:layer="layout" svg:width="0.053cm" svg:height="0.018cm" svg:x="19.984cm" svg:y="6.443cm" svg:viewBox="0 0 54 19" draw:points="0,0 54,0 54,19 0,19">
          <text:p/>
        </draw:polygon>
        <draw:polygon draw:style-name="gr7" draw:text-style-name="P6" draw:layer="layout" svg:width="0.052cm" svg:height="2.021cm" svg:x="2.476cm" svg:y="6.46cm" svg:viewBox="0 0 53 2022" draw:points="0,0 53,0 53,2022 0,2022">
          <text:p/>
        </draw:polygon>
        <draw:polygon draw:style-name="gr7" draw:text-style-name="P6" draw:layer="layout" svg:width="0.052cm" svg:height="0.051cm" svg:x="2.476cm" svg:y="8.48cm" svg:viewBox="0 0 53 52" draw:points="0,0 53,0 53,52 0,52">
          <text:p/>
        </draw:polygon>
        <draw:polygon draw:style-name="gr7" draw:text-style-name="P6" draw:layer="layout" svg:width="0.052cm" svg:height="0.051cm" svg:x="2.476cm" svg:y="8.48cm" svg:viewBox="0 0 53 52" draw:points="0,0 53,0 53,52 0,52">
          <text:p/>
        </draw:polygon>
        <draw:polygon draw:style-name="gr7" draw:text-style-name="P6" draw:layer="layout" svg:width="3.718cm" svg:height="0.051cm" svg:x="2.528cm" svg:y="8.48cm" svg:viewBox="0 0 3719 52" draw:points="0,0 3719,0 3719,52 0,52">
          <text:p/>
        </draw:polygon>
        <draw:polygon draw:style-name="gr7" draw:text-style-name="P6" draw:layer="layout" svg:width="0.019cm" svg:height="2.021cm" svg:x="6.243cm" svg:y="6.46cm" svg:viewBox="0 0 20 2022" draw:points="0,0 20,0 20,2022 0,2022">
          <text:p/>
        </draw:polygon>
        <draw:polygon draw:style-name="gr7" draw:text-style-name="P6" draw:layer="layout" svg:width="0.052cm" svg:height="0.051cm" svg:x="6.243cm" svg:y="8.48cm" svg:viewBox="0 0 53 52" draw:points="0,0 53,0 53,52 0,52">
          <text:p/>
        </draw:polygon>
        <draw:polygon draw:style-name="gr7" draw:text-style-name="P6" draw:layer="layout" svg:width="13.69cm" svg:height="0.051cm" svg:x="6.295cm" svg:y="8.48cm" svg:viewBox="0 0 13691 52" draw:points="0,0 13691,0 13691,52 0,52">
          <text:p/>
        </draw:polygon>
        <draw:polygon draw:style-name="gr7" draw:text-style-name="P6" draw:layer="layout" svg:width="0.053cm" svg:height="2.021cm" svg:x="19.984cm" svg:y="6.46cm" svg:viewBox="0 0 54 2022" draw:points="0,0 54,0 54,2022 0,2022">
          <text:p/>
        </draw:polygon>
        <draw:polygon draw:style-name="gr7" draw:text-style-name="P6" draw:layer="layout" svg:width="0.053cm" svg:height="0.051cm" svg:x="19.984cm" svg:y="8.48cm" svg:viewBox="0 0 54 52" draw:points="0,0 54,0 54,52 0,52">
          <text:p/>
        </draw:polygon>
        <draw:polygon draw:style-name="gr7" draw:text-style-name="P6" draw:layer="layout" svg:width="0.053cm" svg:height="0.051cm" svg:x="19.984cm" svg:y="8.48cm" svg:viewBox="0 0 54 52" draw:points="0,0 54,0 54,52 0,52">
          <text:p/>
        </draw:polygon>
        <draw:frame draw:style-name="gr21" draw:text-style-name="P10" draw:layer="layout" svg:width="2.789cm" svg:height="0.513cm" svg:x="2.693cm" svg:y="7.745cm">
          <draw:text-box>
            <text:p text:style-name="P3"><text:span text:style-name="T7">ПРОГРАМА: </text:span></text:p>
          </draw:text-box>
        </draw:frame>
        <draw:frame draw:style-name="gr22" draw:text-style-name="P10" draw:layer="layout" svg:width="6.115cm" svg:height="0.513cm" svg:x="6.444cm" svg:y="6.69cm">
          <draw:text-box>
            <text:p text:style-name="P3"><text:span text:style-name="T7">проф. др. Милан Видаковић </text:span></text:p>
          </draw:text-box>
        </draw:frame>
        <draw:frame draw:style-name="gr23" draw:text-style-name="P11" draw:layer="layout" svg:width="0.211cm" svg:height="0.239cm" svg:x="2.503cm" svg:y="8.542cm">
          <draw:text-box>
            <text:p text:style-name="P3"><text:span text:style-name="T8"><text:s/></text:span></text:p>
          </draw:text-box>
        </draw:frame>
        <draw:frame draw:style-name="gr24" draw:text-style-name="P5" draw:layer="layout" svg:width="1.524cm" svg:height="0.386cm" svg:x="2.693cm" svg:y="8.969cm">
          <draw:text-box>
            <text:p text:style-name="P3"><text:span text:style-name="T2">Студент: </text:span></text:p>
          </draw:text-box>
        </draw:frame>
        <draw:frame draw:style-name="gr25" draw:text-style-name="P5" draw:layer="layout" svg:width="3.854cm" svg:height="0.386cm" svg:x="5.707cm" svg:y="8.969cm">
          <draw:text-box>
            <text:p text:style-name="P3"><text:span text:style-name="T2">Александар Стојановић</text:span></text:p>
          </draw:text-box>
        </draw:frame>
        <draw:polygon draw:style-name="gr7" draw:text-style-name="P6" draw:layer="layout" svg:width="0.052cm" svg:height="0.056cm" svg:x="2.476cm" svg:y="8.78cm" svg:viewBox="0 0 53 57" draw:points="0,0 53,0 53,57 0,57">
          <text:p/>
        </draw:polygon>
        <draw:polygon draw:style-name="gr7" draw:text-style-name="P6" draw:layer="layout" svg:width="0.052cm" svg:height="0.052cm" svg:x="2.476cm" svg:y="8.78cm" svg:viewBox="0 0 53 53" draw:points="0,0 53,0 53,53 0,53">
          <text:p/>
        </draw:polygon>
        <draw:polygon draw:style-name="gr7" draw:text-style-name="P6" draw:layer="layout" svg:width="2.984cm" svg:height="0.052cm" svg:x="2.528cm" svg:y="8.78cm" svg:viewBox="0 0 2985 53" draw:points="0,0 2985,0 2985,53 0,53">
          <text:p/>
        </draw:polygon>
        <draw:polygon draw:style-name="gr7" draw:text-style-name="P6" draw:layer="layout" svg:width="0.018cm" svg:height="0.005cm" svg:x="5.512cm" svg:y="8.831cm" svg:viewBox="0 0 19 6" draw:points="0,0 19,0 19,6 0,6">
          <text:p/>
        </draw:polygon>
        <draw:polygon draw:style-name="gr7" draw:text-style-name="P6" draw:layer="layout" svg:width="0.052cm" svg:height="0.052cm" svg:x="5.512cm" svg:y="8.78cm" svg:viewBox="0 0 53 53" draw:points="0,0 53,0 53,53 0,53">
          <text:p/>
        </draw:polygon>
        <draw:polygon draw:style-name="gr7" draw:text-style-name="P6" draw:layer="layout" svg:width="7.686cm" svg:height="0.052cm" svg:x="5.562cm" svg:y="8.78cm" svg:viewBox="0 0 7687 53" draw:points="0,0 7687,0 7687,53 0,53">
          <text:p/>
        </draw:polygon>
        <draw:polygon draw:style-name="gr7" draw:text-style-name="P6" draw:layer="layout" svg:width="0.017cm" svg:height="0.005cm" svg:x="13.248cm" svg:y="8.831cm" svg:viewBox="0 0 18 6" draw:points="0,0 18,0 18,6 0,6">
          <text:p/>
        </draw:polygon>
        <draw:polygon draw:style-name="gr7" draw:text-style-name="P6" draw:layer="layout" svg:width="0.052cm" svg:height="0.052cm" svg:x="13.248cm" svg:y="8.78cm" svg:viewBox="0 0 53 53" draw:points="0,0 53,0 53,53 0,53">
          <text:p/>
        </draw:polygon>
        <draw:polygon draw:style-name="gr7" draw:text-style-name="P6" draw:layer="layout" svg:width="2.702cm" svg:height="0.052cm" svg:x="13.299cm" svg:y="8.78cm" svg:viewBox="0 0 2703 53" draw:points="0,0 2703,0 2703,53 0,53">
          <text:p/>
        </draw:polygon>
        <draw:polygon draw:style-name="gr7" draw:text-style-name="P6" draw:layer="layout" svg:width="0.018cm" svg:height="0.005cm" svg:x="16.001cm" svg:y="8.831cm" svg:viewBox="0 0 19 6" draw:points="0,0 19,0 19,6 0,6">
          <text:p/>
        </draw:polygon>
        <draw:polygon draw:style-name="gr7" draw:text-style-name="P6" draw:layer="layout" svg:width="0.052cm" svg:height="0.052cm" svg:x="16.001cm" svg:y="8.78cm" svg:viewBox="0 0 53 53" draw:points="0,0 53,0 53,53 0,53">
          <text:p/>
        </draw:polygon>
        <draw:polygon draw:style-name="gr7" draw:text-style-name="P6" draw:layer="layout" svg:width="3.934cm" svg:height="0.052cm" svg:x="16.051cm" svg:y="8.78cm" svg:viewBox="0 0 3935 53" draw:points="0,0 3935,0 3935,53 0,53">
          <text:p/>
        </draw:polygon>
        <draw:polygon draw:style-name="gr7" draw:text-style-name="P6" draw:layer="layout" svg:width="0.053cm" svg:height="0.056cm" svg:x="19.984cm" svg:y="8.78cm" svg:viewBox="0 0 54 57" draw:points="0,0 54,0 54,57 0,57">
          <text:p/>
        </draw:polygon>
        <draw:polygon draw:style-name="gr7" draw:text-style-name="P6" draw:layer="layout" svg:width="0.053cm" svg:height="0.052cm" svg:x="19.984cm" svg:y="8.78cm" svg:viewBox="0 0 54 53" draw:points="0,0 54,0 54,53 0,53">
          <text:p/>
        </draw:polygon>
        <draw:polygon draw:style-name="gr7" draw:text-style-name="P6" draw:layer="layout" svg:width="0.052cm" svg:height="0.65cm" svg:x="2.476cm" svg:y="8.835cm" svg:viewBox="0 0 53 651" draw:points="0,0 53,0 53,651 0,651">
          <text:p/>
        </draw:polygon>
        <draw:polygon draw:style-name="gr7" draw:text-style-name="P6" draw:layer="layout" svg:width="0.018cm" svg:height="0.65cm" svg:x="5.512cm" svg:y="8.835cm" svg:viewBox="0 0 19 651" draw:points="0,0 19,0 19,651 0,651">
          <text:p/>
        </draw:polygon>
        <draw:polygon draw:style-name="gr7" draw:text-style-name="P6" draw:layer="layout" svg:width="0.017cm" svg:height="0.65cm" svg:x="13.248cm" svg:y="8.835cm" svg:viewBox="0 0 18 651" draw:points="0,0 18,0 18,651 0,651">
          <text:p/>
        </draw:polygon>
        <draw:polygon draw:style-name="gr7" draw:text-style-name="P6" draw:layer="layout" svg:width="0.018cm" svg:height="0.65cm" svg:x="16.001cm" svg:y="8.835cm" svg:viewBox="0 0 19 651" draw:points="0,0 19,0 19,651 0,651">
          <text:p/>
        </draw:polygon>
        <draw:polygon draw:style-name="gr7" draw:text-style-name="P6" draw:layer="layout" svg:width="0.053cm" svg:height="0.65cm" svg:x="19.984cm" svg:y="8.835cm" svg:viewBox="0 0 54 651" draw:points="0,0 54,0 54,651 0,651">
          <text:p/>
        </draw:polygon>
        <draw:frame draw:style-name="gr26" draw:text-style-name="P5" draw:layer="layout" svg:width="2.282cm" svg:height="0.386cm" svg:x="13.448cm" svg:y="8.969cm">
          <draw:text-box>
            <text:p text:style-name="P3"><text:span text:style-name="T2">Број индекса: </text:span></text:p>
          </draw:text-box>
        </draw:frame>
        <draw:frame draw:style-name="gr11" draw:text-style-name="P5" draw:layer="layout" svg:width="2.067cm" svg:height="0.386cm" svg:x="16.196cm" svg:y="8.969cm">
          <draw:text-box>
            <text:p text:style-name="P3"><text:span text:style-name="T2">Е2 119/2023 </text:span></text:p>
          </draw:text-box>
        </draw:frame>
        <draw:polygon draw:style-name="gr7" draw:text-style-name="P6" draw:layer="layout" svg:width="0.052cm" svg:height="0.018cm" svg:x="2.476cm" svg:y="9.484cm" svg:viewBox="0 0 53 19" draw:points="0,0 53,0 53,19 0,19">
          <text:p/>
        </draw:polygon>
        <draw:polygon draw:style-name="gr7" draw:text-style-name="P6" draw:layer="layout" svg:width="2.984cm" svg:height="0.018cm" svg:x="2.528cm" svg:y="9.484cm" svg:viewBox="0 0 2985 19" draw:points="0,0 2985,0 2985,19 0,19">
          <text:p/>
        </draw:polygon>
        <draw:polygon draw:style-name="gr7" draw:text-style-name="P6" draw:layer="layout" svg:width="0.018cm" svg:height="0.018cm" svg:x="5.512cm" svg:y="9.484cm" svg:viewBox="0 0 19 19" draw:points="0,0 19,0 19,19 0,19">
          <text:p/>
        </draw:polygon>
        <draw:polygon draw:style-name="gr7" draw:text-style-name="P6" draw:layer="layout" svg:width="7.719cm" svg:height="0.018cm" svg:x="5.529cm" svg:y="9.484cm" svg:viewBox="0 0 7720 19" draw:points="0,0 7720,0 7720,19 0,19">
          <text:p/>
        </draw:polygon>
        <draw:polygon draw:style-name="gr7" draw:text-style-name="P6" draw:layer="layout" svg:width="0.017cm" svg:height="0.018cm" svg:x="13.248cm" svg:y="9.484cm" svg:viewBox="0 0 18 19" draw:points="0,0 18,0 18,19 0,19">
          <text:p/>
        </draw:polygon>
        <draw:polygon draw:style-name="gr7" draw:text-style-name="P6" draw:layer="layout" svg:width="2.736cm" svg:height="0.018cm" svg:x="13.265cm" svg:y="9.484cm" svg:viewBox="0 0 2737 19" draw:points="0,0 2737,0 2737,19 0,19">
          <text:p/>
        </draw:polygon>
        <draw:polygon draw:style-name="gr7" draw:text-style-name="P6" draw:layer="layout" svg:width="0.018cm" svg:height="0.018cm" svg:x="16.001cm" svg:y="9.484cm" svg:viewBox="0 0 19 19" draw:points="0,0 19,0 19,19 0,19">
          <text:p/>
        </draw:polygon>
        <draw:polygon draw:style-name="gr7" draw:text-style-name="P6" draw:layer="layout" svg:width="3.967cm" svg:height="0.018cm" svg:x="16.018cm" svg:y="9.484cm" svg:viewBox="0 0 3968 19" draw:points="0,0 3968,0 3968,19 0,19">
          <text:p/>
        </draw:polygon>
        <draw:polygon draw:style-name="gr7" draw:text-style-name="P6" draw:layer="layout" svg:width="0.053cm" svg:height="0.018cm" svg:x="19.984cm" svg:y="9.484cm" svg:viewBox="0 0 54 19" draw:points="0,0 54,0 54,19 0,19">
          <text:p/>
        </draw:polygon>
        <draw:polygon draw:style-name="gr7" draw:text-style-name="P6" draw:layer="layout" svg:width="0.052cm" svg:height="0.691cm" svg:x="2.476cm" svg:y="9.501cm" svg:viewBox="0 0 53 692" draw:points="0,0 53,0 53,692 0,692">
          <text:p/>
        </draw:polygon>
        <draw:polygon draw:style-name="gr7" draw:text-style-name="P6" draw:layer="layout" svg:width="0.018cm" svg:height="0.691cm" svg:x="5.512cm" svg:y="9.501cm" svg:viewBox="0 0 19 692" draw:points="0,0 19,0 19,692 0,692">
          <text:p/>
        </draw:polygon>
        <draw:polygon draw:style-name="gr7" draw:text-style-name="P6" draw:layer="layout" svg:width="0.053cm" svg:height="0.691cm" svg:x="19.984cm" svg:y="9.501cm" svg:viewBox="0 0 54 692" draw:points="0,0 54,0 54,692 0,692">
          <text:p/>
        </draw:polygon>
        <draw:frame draw:style-name="gr27" draw:text-style-name="P5" draw:layer="layout" svg:width="1.392cm" svg:height="0.386cm" svg:x="2.693cm" svg:y="9.66cm">
          <draw:text-box>
            <text:p text:style-name="P3"><text:span text:style-name="T2">Област: </text:span></text:p>
          </draw:text-box>
        </draw:frame>
        <draw:frame draw:style-name="gr28" draw:text-style-name="P5" draw:layer="layout" svg:width="7.255cm" svg:height="0.386cm" svg:x="5.707cm" svg:y="9.66cm">
          <draw:text-box>
            <text:p text:style-name="P3"><text:span text:style-name="T2">Дистрибуирани системи и програмски језици</text:span></text:p>
          </draw:text-box>
        </draw:frame>
        <draw:polygon draw:style-name="gr7" draw:text-style-name="P6" draw:layer="layout" svg:width="0.052cm" svg:height="0.019cm" svg:x="2.476cm" svg:y="10.191cm" svg:viewBox="0 0 53 20" draw:points="0,0 53,0 53,20 0,20">
          <text:p/>
        </draw:polygon>
        <draw:polygon draw:style-name="gr7" draw:text-style-name="P6" draw:layer="layout" svg:width="2.984cm" svg:height="0.019cm" svg:x="2.528cm" svg:y="10.191cm" svg:viewBox="0 0 2985 20" draw:points="0,0 2985,0 2985,20 0,20">
          <text:p/>
        </draw:polygon>
        <draw:polygon draw:style-name="gr7" draw:text-style-name="P6" draw:layer="layout" svg:width="0.018cm" svg:height="0.019cm" svg:x="5.512cm" svg:y="10.191cm" svg:viewBox="0 0 19 20" draw:points="0,0 19,0 19,20 0,20">
          <text:p/>
        </draw:polygon>
        <draw:polygon draw:style-name="gr7" draw:text-style-name="P6" draw:layer="layout" svg:width="14.456cm" svg:height="0.019cm" svg:x="5.529cm" svg:y="10.191cm" svg:viewBox="0 0 14457 20" draw:points="0,0 14457,0 14457,20 0,20">
          <text:p/>
        </draw:polygon>
        <draw:polygon draw:style-name="gr7" draw:text-style-name="P6" draw:layer="layout" svg:width="0.053cm" svg:height="0.019cm" svg:x="19.984cm" svg:y="10.191cm" svg:viewBox="0 0 54 20" draw:points="0,0 54,0 54,20 0,20">
          <text:p/>
        </draw:polygon>
        <draw:polygon draw:style-name="gr7" draw:text-style-name="P6" draw:layer="layout" svg:width="0.052cm" svg:height="0.691cm" svg:x="2.476cm" svg:y="10.208cm" svg:viewBox="0 0 53 692" draw:points="0,0 53,0 53,692 0,692">
          <text:p/>
        </draw:polygon>
        <draw:polygon draw:style-name="gr7" draw:text-style-name="P6" draw:layer="layout" svg:width="0.018cm" svg:height="0.691cm" svg:x="5.512cm" svg:y="10.208cm" svg:viewBox="0 0 19 692" draw:points="0,0 19,0 19,692 0,692">
          <text:p/>
        </draw:polygon>
        <draw:polygon draw:style-name="gr7" draw:text-style-name="P6" draw:layer="layout" svg:width="0.053cm" svg:height="0.691cm" svg:x="19.984cm" svg:y="10.208cm" svg:viewBox="0 0 54 692" draw:points="0,0 54,0 54,692 0,692">
          <text:p/>
        </draw:polygon>
        <draw:polygon draw:style-name="gr29" draw:text-style-name="P12" draw:layer="layout" svg:width="17.453cm" svg:height="2.206cm" svg:x="2.528cm" svg:y="10.949cm" svg:viewBox="0 0 17454 2207" draw:points="0,0 17454,0 17454,2207 0,2207">
          <text:p/>
        </draw:polygon>
        <draw:polygon draw:style-name="gr29" draw:text-style-name="P12" draw:layer="layout" svg:width="17.123cm" svg:height="0.407cm" svg:x="2.692cm" svg:y="10.949cm" svg:viewBox="0 0 17124 408" draw:points="0,0 17124,0 17124,408 0,408">
          <text:p/>
        </draw:polygon>
        <draw:frame draw:style-name="gr30" draw:text-style-name="P5" draw:layer="layout" svg:width="1.414cm" svg:height="0.386cm" svg:x="2.693cm" svg:y="10.362cm">
          <draw:text-box>
            <text:p text:style-name="P3"><text:span text:style-name="T2">Ментор: </text:span></text:p>
          </draw:text-box>
        </draw:frame>
        <draw:polygon draw:style-name="gr29" draw:text-style-name="P12" draw:layer="layout" svg:width="17.123cm" svg:height="0.407cm" svg:x="2.692cm" svg:y="11.355cm" svg:viewBox="0 0 17124 408" draw:points="0,0 17124,0 17124,408 0,408">
          <text:p/>
        </draw:polygon>
        <draw:frame draw:style-name="gr31" draw:text-style-name="P5" draw:layer="layout" svg:width="3.56cm" svg:height="0.386cm" svg:x="5.707cm" svg:y="10.362cm">
          <draw:text-box>
            <text:p text:style-name="P3"><text:span text:style-name="T2">проф др. Гајић Душан</text:span></text:p>
          </draw:text-box>
        </draw:frame>
        <draw:polygon draw:style-name="gr29" draw:text-style-name="P12" draw:layer="layout" svg:width="17.123cm" svg:height="0.408cm" svg:x="2.692cm" svg:y="11.761cm" svg:viewBox="0 0 17124 409" draw:points="0,0 17124,0 17124,409 0,409">
          <text:p/>
        </draw:polygon>
        <draw:frame draw:style-name="gr32" draw:text-style-name="P5" draw:layer="layout" svg:width="17.168cm" svg:height="0.386cm" svg:x="2.769cm" svg:y="10.963cm">
          <draw:text-box>
            <text:p text:style-name="P3"><text:span text:style-name="T2">НА ОСНОВУ ПОДНЕТЕ ПРИЈАВЕ, ПРИЛОЖЕНЕ ДОКУМЕНТАЦИЈЕ И ОДРЕДБИ СТАТУТА ФАКУЛТЕТА </text:span></text:p>
          </draw:text-box>
        </draw:frame>
        <draw:frame draw:style-name="gr33" draw:text-style-name="P5" draw:layer="layout" svg:width="12.05cm" svg:height="0.386cm" svg:x="2.753cm" svg:y="11.37cm">
          <draw:text-box>
            <text:p text:style-name="P3"><text:span text:style-name="T2">ИЗДАЈЕ СЕ ЗАДАТАК ЗА <text:s/>МАСТЕР РАД, СА СЛЕДЕЋИМ ЕЛЕМЕНТИМА: </text:span></text:p>
          </draw:text-box>
        </draw:frame>
        <draw:polygon draw:style-name="gr29" draw:text-style-name="P12" draw:layer="layout" svg:width="17.123cm" svg:height="0.407cm" svg:x="2.692cm" svg:y="12.168cm" svg:viewBox="0 0 17124 408" draw:points="0,0 17124,0 17124,408 0,408">
          <text:p/>
        </draw:polygon>
        <draw:frame draw:style-name="gr4" draw:text-style-name="P5" draw:layer="layout" svg:width="0.348cm" svg:height="0.386cm" svg:x="3.328cm" svg:y="11.776cm">
          <draw:text-box>
            <text:p text:style-name="P3"><text:span text:style-name="T2">- </text:span></text:p>
          </draw:text-box>
        </draw:frame>
        <draw:frame draw:style-name="gr34" draw:text-style-name="P5" draw:layer="layout" svg:width="3.65cm" svg:height="0.386cm" svg:x="3.963cm" svg:y="11.776cm">
          <draw:text-box>
            <text:p text:style-name="P3"><text:span text:style-name="T2">проблем – тема рада; </text:span></text:p>
          </draw:text-box>
        </draw:frame>
        <draw:polygon draw:style-name="gr29" draw:text-style-name="P12" draw:layer="layout" svg:width="17.123cm" svg:height="0.403cm" svg:x="2.692cm" svg:y="12.574cm" svg:viewBox="0 0 17124 404" draw:points="0,0 17124,0 17124,404 0,404">
          <text:p/>
        </draw:polygon>
        <draw:frame draw:style-name="gr4" draw:text-style-name="P5" draw:layer="layout" svg:width="0.348cm" svg:height="0.386cm" svg:x="3.328cm" svg:y="12.183cm">
          <draw:text-box>
            <text:p text:style-name="P3"><text:span text:style-name="T2">- </text:span></text:p>
          </draw:text-box>
        </draw:frame>
        <draw:polygon draw:style-name="gr29" draw:text-style-name="P12" draw:layer="layout" svg:width="17.123cm" svg:height="0.179cm" svg:x="2.692cm" svg:y="12.976cm" svg:viewBox="0 0 17124 180" draw:points="0,0 17124,0 17124,180 0,180">
          <text:p/>
        </draw:polygon>
        <draw:frame draw:style-name="gr35" draw:text-style-name="P5" draw:layer="layout" svg:width="13.728cm" svg:height="0.771cm" svg:x="3.963cm" svg:y="12.183cm">
          <draw:text-box>
            <text:p text:style-name="P3"><text:span text:style-name="T2">начин <text:s/>решавања <text:s/>проблема <text:s/>и <text:s/>начин <text:s/>практичне <text:s/>провере <text:s/>резултата <text:s/>рада, <text:s/>ако <text:s/>је </text:span></text:p>
            <text:p text:style-name="P3"><text:span text:style-name="T2">таква <text:s/>провера неопходна</text:span></text:p>
          </draw:text-box>
        </draw:frame>
        <draw:frame draw:style-name="gr4" draw:text-style-name="P5" draw:layer="layout" svg:width="0.348cm" svg:height="0.386cm" svg:x="11.382cm" svg:y="12.991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11.382cm" svg:y="13.398cm">
          <draw:text-box>
            <text:p text:style-name="P3"><text:span text:style-name="T2"><text:s/></text:span></text:p>
          </draw:text-box>
        </draw:frame>
        <draw:polygon draw:style-name="gr7" draw:text-style-name="P6" draw:layer="layout" svg:width="0.052cm" svg:height="0.056cm" svg:x="2.476cm" svg:y="10.898cm" svg:viewBox="0 0 53 57" draw:points="0,0 53,0 53,57 0,57">
          <text:p/>
        </draw:polygon>
        <draw:polygon draw:style-name="gr7" draw:text-style-name="P6" draw:layer="layout" svg:width="2.984cm" svg:height="0.052cm" svg:x="2.528cm" svg:y="10.898cm" svg:viewBox="0 0 2985 53" draw:points="0,0 2985,0 2985,53 0,53">
          <text:p/>
        </draw:polygon>
        <draw:polygon draw:style-name="gr29" draw:text-style-name="P12" draw:layer="layout" svg:width="2.984cm" svg:height="0.005cm" svg:x="2.528cm" svg:y="10.949cm" svg:viewBox="0 0 2985 6" draw:points="0,0 2985,0 2985,6 0,6">
          <text:p/>
        </draw:polygon>
        <draw:polygon draw:style-name="gr29" draw:text-style-name="P12" draw:layer="layout" svg:width="0.052cm" svg:height="0.005cm" svg:x="5.512cm" svg:y="10.949cm" svg:viewBox="0 0 53 6" draw:points="0,0 53,0 53,6 0,6">
          <text:p/>
        </draw:polygon>
        <draw:polygon draw:style-name="gr7" draw:text-style-name="P6" draw:layer="layout" svg:width="0.052cm" svg:height="0.052cm" svg:x="5.512cm" svg:y="10.898cm" svg:viewBox="0 0 53 53" draw:points="0,0 53,0 53,53 0,53">
          <text:p/>
        </draw:polygon>
        <draw:polygon draw:style-name="gr7" draw:text-style-name="P6" draw:layer="layout" svg:width="14.423cm" svg:height="0.052cm" svg:x="5.562cm" svg:y="10.898cm" svg:viewBox="0 0 14424 53" draw:points="0,0 14424,0 14424,53 0,53">
          <text:p/>
        </draw:polygon>
        <draw:polygon draw:style-name="gr29" draw:text-style-name="P12" draw:layer="layout" svg:width="14.423cm" svg:height="0.005cm" svg:x="5.562cm" svg:y="10.949cm" svg:viewBox="0 0 14424 6" draw:points="0,0 14424,0 14424,6 0,6">
          <text:p/>
        </draw:polygon>
        <draw:polygon draw:style-name="gr7" draw:text-style-name="P6" draw:layer="layout" svg:width="0.053cm" svg:height="0.056cm" svg:x="19.984cm" svg:y="10.898cm" svg:viewBox="0 0 54 57" draw:points="0,0 54,0 54,57 0,57">
          <text:p/>
        </draw:polygon>
        <draw:polygon draw:style-name="gr7" draw:text-style-name="P6" draw:layer="layout" svg:width="0.052cm" svg:height="2.202cm" svg:x="2.476cm" svg:y="10.953cm" svg:viewBox="0 0 53 2203" draw:points="0,0 53,0 53,2203 0,2203">
          <text:p/>
        </draw:polygon>
        <draw:polygon draw:style-name="gr7" draw:text-style-name="P6" draw:layer="layout" svg:width="0.052cm" svg:height="0.052cm" svg:x="2.476cm" svg:y="13.154cm" svg:viewBox="0 0 53 53" draw:points="0,0 53,0 53,53 0,53">
          <text:p/>
        </draw:polygon>
        <draw:polygon draw:style-name="gr7" draw:text-style-name="P6" draw:layer="layout" svg:width="0.052cm" svg:height="0.052cm" svg:x="2.476cm" svg:y="13.154cm" svg:viewBox="0 0 53 53" draw:points="0,0 53,0 53,53 0,53">
          <text:p/>
        </draw:polygon>
        <draw:polygon draw:style-name="gr7" draw:text-style-name="P6" draw:layer="layout" svg:width="17.457cm" svg:height="0.052cm" svg:x="2.528cm" svg:y="13.154cm" svg:viewBox="0 0 17458 53" draw:points="0,0 17458,0 17458,53 0,53">
          <text:p/>
        </draw:polygon>
        <draw:polygon draw:style-name="gr7" draw:text-style-name="P6" draw:layer="layout" svg:width="0.053cm" svg:height="2.202cm" svg:x="19.984cm" svg:y="10.953cm" svg:viewBox="0 0 54 2203" draw:points="0,0 54,0 54,2203 0,2203">
          <text:p/>
        </draw:polygon>
        <draw:polygon draw:style-name="gr7" draw:text-style-name="P6" draw:layer="layout" svg:width="0.053cm" svg:height="0.052cm" svg:x="19.984cm" svg:y="13.154cm" svg:viewBox="0 0 54 53" draw:points="0,0 54,0 54,53 0,53">
          <text:p/>
        </draw:polygon>
        <draw:polygon draw:style-name="gr7" draw:text-style-name="P6" draw:layer="layout" svg:width="0.053cm" svg:height="0.052cm" svg:x="19.984cm" svg:y="13.154cm" svg:viewBox="0 0 54 53" draw:points="0,0 54,0 54,53 0,53">
          <text:p/>
        </draw:polygon>
        <draw:frame draw:style-name="gr4" draw:text-style-name="P5" draw:layer="layout" svg:width="0.348cm" svg:height="0.386cm" svg:x="11.382cm" svg:y="13.80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11.382cm" svg:y="14.21cm">
          <draw:text-box>
            <text:p text:style-name="P3"><text:span text:style-name="T2"><text:s/></text:span></text:p>
          </draw:text-box>
        </draw:frame>
        <draw:polygon draw:style-name="gr7" draw:text-style-name="P6" draw:layer="layout" svg:width="0.052cm" svg:height="0.056cm" svg:x="2.476cm" svg:y="14.263cm" svg:viewBox="0 0 53 57" draw:points="0,0 53,0 53,57 0,57">
          <text:p/>
        </draw:polygon>
        <draw:polygon draw:style-name="gr7" draw:text-style-name="P6" draw:layer="layout" svg:width="0.052cm" svg:height="0.052cm" svg:x="2.476cm" svg:y="14.263cm" svg:viewBox="0 0 53 53" draw:points="0,0 53,0 53,53 0,53">
          <text:p/>
        </draw:polygon>
        <draw:polygon draw:style-name="gr7" draw:text-style-name="P6" draw:layer="layout" svg:width="17.457cm" svg:height="0.052cm" svg:x="2.528cm" svg:y="14.263cm" svg:viewBox="0 0 17458 53" draw:points="0,0 17458,0 17458,53 0,53">
          <text:p/>
        </draw:polygon>
        <draw:polygon draw:style-name="gr7" draw:text-style-name="P6" draw:layer="layout" svg:width="0.053cm" svg:height="0.056cm" svg:x="19.984cm" svg:y="14.263cm" svg:viewBox="0 0 54 57" draw:points="0,0 54,0 54,57 0,57">
          <text:p/>
        </draw:polygon>
        <draw:polygon draw:style-name="gr7" draw:text-style-name="P6" draw:layer="layout" svg:width="0.053cm" svg:height="0.052cm" svg:x="19.984cm" svg:y="14.263cm" svg:viewBox="0 0 54 53" draw:points="0,0 54,0 54,53 0,53">
          <text:p/>
        </draw:polygon>
        <draw:polygon draw:style-name="gr7" draw:text-style-name="P6" draw:layer="layout" svg:width="0.052cm" svg:height="1.268cm" svg:x="2.476cm" svg:y="14.318cm" svg:viewBox="0 0 53 1269" draw:points="0,0 53,0 53,1269 0,1269">
          <text:p/>
        </draw:polygon>
        <draw:polygon draw:style-name="gr7" draw:text-style-name="P6" draw:layer="layout" svg:width="0.052cm" svg:height="0.052cm" svg:x="2.476cm" svg:y="15.585cm" svg:viewBox="0 0 53 53" draw:points="0,0 53,0 53,53 0,53">
          <text:p/>
        </draw:polygon>
        <draw:polygon draw:style-name="gr7" draw:text-style-name="P6" draw:layer="layout" svg:width="0.052cm" svg:height="0.052cm" svg:x="2.476cm" svg:y="15.585cm" svg:viewBox="0 0 53 53" draw:points="0,0 53,0 53,53 0,53">
          <text:p/>
        </draw:polygon>
        <draw:polygon draw:style-name="gr7" draw:text-style-name="P6" draw:layer="layout" svg:width="17.457cm" svg:height="0.052cm" svg:x="2.528cm" svg:y="15.585cm" svg:viewBox="0 0 17458 53" draw:points="0,0 17458,0 17458,53 0,53">
          <text:p/>
        </draw:polygon>
        <draw:polygon draw:style-name="gr7" draw:text-style-name="P6" draw:layer="layout" svg:width="0.053cm" svg:height="1.268cm" svg:x="19.984cm" svg:y="14.318cm" svg:viewBox="0 0 54 1269" draw:points="0,0 54,0 54,1269 0,1269">
          <text:p/>
        </draw:polygon>
        <draw:polygon draw:style-name="gr7" draw:text-style-name="P6" draw:layer="layout" svg:width="0.053cm" svg:height="0.052cm" svg:x="19.984cm" svg:y="15.585cm" svg:viewBox="0 0 54 53" draw:points="0,0 54,0 54,53 0,53">
          <text:p/>
        </draw:polygon>
        <draw:polygon draw:style-name="gr7" draw:text-style-name="P6" draw:layer="layout" svg:width="0.053cm" svg:height="0.052cm" svg:x="19.984cm" svg:y="15.585cm" svg:viewBox="0 0 54 53" draw:points="0,0 54,0 54,53 0,53">
          <text:p/>
        </draw:polygon>
        <draw:frame draw:style-name="gr36" draw:text-style-name="P10" draw:layer="layout" svg:width="6.008cm" svg:height="0.513cm" svg:x="2.503cm" svg:y="13.647cm">
          <draw:text-box>
            <text:p text:style-name="P3"><text:span text:style-name="T9">НАСЛОВ <text:s/>МАСТЕР <text:s/>РАДА: </text:span></text:p>
          </draw:text-box>
        </draw:frame>
        <draw:frame draw:style-name="gr37" draw:text-style-name="P13" draw:layer="layout" svg:width="17.148cm" svg:height="0.556cm" svg:x="2.854cm" svg:y="14.392cm">
          <draw:text-box>
            <text:p text:style-name="P3"><text:span text:style-name="T10">Дизајн и имплементација ЕИП-7702-компатибилног </text:span><text:span text:style-name="T11">Ethereum</text:span></text:p>
          </draw:text-box>
        </draw:frame>
        <draw:frame draw:style-name="gr38" draw:text-style-name="P14" draw:layer="layout" svg:width="6.564cm" svg:height="0.556cm" svg:x="2.854cm" svg:y="14.947cm">
          <draw:text-box>
            <text:p text:style-name="P3"><text:span text:style-name="T10">вишепотписног новчаника</text:span></text:p>
          </draw:text-box>
        </draw:frame>
        <draw:frame draw:style-name="gr39" draw:text-style-name="P10" draw:layer="layout" svg:width="4.042cm" svg:height="0.513cm" svg:x="2.503cm" svg:y="16.082cm">
          <draw:text-box>
            <text:p text:style-name="P3"><text:span text:style-name="T9">ТЕКСТ ЗАДАТКА: </text:span></text:p>
          </draw:text-box>
        </draw:frame>
        <draw:frame draw:style-name="gr40" draw:text-style-name="P15" draw:layer="layout" svg:width="16.974cm" svg:height="4.402cm" svg:x="2.74cm" svg:y="16.97cm">
          <draw:text-box>
            <text:p text:style-name="P3"><text:span text:style-name="T2">Размотрити проблем недостатка вишепотписне ауторизације код стандардних </text:span><text:span text:style-name="T6">Ethereum</text:span><text:span text:style-name="T2"> налога и њен</text:span></text:p>
            <text:p text:style-name="P3"><text:span text:style-name="T2">значај за безбедно управљање заједничком дигиталном имовином. Размотрити ограничење </text:span><text:span text:style-name="T6">ERC-20</text:span></text:p>
            <text:p text:style-name="P3"><text:span text:style-name="T2">стандарда при депоновању токена у паметне уговоре, које захтева слање две одвојене трансакције.</text:span></text:p>
            <text:p text:style-name="P3"><text:span text:style-name="T2">Размотрити модел налога у власништву спољног корисника (</text:span><text:span text:style-name="T6">EOA</text:span><text:span text:style-name="T2">) и паметних уговора, као и механизам</text:span></text:p>
            <text:p text:style-name="P3"><text:span text:style-name="T6">EIP-7702</text:span><text:span text:style-name="T2"> делегације извршавања кода. Размотрити и упоредити постојећа решења за унапређење</text:span></text:p>
            <text:p text:style-name="P3"><text:span text:style-name="T2">корисничког искуства </text:span><text:span text:style-name="T6">Ethereum</text:span><text:span text:style-name="T2"> налога. Користећи механизам </text:span><text:span text:style-name="T6">EIP-7702</text:span><text:span text:style-name="T2"> делегације, имплементирати</text:span></text:p>
            <text:p text:style-name="P3"><text:span text:style-name="T2">вишепотписни </text:span><text:span text:style-name="T6">Ethereum</text:span><text:span text:style-name="T2"> новчаник у виду веб екстензије за </text:span><text:span text:style-name="T6">Chromium</text:span><text:span text:style-name="T2"> прегледаче, који омогућава</text:span></text:p>
            <text:p text:style-name="P3"><text:span text:style-name="T2">депоновање </text:span><text:span text:style-name="T6">ERC-20</text:span><text:span text:style-name="T2"> токена у једној трансакцији. Демонстрирати функционалност имплементираног</text:span></text:p>
            <text:p text:style-name="P3"><text:span text:style-name="T2">система стварним трансакцијама на </text:span><text:span text:style-name="T6">Sepolia</text:span><text:span text:style-name="T2"> тест мрежи.</text:span></text:p>
          </draw:text-box>
        </draw:frame>
        <draw:polygon draw:style-name="gr7" draw:text-style-name="P6" draw:layer="layout" svg:width="0.052cm" svg:height="0.056cm" svg:x="2.476cm" svg:y="16.694cm" svg:viewBox="0 0 53 57" draw:points="0,0 53,0 53,57 0,57">
          <text:p/>
        </draw:polygon>
        <draw:polygon draw:style-name="gr7" draw:text-style-name="P6" draw:layer="layout" svg:width="0.052cm" svg:height="0.052cm" svg:x="2.476cm" svg:y="16.694cm" svg:viewBox="0 0 53 53" draw:points="0,0 53,0 53,53 0,53">
          <text:p/>
        </draw:polygon>
        <draw:polygon draw:style-name="gr7" draw:text-style-name="P6" draw:layer="layout" svg:width="17.457cm" svg:height="0.052cm" svg:x="2.528cm" svg:y="16.694cm" svg:viewBox="0 0 17458 53" draw:points="0,0 17458,0 17458,53 0,53">
          <text:p/>
        </draw:polygon>
        <draw:polygon draw:style-name="gr7" draw:text-style-name="P6" draw:layer="layout" svg:width="0.053cm" svg:height="0.056cm" svg:x="19.984cm" svg:y="16.694cm" svg:viewBox="0 0 54 57" draw:points="0,0 54,0 54,57 0,57">
          <text:p/>
        </draw:polygon>
        <draw:polygon draw:style-name="gr7" draw:text-style-name="P6" draw:layer="layout" svg:width="0.053cm" svg:height="0.052cm" svg:x="19.984cm" svg:y="16.694cm" svg:viewBox="0 0 54 53" draw:points="0,0 54,0 54,53 0,53">
          <text:p/>
        </draw:polygon>
        <draw:polygon draw:style-name="gr7" draw:text-style-name="P6" draw:layer="layout" svg:width="0.052cm" svg:height="6.767cm" svg:x="2.476cm" svg:y="16.749cm" svg:viewBox="0 0 53 6768" draw:points="0,0 53,0 53,6768 0,6768">
          <text:p/>
        </draw:polygon>
        <draw:polygon draw:style-name="gr7" draw:text-style-name="P6" draw:layer="layout" svg:width="0.052cm" svg:height="0.052cm" svg:x="2.476cm" svg:y="23.515cm" svg:viewBox="0 0 53 53" draw:points="0,0 53,0 53,53 0,53">
          <text:p/>
        </draw:polygon>
        <draw:polygon draw:style-name="gr7" draw:text-style-name="P6" draw:layer="layout" svg:width="0.052cm" svg:height="0.052cm" svg:x="2.476cm" svg:y="23.515cm" svg:viewBox="0 0 53 53" draw:points="0,0 53,0 53,53 0,53">
          <text:p/>
        </draw:polygon>
        <draw:polygon draw:style-name="gr7" draw:text-style-name="P6" draw:layer="layout" svg:width="17.457cm" svg:height="0.052cm" svg:x="2.528cm" svg:y="23.515cm" svg:viewBox="0 0 17458 53" draw:points="0,0 17458,0 17458,53 0,53">
          <text:p/>
        </draw:polygon>
        <draw:polygon draw:style-name="gr7" draw:text-style-name="P6" draw:layer="layout" svg:width="0.053cm" svg:height="6.767cm" svg:x="19.984cm" svg:y="16.749cm" svg:viewBox="0 0 54 6768" draw:points="0,0 54,0 54,6768 0,6768">
          <text:p/>
        </draw:polygon>
        <draw:polygon draw:style-name="gr7" draw:text-style-name="P6" draw:layer="layout" svg:width="0.053cm" svg:height="0.052cm" svg:x="19.984cm" svg:y="23.515cm" svg:viewBox="0 0 54 53" draw:points="0,0 54,0 54,53 0,53">
          <text:p/>
        </draw:polygon>
        <draw:polygon draw:style-name="gr7" draw:text-style-name="P6" draw:layer="layout" svg:width="0.053cm" svg:height="0.052cm" svg:x="19.984cm" svg:y="23.515cm" svg:viewBox="0 0 54 53" draw:points="0,0 54,0 54,53 0,53">
          <text:p/>
        </draw:polygon>
        <draw:frame draw:style-name="gr23" draw:text-style-name="P11" draw:layer="layout" svg:width="0.211cm" svg:height="0.239cm" svg:x="2.503cm" svg:y="23.577cm">
          <draw:text-box>
            <text:p text:style-name="P3"><text:span text:style-name="T8"><text:s/></text:span></text:p>
          </draw:text-box>
        </draw:frame>
        <draw:frame draw:style-name="gr23" draw:text-style-name="P11" draw:layer="layout" svg:width="0.211cm" svg:height="0.239cm" svg:x="2.503cm" svg:y="23.818cm">
          <draw:text-box>
            <text:p text:style-name="P3"><text:span text:style-name="T8"><text:s/></text:span></text:p>
          </draw:text-box>
        </draw:frame>
        <draw:polygon draw:style-name="gr7" draw:text-style-name="P6" draw:layer="layout" svg:width="0.052cm" svg:height="0.056cm" svg:x="2.476cm" svg:y="24.057cm" svg:viewBox="0 0 53 57" draw:points="0,0 53,0 53,57 0,57">
          <text:p/>
        </draw:polygon>
        <draw:polygon draw:style-name="gr7" draw:text-style-name="P6" draw:layer="layout" svg:width="0.052cm" svg:height="0.052cm" svg:x="2.476cm" svg:y="24.057cm" svg:viewBox="0 0 53 53" draw:points="0,0 53,0 53,53 0,53">
          <text:p/>
        </draw:polygon>
        <draw:polygon draw:style-name="gr7" draw:text-style-name="P6" draw:layer="layout" svg:width="8.723cm" svg:height="0.052cm" svg:x="2.528cm" svg:y="24.057cm" svg:viewBox="0 0 8724 53" draw:points="0,0 8724,0 8724,53 0,53">
          <text:p/>
        </draw:polygon>
        <draw:polygon draw:style-name="gr7" draw:text-style-name="P6" draw:layer="layout" svg:width="0.018cm" svg:height="0.005cm" svg:x="11.25cm" svg:y="24.108cm" svg:viewBox="0 0 19 6" draw:points="0,0 19,0 19,6 0,6">
          <text:p/>
        </draw:polygon>
        <draw:polygon draw:style-name="gr7" draw:text-style-name="P6" draw:layer="layout" svg:width="0.052cm" svg:height="0.052cm" svg:x="11.25cm" svg:y="24.057cm" svg:viewBox="0 0 53 53" draw:points="0,0 53,0 53,53 0,53">
          <text:p/>
        </draw:polygon>
        <draw:polygon draw:style-name="gr7" draw:text-style-name="P6" draw:layer="layout" svg:width="8.685cm" svg:height="0.052cm" svg:x="11.3cm" svg:y="24.057cm" svg:viewBox="0 0 8686 53" draw:points="0,0 8686,0 8686,53 0,53">
          <text:p/>
        </draw:polygon>
        <draw:polygon draw:style-name="gr7" draw:text-style-name="P6" draw:layer="layout" svg:width="0.053cm" svg:height="0.056cm" svg:x="19.984cm" svg:y="24.057cm" svg:viewBox="0 0 54 57" draw:points="0,0 54,0 54,57 0,57">
          <text:p/>
        </draw:polygon>
        <draw:polygon draw:style-name="gr7" draw:text-style-name="P6" draw:layer="layout" svg:width="0.053cm" svg:height="0.052cm" svg:x="19.984cm" svg:y="24.057cm" svg:viewBox="0 0 54 53" draw:points="0,0 54,0 54,53 0,53">
          <text:p/>
        </draw:polygon>
        <draw:polygon draw:style-name="gr7" draw:text-style-name="P6" draw:layer="layout" svg:width="0.052cm" svg:height="0.56cm" svg:x="2.476cm" svg:y="24.112cm" svg:viewBox="0 0 53 561" draw:points="0,0 53,0 53,561 0,561">
          <text:p/>
        </draw:polygon>
        <draw:polygon draw:style-name="gr7" draw:text-style-name="P6" draw:layer="layout" svg:width="0.018cm" svg:height="0.56cm" svg:x="11.25cm" svg:y="24.112cm" svg:viewBox="0 0 19 561" draw:points="0,0 19,0 19,561 0,561">
          <text:p/>
        </draw:polygon>
        <draw:polygon draw:style-name="gr7" draw:text-style-name="P6" draw:layer="layout" svg:width="0.053cm" svg:height="0.56cm" svg:x="19.984cm" svg:y="24.112cm" svg:viewBox="0 0 54 561" draw:points="0,0 54,0 54,561 0,561">
          <text:p/>
        </draw:polygon>
        <draw:frame draw:style-name="gr6" draw:text-style-name="P5" draw:layer="layout" svg:width="5.65cm" svg:height="0.386cm" svg:x="2.693cm" svg:y="24.203cm">
          <draw:text-box>
            <text:p text:style-name="P3"><text:span text:style-name="T2">Руководилац студијског програма: </text:span></text:p>
          </draw:text-box>
        </draw:frame>
        <draw:frame draw:style-name="gr41" draw:text-style-name="P5" draw:layer="layout" svg:width="2.292cm" svg:height="0.386cm" svg:x="11.445cm" svg:y="24.203cm">
          <draw:text-box>
            <text:p text:style-name="P3"><text:span text:style-name="T2">Ментор рада: </text:span></text:p>
          </draw:text-box>
        </draw:frame>
        <draw:polygon draw:style-name="gr7" draw:text-style-name="P6" draw:layer="layout" svg:width="0.052cm" svg:height="0.018cm" svg:x="2.476cm" svg:y="24.671cm" svg:viewBox="0 0 53 19" draw:points="0,0 53,0 53,19 0,19">
          <text:p/>
        </draw:polygon>
        <draw:polygon draw:style-name="gr7" draw:text-style-name="P6" draw:layer="layout" svg:width="8.723cm" svg:height="0.018cm" svg:x="2.528cm" svg:y="24.671cm" svg:viewBox="0 0 8724 19" draw:points="0,0 8724,0 8724,19 0,19">
          <text:p/>
        </draw:polygon>
        <draw:polygon draw:style-name="gr7" draw:text-style-name="P6" draw:layer="layout" svg:width="0.018cm" svg:height="0.018cm" svg:x="11.25cm" svg:y="24.671cm" svg:viewBox="0 0 19 19" draw:points="0,0 19,0 19,19 0,19">
          <text:p/>
        </draw:polygon>
        <draw:polygon draw:style-name="gr7" draw:text-style-name="P6" draw:layer="layout" svg:width="8.718cm" svg:height="0.018cm" svg:x="11.267cm" svg:y="24.671cm" svg:viewBox="0 0 8719 19" draw:points="0,0 8719,0 8719,19 0,19">
          <text:p/>
        </draw:polygon>
        <draw:polygon draw:style-name="gr7" draw:text-style-name="P6" draw:layer="layout" svg:width="0.053cm" svg:height="0.018cm" svg:x="19.984cm" svg:y="24.671cm" svg:viewBox="0 0 54 19" draw:points="0,0 54,0 54,19 0,19">
          <text:p/>
        </draw:polygon>
        <draw:polygon draw:style-name="gr7" draw:text-style-name="P6" draw:layer="layout" svg:width="0.052cm" svg:height="1.042cm" svg:x="2.476cm" svg:y="24.688cm" svg:viewBox="0 0 53 1043" draw:points="0,0 53,0 53,1043 0,1043">
          <text:p/>
        </draw:polygon>
        <draw:polygon draw:style-name="gr7" draw:text-style-name="P6" draw:layer="layout" svg:width="0.052cm" svg:height="0.053cm" svg:x="2.476cm" svg:y="25.729cm" svg:viewBox="0 0 53 54" draw:points="0,0 53,0 53,54 0,54">
          <text:p/>
        </draw:polygon>
        <draw:polygon draw:style-name="gr7" draw:text-style-name="P6" draw:layer="layout" svg:width="0.052cm" svg:height="0.053cm" svg:x="2.476cm" svg:y="25.729cm" svg:viewBox="0 0 53 54" draw:points="0,0 53,0 53,54 0,54">
          <text:p/>
        </draw:polygon>
        <draw:polygon draw:style-name="gr7" draw:text-style-name="P6" draw:layer="layout" svg:width="8.723cm" svg:height="0.053cm" svg:x="2.528cm" svg:y="25.729cm" svg:viewBox="0 0 8724 54" draw:points="0,0 8724,0 8724,54 0,54">
          <text:p/>
        </draw:polygon>
        <draw:polygon draw:style-name="gr7" draw:text-style-name="P6" draw:layer="layout" svg:width="0.018cm" svg:height="1.042cm" svg:x="11.25cm" svg:y="24.688cm" svg:viewBox="0 0 19 1043" draw:points="0,0 19,0 19,1043 0,1043">
          <text:p/>
        </draw:polygon>
        <draw:polygon draw:style-name="gr7" draw:text-style-name="P6" draw:layer="layout" svg:width="0.052cm" svg:height="0.053cm" svg:x="11.25cm" svg:y="25.729cm" svg:viewBox="0 0 53 54" draw:points="0,0 53,0 53,54 0,54">
          <text:p/>
        </draw:polygon>
        <draw:polygon draw:style-name="gr7" draw:text-style-name="P6" draw:layer="layout" svg:width="8.685cm" svg:height="0.053cm" svg:x="11.3cm" svg:y="25.729cm" svg:viewBox="0 0 8686 54" draw:points="0,0 8686,0 8686,54 0,54">
          <text:p/>
        </draw:polygon>
        <draw:polygon draw:style-name="gr7" draw:text-style-name="P6" draw:layer="layout" svg:width="0.053cm" svg:height="1.042cm" svg:x="19.984cm" svg:y="24.688cm" svg:viewBox="0 0 54 1043" draw:points="0,0 54,0 54,1043 0,1043">
          <text:p/>
        </draw:polygon>
        <draw:polygon draw:style-name="gr7" draw:text-style-name="P6" draw:layer="layout" svg:width="0.053cm" svg:height="0.053cm" svg:x="19.984cm" svg:y="25.729cm" svg:viewBox="0 0 54 54" draw:points="0,0 54,0 54,54 0,54">
          <text:p/>
        </draw:polygon>
        <draw:polygon draw:style-name="gr7" draw:text-style-name="P6" draw:layer="layout" svg:width="0.053cm" svg:height="0.053cm" svg:x="19.984cm" svg:y="25.729cm" svg:viewBox="0 0 54 54" draw:points="0,0 54,0 54,54 0,54">
          <text:p/>
        </draw:polygon>
        <draw:frame draw:style-name="gr4" draw:text-style-name="P5" draw:layer="layout" svg:width="0.348cm" svg:height="0.386cm" svg:x="2.693cm" svg:y="24.91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11.445cm" svg:y="24.914cm">
          <draw:text-box>
            <text:p text:style-name="P3"><text:span text:style-name="T2"><text:s/></text:span></text:p>
          </draw:text-box>
        </draw:frame>
        <draw:frame draw:style-name="gr42" draw:text-style-name="P16" draw:layer="layout" svg:width="0.285cm" svg:height="0.323cm" svg:x="2.503cm" svg:y="25.794cm">
          <draw:text-box>
            <text:p text:style-name="P3"><text:span text:style-name="T12"><text:s/></text:span></text:p>
          </draw:text-box>
        </draw:frame>
        <draw:frame draw:style-name="gr43" draw:text-style-name="P5" draw:layer="layout" svg:width="2.346cm" svg:height="0.386cm" svg:x="2.592cm" svg:y="26.357cm">
          <draw:text-box>
            <text:p text:style-name="P3"><text:span text:style-name="T2">Примерак за: <text:s/></text:span></text:p>
          </draw:text-box>
        </draw:frame>
        <draw:frame draw:style-name="gr44" draw:text-style-name="P8" draw:layer="layout" svg:width="0.496cm" svg:height="0.497cm" svg:x="4.971cm" svg:y="26.294cm">
          <draw:text-box>
            <text:p text:style-name="P3"><text:span text:style-name="T13"></text:span></text:p>
          </draw:text-box>
        </draw:frame>
        <draw:frame draw:style-name="gr45" draw:text-style-name="P5" draw:layer="layout" svg:width="2.026cm" svg:height="0.386cm" svg:x="5.411cm" svg:y="26.357cm">
          <draw:text-box>
            <text:p text:style-name="P3"><text:span text:style-name="T2"><text:s/>- Студента; </text:span></text:p>
          </draw:text-box>
        </draw:frame>
        <draw:polygon draw:style-name="gr7" draw:text-style-name="P6" draw:layer="layout" svg:width="0.018cm" svg:height="0.018cm" svg:x="2.493cm" svg:y="26.11cm" svg:viewBox="0 0 19 19" draw:points="0,0 19,0 19,19 0,19">
          <text:p/>
        </draw:polygon>
        <draw:polygon draw:style-name="gr7" draw:text-style-name="P6" draw:layer="layout" svg:width="0.018cm" svg:height="0.018cm" svg:x="2.493cm" svg:y="26.11cm" svg:viewBox="0 0 19 19" draw:points="0,0 19,0 19,19 0,19">
          <text:p/>
        </draw:polygon>
        <draw:polygon draw:style-name="gr7" draw:text-style-name="P6" draw:layer="layout" svg:width="17.491cm" svg:height="0.018cm" svg:x="2.511cm" svg:y="26.11cm" svg:viewBox="0 0 17492 19" draw:points="0,0 17492,0 17492,19 0,19">
          <text:p/>
        </draw:polygon>
        <draw:polygon draw:style-name="gr7" draw:text-style-name="P6" draw:layer="layout" svg:width="0.017cm" svg:height="0.018cm" svg:x="20.002cm" svg:y="26.11cm" svg:viewBox="0 0 18 19" draw:points="0,0 18,0 18,19 0,19">
          <text:p/>
        </draw:polygon>
        <draw:polygon draw:style-name="gr7" draw:text-style-name="P6" draw:layer="layout" svg:width="0.017cm" svg:height="0.018cm" svg:x="20.002cm" svg:y="26.11cm" svg:viewBox="0 0 18 19" draw:points="0,0 18,0 18,19 0,19">
          <text:p/>
        </draw:polygon>
        <draw:polygon draw:style-name="gr7" draw:text-style-name="P6" draw:layer="layout" svg:width="0.018cm" svg:height="0.687cm" svg:x="2.493cm" svg:y="26.127cm" svg:viewBox="0 0 19 688" draw:points="0,0 19,0 19,688 0,688">
          <text:p/>
        </draw:polygon>
        <draw:polygon draw:style-name="gr7" draw:text-style-name="P6" draw:layer="layout" svg:width="0.018cm" svg:height="0.018cm" svg:x="2.493cm" svg:y="26.813cm" svg:viewBox="0 0 19 19" draw:points="0,0 19,0 19,19 0,19">
          <text:p/>
        </draw:polygon>
        <draw:polygon draw:style-name="gr7" draw:text-style-name="P6" draw:layer="layout" svg:width="0.018cm" svg:height="0.018cm" svg:x="2.493cm" svg:y="26.813cm" svg:viewBox="0 0 19 19" draw:points="0,0 19,0 19,19 0,19">
          <text:p/>
        </draw:polygon>
        <draw:polygon draw:style-name="gr7" draw:text-style-name="P6" draw:layer="layout" svg:width="17.491cm" svg:height="0.018cm" svg:x="2.511cm" svg:y="26.813cm" svg:viewBox="0 0 17492 19" draw:points="0,0 17492,0 17492,19 0,19">
          <text:p/>
        </draw:polygon>
        <draw:polygon draw:style-name="gr7" draw:text-style-name="P6" draw:layer="layout" svg:width="0.017cm" svg:height="0.687cm" svg:x="20.002cm" svg:y="26.127cm" svg:viewBox="0 0 18 688" draw:points="0,0 18,0 18,688 0,688">
          <text:p/>
        </draw:polygon>
        <draw:polygon draw:style-name="gr7" draw:text-style-name="P6" draw:layer="layout" svg:width="0.017cm" svg:height="0.018cm" svg:x="20.002cm" svg:y="26.813cm" svg:viewBox="0 0 18 19" draw:points="0,0 18,0 18,19 0,19">
          <text:p/>
        </draw:polygon>
        <draw:polygon draw:style-name="gr7" draw:text-style-name="P6" draw:layer="layout" svg:width="0.017cm" svg:height="0.018cm" svg:x="20.002cm" svg:y="26.813cm" svg:viewBox="0 0 18 19" draw:points="0,0 18,0 18,19 0,19">
          <text:p/>
        </draw:polygon>
        <draw:frame draw:style-name="gr44" draw:text-style-name="P8" draw:layer="layout" svg:width="0.496cm" svg:height="0.497cm" svg:x="7.457cm" svg:y="26.294cm">
          <draw:text-box>
            <text:p text:style-name="P3"><text:span text:style-name="T13"></text:span></text:p>
          </draw:text-box>
        </draw:frame>
        <draw:frame draw:style-name="gr46" draw:text-style-name="P5" draw:layer="layout" svg:width="1.819cm" svg:height="0.386cm" svg:x="7.897cm" svg:y="26.357cm">
          <draw:text-box>
            <text:p text:style-name="P3"><text:span text:style-name="T2"><text:s/>- Ментора </text:span></text:p>
          </draw:text-box>
        </draw:frame>
        <draw:frame draw:style-name="gr47" draw:text-style-name="P17" draw:layer="layout" svg:width="0.034cm" svg:height="0.039cm" svg:x="20.007cm" svg:y="26.938cm">
          <draw:text-box>
            <text:p text:style-name="P3"><text:span text:style-name="T14"><text:s/></text:span></text:p>
          </draw:text-box>
        </draw:frame>
        <draw:frame draw:style-name="gr4" draw:text-style-name="P5" draw:layer="layout" svg:width="0.348cm" svg:height="0.386cm" svg:x="20.007cm" svg:y="27.09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20.007cm" svg:y="27.611cm">
          <draw:text-box>
            <text:p text:style-name="P3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12:18:53.514640148</dc:date>
    <meta:editing-duration>PT11M4S</meta:editing-duration>
    <meta:editing-cycles>7</meta:editing-cycles>
    <meta:generator>LibreOffice/25.2.7.2$Linux_X86_64 LibreOffice_project/520$Build-2</meta:generator>
    <meta:print-date>2026-07-01T17:32:54.843321095</meta:print-date>
    <meta:printed-by>PDF files</meta:printed-by>
    <meta:document-statistic meta:object-count="264"/>
  </office:meta>
</office:document-meta>
</file>
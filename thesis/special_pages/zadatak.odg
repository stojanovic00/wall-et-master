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103ADB5D3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c1c1c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solid" draw:fill-color="#e5e5e5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37cm" fo:min-width="0.13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2f2f2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1c1c1c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e5e5e5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2f2f2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6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Liberation Sans" fo:font-size="12pt" fo:font-style="italic" fo:font-weight="bold" style:font-name-asian="Liberation Sans" style:font-size-asian="12pt" style:font-style-asian="italic" style:font-weight-asian="bold" style:font-name-complex="Liberation Sans" style:font-size-complex="12pt" style:font-style-complex="italic" style:font-weight-complex="bold"/>
    </style:style>
    <style:style style:name="T2" style:family="text">
      <style:text-properties fo:color="#000000" loext:opacity="100%" style:font-name="Liberation Sans" fo:font-size="9.89999961853027pt" fo:font-weight="normal" style:font-name-asian="Liberation Sans" style:font-size-asian="9.89999961853027pt" style:font-weight-asian="normal" style:font-name-complex="Liberation Sans" style:font-size-complex="9.89999961853027pt" style:font-weight-complex="normal"/>
    </style:style>
    <style:style style:name="T3" style:family="text">
      <style:text-properties fo:color="#000000" loext:opacity="100%" style:font-name="Liberation Sans" fo:font-size="9.89999961853027pt" fo:font-weight="bold" style:font-name-asian="Liberation Sans" style:font-size-asian="9.89999961853027pt" style:font-weight-asian="bold" style:font-name-complex="Liberation Sans" style:font-size-complex="9.89999961853027pt" style:font-weight-complex="bold"/>
    </style:style>
    <style:style style:name="T4" style:family="text">
      <style:text-properties fo:color="#000000" loext:opacity="100%" style:font-name="Liberation Sans" fo:font-size="14.1000003814697pt" fo:font-weight="bold" style:font-name-asian="Liberation Sans" style:font-size-asian="14.1000003814697pt" style:font-weight-asian="bold" style:font-name-complex="Liberation Sans" style:font-size-complex="14.1000003814697pt" style:font-weight-complex="bold"/>
    </style:style>
    <style:style style:name="T5" style:family="text">
      <style:text-properties fo:color="#000000" loext:opacity="100%" style:font-name="Liberation Sans" fo:font-size="3.90000009536743pt" fo:font-weight="normal" style:font-name-asian="Liberation Sans" style:font-size-asian="3.90000009536743pt" style:font-weight-asian="normal" style:font-name-complex="Liberation Sans" style:font-size-complex="3.90000009536743pt" style:font-weight-complex="normal"/>
    </style:style>
    <style:style style:name="T6" style:family="text">
      <style:text-properties fo:color="#000000" loext:opacity="100%" style:font-name="Liberation Sans" fo:font-size="9.89999961853027pt" fo:font-style="italic" fo:font-weight="normal" style:font-name-asian="Liberation Sans" style:font-size-asian="9.89999961853027pt" style:font-style-asian="italic" style:font-weight-asian="normal" style:font-name-complex="Liberation Sans" style:font-size-complex="9.89999961853027pt" style:font-style-complex="italic" style:font-weight-complex="normal"/>
    </style:style>
    <style:style style:name="T7" style:family="text">
      <style:text-properties fo:color="#000000" loext:opacity="100%" style:font-name="Liberation Sans" fo:font-size="13pt" fo:font-weight="normal" style:font-name-asian="Liberation Sans" style:font-size-asian="13pt" style:font-weight-asian="normal" style:font-name-complex="Liberation Sans" style:font-size-complex="13pt" style:font-weight-complex="normal"/>
    </style:style>
    <style:style style:name="T8" style:family="text">
      <style:text-properties fo:color="#000000" loext:opacity="100%" style:font-name="Liberation Sans" fo:font-size="6pt" fo:font-weight="normal" style:font-name-asian="Liberation Sans" style:font-size-asian="6pt" style:font-weight-asian="normal" style:font-name-complex="Liberation Sans" style:font-size-complex="6pt" style:font-weight-complex="normal"/>
    </style:style>
    <style:style style:name="T9" style:family="text">
      <style:text-properties fo:color="#000000" loext:opacity="100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10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11" style:family="text">
      <style:text-properties fo:color="#000000" loext:opacity="100%" style:font-name="Liberation Sans" fo:font-size="14pt" fo:font-style="italic" fo:font-weight="bold" style:font-name-asian="Liberation Sans" style:font-size-asian="14pt" style:font-style-asian="italic" style:font-weight-asian="bold" style:font-name-complex="Liberation Sans" style:font-size-complex="14pt" style:font-style-complex="italic" style:font-weight-complex="bold"/>
    </style:style>
    <style:style style:name="T12" style:family="text">
      <style:text-properties fo:color="#000000" loext:opacity="100%" style:font-name="Liberation Sans" fo:font-size="8.10000038146973pt" fo:font-weight="normal" style:font-name-asian="Liberation Sans" style:font-size-asian="8.10000038146973pt" style:font-weight-asian="normal" style:font-name-complex="Liberation Sans" style:font-size-complex="8.10000038146973pt" style:font-weight-complex="normal"/>
    </style:style>
    <style:style style:name="T13" style:family="text">
      <style:text-properties fo:color="#000000" loext:opacity="100%" style:font-name="Logix" fo:font-size="14.1000003814697pt" fo:font-weight="normal" style:font-name-asian="Logix" style:font-size-asian="14.1000003814697pt" style:font-weight-asian="normal" style:font-name-complex="Logix" style:font-size-complex="14.1000003814697pt" style:font-weight-complex="normal"/>
    </style:style>
    <style:style style:name="T14" style:family="text">
      <style:text-properties fo:color="#000000" loext:opacity="100%" style:font-name="Liberation Sans" fo:font-size="1pt" fo:font-weight="normal" style:font-name-asian="Liberation Sans" style:font-size-asian="1pt" style:font-weight-asian="normal" style:font-name-complex="Liberation Sans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03cm" svg:x="0cm" svg:y="0cm" svg:viewBox="0 0 21000 29704" draw:points="0,0 21000,0 21000,29704 0,29704">
          <text:p/>
        </draw:polygon>
        <draw:polygon draw:style-name="gr2" draw:text-style-name="P2" draw:layer="layout" svg:width="20.999cm" svg:height="29.703cm" svg:x="0cm" svg:y="0cm" svg:viewBox="0 0 21000 29704" draw:points="0,0 21000,0 21000,29704 0,29704">
          <text:p/>
        </draw:polygon>
        <draw:frame draw:style-name="gr3" draw:text-style-name="P3" draw:layer="layout" svg:width="2.165cm" svg:height="2.389cm" svg:x="2.667cm" svg:y="1.716cm">
          <draw:image xlink:href="Pictures/10000000000000ED00000103ADB5D3D0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0.007cm" svg:y="1.018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0.348cm" svg:height="0.386cm" svg:x="4.835cm" svg:y="3.792cm">
          <draw:text-box>
            <text:p text:style-name="P4"><text:span text:style-name="T2"><text:s/></text:span></text:p>
          </draw:text-box>
        </draw:frame>
        <draw:polygon draw:style-name="gr6" draw:text-style-name="P7" draw:layer="layout" svg:width="0.052cm" svg:height="0.058cm" svg:x="2.476cm" svg:y="1.59cm" svg:viewBox="0 0 53 59" draw:points="0,0 53,0 53,59 0,59">
          <text:p/>
        </draw:polygon>
        <draw:polygon draw:style-name="gr6" draw:text-style-name="P7" draw:layer="layout" svg:width="0.052cm" svg:height="0.054cm" svg:x="2.476cm" svg:y="1.59cm" svg:viewBox="0 0 53 55" draw:points="0,0 53,0 53,55 0,55">
          <text:p/>
        </draw:polygon>
        <draw:polygon draw:style-name="gr6" draw:text-style-name="P7" draw:layer="layout" svg:width="2.451cm" svg:height="0.054cm" svg:x="2.528cm" svg:y="1.59cm" svg:viewBox="0 0 2452 55" draw:points="0,0 2452,0 2452,55 0,55">
          <text:p/>
        </draw:polygon>
        <draw:polygon draw:style-name="gr6" draw:text-style-name="P7" draw:layer="layout" svg:width="0.052cm" svg:height="0.007cm" svg:x="4.978cm" svg:y="1.642cm" svg:viewBox="0 0 53 8" draw:points="0,0 53,0 53,8 0,8">
          <text:p/>
        </draw:polygon>
        <draw:polygon draw:style-name="gr6" draw:text-style-name="P7" draw:layer="layout" svg:width="0.052cm" svg:height="0.054cm" svg:x="4.978cm" svg:y="1.59cm" svg:viewBox="0 0 53 55" draw:points="0,0 53,0 53,55 0,55">
          <text:p/>
        </draw:polygon>
        <draw:polygon draw:style-name="gr6" draw:text-style-name="P7" draw:layer="layout" svg:width="10.956cm" svg:height="0.054cm" svg:x="5.028cm" svg:y="1.59cm" svg:viewBox="0 0 10957 55" draw:points="0,0 10957,0 10957,55 0,55">
          <text:p/>
        </draw:polygon>
        <draw:polygon draw:style-name="gr6" draw:text-style-name="P7" draw:layer="layout" svg:width="0.052cm" svg:height="0.007cm" svg:x="15.984cm" svg:y="1.642cm" svg:viewBox="0 0 53 8" draw:points="0,0 53,0 53,8 0,8">
          <text:p/>
        </draw:polygon>
        <draw:polygon draw:style-name="gr6" draw:text-style-name="P7" draw:layer="layout" svg:width="0.052cm" svg:height="0.054cm" svg:x="15.984cm" svg:y="1.59cm" svg:viewBox="0 0 53 55" draw:points="0,0 53,0 53,55 0,55">
          <text:p/>
        </draw:polygon>
        <draw:polygon draw:style-name="gr6" draw:text-style-name="P7" draw:layer="layout" svg:width="3.952cm" svg:height="0.054cm" svg:x="16.033cm" svg:y="1.59cm" svg:viewBox="0 0 3953 55" draw:points="0,0 3953,0 3953,55 0,55">
          <text:p/>
        </draw:polygon>
        <draw:polygon draw:style-name="gr6" draw:text-style-name="P7" draw:layer="layout" svg:width="0.053cm" svg:height="0.058cm" svg:x="19.984cm" svg:y="1.59cm" svg:viewBox="0 0 54 59" draw:points="0,0 54,0 54,59 0,59">
          <text:p/>
        </draw:polygon>
        <draw:polygon draw:style-name="gr6" draw:text-style-name="P7" draw:layer="layout" svg:width="0.053cm" svg:height="0.054cm" svg:x="19.984cm" svg:y="1.59cm" svg:viewBox="0 0 54 55" draw:points="0,0 54,0 54,55 0,55">
          <text:p/>
        </draw:polygon>
        <draw:polygon draw:style-name="gr6" draw:text-style-name="P7" draw:layer="layout" svg:width="0.052cm" svg:height="0.609cm" svg:x="2.476cm" svg:y="1.645cm" svg:viewBox="0 0 53 610" draw:points="0,0 53,0 53,610 0,610">
          <text:p/>
        </draw:polygon>
        <draw:polygon draw:style-name="gr6" draw:text-style-name="P7" draw:layer="layout" svg:width="0.052cm" svg:height="0.609cm" svg:x="4.978cm" svg:y="1.645cm" svg:viewBox="0 0 53 610" draw:points="0,0 53,0 53,610 0,610">
          <text:p/>
        </draw:polygon>
        <draw:polygon draw:style-name="gr6" draw:text-style-name="P7" draw:layer="layout" svg:width="0.052cm" svg:height="0.609cm" svg:x="15.984cm" svg:y="1.645cm" svg:viewBox="0 0 53 610" draw:points="0,0 53,0 53,610 0,610">
          <text:p/>
        </draw:polygon>
        <draw:polygon draw:style-name="gr6" draw:text-style-name="P7" draw:layer="layout" svg:width="0.053cm" svg:height="0.609cm" svg:x="19.984cm" svg:y="1.645cm" svg:viewBox="0 0 54 610" draw:points="0,0 54,0 54,610 0,610">
          <text:p/>
        </draw:polygon>
        <draw:frame draw:style-name="gr5" draw:text-style-name="P6" draw:layer="layout" svg:width="11.036cm" svg:height="0.386cm" svg:x="5.067cm" svg:y="1.87cm">
          <draw:text-box>
            <text:p text:style-name="P4"><text:span text:style-name="T2">УНИВЕРЗИТЕТ У НОВОМ САДУ <text:s/></text:span><text:span text:style-name="T3">ФАКУЛТЕТ ТЕХНИЧКИХ НАУКА <text:s/></text:span></text:p>
          </draw:text-box>
        </draw:frame>
        <draw:polygon draw:style-name="gr6" draw:text-style-name="P7" draw:layer="layout" svg:width="0.052cm" svg:height="0.021cm" svg:x="2.476cm" svg:y="2.251cm" svg:viewBox="0 0 53 22" draw:points="0,0 53,0 53,22 0,22">
          <text:p/>
        </draw:polygon>
        <draw:polygon draw:style-name="gr6" draw:text-style-name="P7" draw:layer="layout" svg:width="0.052cm" svg:height="0.021cm" svg:x="4.978cm" svg:y="2.251cm" svg:viewBox="0 0 53 22" draw:points="0,0 53,0 53,22 0,22">
          <text:p/>
        </draw:polygon>
        <draw:polygon draw:style-name="gr6" draw:text-style-name="P7" draw:layer="layout" svg:width="0.052cm" svg:height="0.021cm" svg:x="15.984cm" svg:y="2.251cm" svg:viewBox="0 0 53 22" draw:points="0,0 53,0 53,22 0,22">
          <text:p/>
        </draw:polygon>
        <draw:polygon draw:style-name="gr6" draw:text-style-name="P7" draw:layer="layout" svg:width="3.952cm" svg:height="0.021cm" svg:x="16.033cm" svg:y="2.251cm" svg:viewBox="0 0 3953 22" draw:points="0,0 3953,0 3953,22 0,22">
          <text:p/>
        </draw:polygon>
        <draw:polygon draw:style-name="gr6" draw:text-style-name="P7" draw:layer="layout" svg:width="0.053cm" svg:height="0.021cm" svg:x="19.984cm" svg:y="2.251cm" svg:viewBox="0 0 54 22" draw:points="0,0 54,0 54,22 0,22">
          <text:p/>
        </draw:polygon>
        <draw:polygon draw:style-name="gr6" draw:text-style-name="P7" draw:layer="layout" svg:width="0.052cm" svg:height="0.611cm" svg:x="2.476cm" svg:y="2.269cm" svg:viewBox="0 0 53 612" draw:points="0,0 53,0 53,612 0,612">
          <text:p/>
        </draw:polygon>
        <draw:polygon draw:style-name="gr6" draw:text-style-name="P7" draw:layer="layout" svg:width="0.052cm" svg:height="0.611cm" svg:x="4.978cm" svg:y="2.269cm" svg:viewBox="0 0 53 612" draw:points="0,0 53,0 53,612 0,612">
          <text:p/>
        </draw:polygon>
        <draw:polygon draw:style-name="gr6" draw:text-style-name="P7" draw:layer="layout" svg:width="0.052cm" svg:height="0.611cm" svg:x="15.984cm" svg:y="2.269cm" svg:viewBox="0 0 53 612" draw:points="0,0 53,0 53,612 0,612">
          <text:p/>
        </draw:polygon>
        <draw:polygon draw:style-name="gr6" draw:text-style-name="P7" draw:layer="layout" svg:width="0.053cm" svg:height="0.611cm" svg:x="19.984cm" svg:y="2.269cm" svg:viewBox="0 0 54 612" draw:points="0,0 54,0 54,612 0,612">
          <text:p/>
        </draw:polygon>
        <draw:polygon draw:style-name="gr7" draw:text-style-name="P8" draw:layer="layout" svg:width="10.951cm" svg:height="1.256cm" svg:x="5.028cm" svg:y="2.932cm" svg:viewBox="0 0 10952 1257" draw:points="0,0 10952,0 10952,1257 0,1257">
          <text:p/>
        </draw:polygon>
        <draw:polygon draw:style-name="gr7" draw:text-style-name="P8" draw:layer="layout" svg:width="10.951cm" svg:height="0.569cm" svg:x="5.028cm" svg:y="3.276cm" svg:viewBox="0 0 10952 570" draw:points="0,0 10952,0 10952,570 0,570">
          <text:p/>
        </draw:polygon>
        <draw:frame draw:style-name="gr5" draw:text-style-name="P6" draw:layer="layout" svg:width="8.098cm" svg:height="0.386cm" svg:x="5.75cm" svg:y="2.31cm">
          <draw:text-box>
            <text:p text:style-name="P4"><text:span text:style-name="T2">21000 НОВИ СА Д, Трг Д оситеја Обрадов и ћа 6 <text:s/></text:span></text:p>
          </draw:text-box>
        </draw:frame>
        <draw:frame draw:style-name="gr5" draw:text-style-name="P6" draw:layer="layout" svg:width="0.886cm" svg:height="0.386cm" svg:x="16.255cm" svg:y="1.764cm">
          <draw:text-box>
            <text:p text:style-name="P4"><text:span text:style-name="T2">Број: </text:span></text:p>
          </draw:text-box>
        </draw:frame>
        <draw:polygon draw:style-name="gr6" draw:text-style-name="P7" draw:layer="layout" svg:width="0.052cm" svg:height="0.057cm" svg:x="2.476cm" svg:y="2.878cm" svg:viewBox="0 0 53 58" draw:points="0,0 53,0 53,58 0,58">
          <text:p/>
        </draw:polygon>
        <draw:polygon draw:style-name="gr6" draw:text-style-name="P7" draw:layer="layout" svg:width="0.052cm" svg:height="0.057cm" svg:x="4.978cm" svg:y="2.878cm" svg:viewBox="0 0 53 58" draw:points="0,0 53,0 53,58 0,58">
          <text:p/>
        </draw:polygon>
        <draw:polygon draw:style-name="gr6" draw:text-style-name="P7" draw:layer="layout" svg:width="10.956cm" svg:height="0.052cm" svg:x="5.028cm" svg:y="2.878cm" svg:viewBox="0 0 10957 53" draw:points="0,0 10957,0 10957,53 0,53">
          <text:p/>
        </draw:polygon>
        <draw:polygon draw:style-name="gr7" draw:text-style-name="P8" draw:layer="layout" svg:width="10.956cm" svg:height="0.006cm" svg:x="5.028cm" svg:y="2.929cm" svg:viewBox="0 0 10957 7" draw:points="0,0 10957,0 10957,7 0,7">
          <text:p/>
        </draw:polygon>
        <draw:polygon draw:style-name="gr6" draw:text-style-name="P7" draw:layer="layout" svg:width="0.052cm" svg:height="0.057cm" svg:x="15.984cm" svg:y="2.878cm" svg:viewBox="0 0 53 58" draw:points="0,0 53,0 53,58 0,58">
          <text:p/>
        </draw:polygon>
        <draw:polygon draw:style-name="gr6" draw:text-style-name="P7" draw:layer="layout" svg:width="3.952cm" svg:height="0.052cm" svg:x="16.033cm" svg:y="2.878cm" svg:viewBox="0 0 3953 53" draw:points="0,0 3953,0 3953,53 0,53">
          <text:p/>
        </draw:polygon>
        <draw:polygon draw:style-name="gr6" draw:text-style-name="P7" draw:layer="layout" svg:width="0.053cm" svg:height="0.057cm" svg:x="19.984cm" svg:y="2.878cm" svg:viewBox="0 0 54 58" draw:points="0,0 54,0 54,58 0,58">
          <text:p/>
        </draw:polygon>
        <draw:polygon draw:style-name="gr6" draw:text-style-name="P7" draw:layer="layout" svg:width="0.052cm" svg:height="0.614cm" svg:x="2.476cm" svg:y="2.932cm" svg:viewBox="0 0 53 615" draw:points="0,0 53,0 53,615 0,615">
          <text:p/>
        </draw:polygon>
        <draw:polygon draw:style-name="gr6" draw:text-style-name="P7" draw:layer="layout" svg:width="0.052cm" svg:height="0.614cm" svg:x="4.978cm" svg:y="2.932cm" svg:viewBox="0 0 53 615" draw:points="0,0 53,0 53,615 0,615">
          <text:p/>
        </draw:polygon>
        <draw:polygon draw:style-name="gr6" draw:text-style-name="P7" draw:layer="layout" svg:width="0.052cm" svg:height="0.614cm" svg:x="15.984cm" svg:y="2.932cm" svg:viewBox="0 0 53 615" draw:points="0,0 53,0 53,615 0,615">
          <text:p/>
        </draw:polygon>
        <draw:polygon draw:style-name="gr6" draw:text-style-name="P7" draw:layer="layout" svg:width="0.053cm" svg:height="0.614cm" svg:x="19.984cm" svg:y="2.932cm" svg:viewBox="0 0 54 615" draw:points="0,0 54,0 54,615 0,615">
          <text:p/>
        </draw:polygon>
        <draw:frame draw:style-name="gr5" draw:text-style-name="P6" draw:layer="layout" svg:width="2.067cm" svg:height="0.386cm" svg:x="16.255cm" svg:y="2.386cm">
          <draw:text-box>
            <text:p text:style-name="P4"><text:span text:style-name="T2">Е2 119/2023 </text:span></text:p>
          </draw:text-box>
        </draw:frame>
        <draw:polygon draw:style-name="gr6" draw:text-style-name="P7" draw:layer="layout" svg:width="0.052cm" svg:height="0.035cm" svg:x="2.476cm" svg:y="3.544cm" svg:viewBox="0 0 53 36" draw:points="0,0 53,0 53,36 0,36">
          <text:p/>
        </draw:polygon>
        <draw:polygon draw:style-name="gr6" draw:text-style-name="P7" draw:layer="layout" svg:width="0.052cm" svg:height="0.035cm" svg:x="4.978cm" svg:y="3.544cm" svg:viewBox="0 0 53 36" draw:points="0,0 53,0 53,36 0,36">
          <text:p/>
        </draw:polygon>
        <draw:polygon draw:style-name="gr6" draw:text-style-name="P7" draw:layer="layout" svg:width="0.052cm" svg:height="0.035cm" svg:x="15.984cm" svg:y="3.544cm" svg:viewBox="0 0 53 36" draw:points="0,0 53,0 53,36 0,36">
          <text:p/>
        </draw:polygon>
        <draw:polygon draw:style-name="gr6" draw:text-style-name="P7" draw:layer="layout" svg:width="3.952cm" svg:height="0.035cm" svg:x="16.033cm" svg:y="3.544cm" svg:viewBox="0 0 3953 36" draw:points="0,0 3953,0 3953,36 0,36">
          <text:p/>
        </draw:polygon>
        <draw:polygon draw:style-name="gr6" draw:text-style-name="P7" draw:layer="layout" svg:width="0.053cm" svg:height="0.035cm" svg:x="19.984cm" svg:y="3.544cm" svg:viewBox="0 0 54 36" draw:points="0,0 54,0 54,36 0,36">
          <text:p/>
        </draw:polygon>
        <draw:polygon draw:style-name="gr6" draw:text-style-name="P7" draw:layer="layout" svg:width="0.052cm" svg:height="0.612cm" svg:x="2.476cm" svg:y="3.576cm" svg:viewBox="0 0 53 613" draw:points="0,0 53,0 53,613 0,613">
          <text:p/>
        </draw:polygon>
        <draw:polygon draw:style-name="gr6" draw:text-style-name="P7" draw:layer="layout" svg:width="0.052cm" svg:height="0.053cm" svg:x="2.476cm" svg:y="4.187cm" svg:viewBox="0 0 53 54" draw:points="0,0 53,0 53,54 0,54">
          <text:p/>
        </draw:polygon>
        <draw:polygon draw:style-name="gr6" draw:text-style-name="P7" draw:layer="layout" svg:width="0.052cm" svg:height="0.053cm" svg:x="2.476cm" svg:y="4.187cm" svg:viewBox="0 0 53 54" draw:points="0,0 53,0 53,54 0,54">
          <text:p/>
        </draw:polygon>
        <draw:polygon draw:style-name="gr6" draw:text-style-name="P7" draw:layer="layout" svg:width="2.451cm" svg:height="0.053cm" svg:x="2.528cm" svg:y="4.187cm" svg:viewBox="0 0 2452 54" draw:points="0,0 2452,0 2452,54 0,54">
          <text:p/>
        </draw:polygon>
        <draw:polygon draw:style-name="gr6" draw:text-style-name="P7" draw:layer="layout" svg:width="0.052cm" svg:height="0.612cm" svg:x="4.978cm" svg:y="3.576cm" svg:viewBox="0 0 53 613" draw:points="0,0 53,0 53,613 0,613">
          <text:p/>
        </draw:polygon>
        <draw:polygon draw:style-name="gr6" draw:text-style-name="P7" draw:layer="layout" svg:width="0.052cm" svg:height="0.053cm" svg:x="4.978cm" svg:y="4.187cm" svg:viewBox="0 0 53 54" draw:points="0,0 53,0 53,54 0,54">
          <text:p/>
        </draw:polygon>
        <draw:polygon draw:style-name="gr6" draw:text-style-name="P7" draw:layer="layout" svg:width="10.956cm" svg:height="0.053cm" svg:x="5.028cm" svg:y="4.187cm" svg:viewBox="0 0 10957 54" draw:points="0,0 10957,0 10957,54 0,54">
          <text:p/>
        </draw:polygon>
        <draw:polygon draw:style-name="gr6" draw:text-style-name="P7" draw:layer="layout" svg:width="0.052cm" svg:height="0.612cm" svg:x="15.984cm" svg:y="3.576cm" svg:viewBox="0 0 53 613" draw:points="0,0 53,0 53,613 0,613">
          <text:p/>
        </draw:polygon>
        <draw:polygon draw:style-name="gr6" draw:text-style-name="P7" draw:layer="layout" svg:width="0.052cm" svg:height="0.053cm" svg:x="15.984cm" svg:y="4.187cm" svg:viewBox="0 0 53 54" draw:points="0,0 53,0 53,54 0,54">
          <text:p/>
        </draw:polygon>
        <draw:polygon draw:style-name="gr6" draw:text-style-name="P7" draw:layer="layout" svg:width="3.952cm" svg:height="0.053cm" svg:x="16.033cm" svg:y="4.187cm" svg:viewBox="0 0 3953 54" draw:points="0,0 3953,0 3953,54 0,54">
          <text:p/>
        </draw:polygon>
        <draw:polygon draw:style-name="gr6" draw:text-style-name="P7" draw:layer="layout" svg:width="0.053cm" svg:height="0.612cm" svg:x="19.984cm" svg:y="3.576cm" svg:viewBox="0 0 54 613" draw:points="0,0 54,0 54,613 0,613">
          <text:p/>
        </draw:polygon>
        <draw:polygon draw:style-name="gr6" draw:text-style-name="P7" draw:layer="layout" svg:width="0.053cm" svg:height="0.053cm" svg:x="19.984cm" svg:y="4.187cm" svg:viewBox="0 0 54 54" draw:points="0,0 54,0 54,54 0,54">
          <text:p/>
        </draw:polygon>
        <draw:polygon draw:style-name="gr6" draw:text-style-name="P7" draw:layer="layout" svg:width="0.053cm" svg:height="0.053cm" svg:x="19.984cm" svg:y="4.187cm" svg:viewBox="0 0 54 54" draw:points="0,0 54,0 54,54 0,54">
          <text:p/>
        </draw:polygon>
        <draw:frame draw:style-name="gr8" draw:text-style-name="P9" draw:layer="layout" svg:width="6.694cm" svg:height="0.556cm" svg:x="7.355cm" svg:y="3.288cm">
          <draw:text-box>
            <text:p text:style-name="P4"><text:span text:style-name="T4">ЗАДАТАК ЗА МАСТЕР РАД </text:span></text:p>
          </draw:text-box>
        </draw:frame>
        <draw:frame draw:style-name="gr5" draw:text-style-name="P6" draw:layer="layout" svg:width="1.194cm" svg:height="0.386cm" svg:x="16.255cm" svg:y="3.051cm">
          <draw:text-box>
            <text:p text:style-name="P4"><text:span text:style-name="T2">Датум: </text:span></text:p>
          </draw:text-box>
        </draw:frame>
        <draw:frame draw:style-name="gr5" draw:text-style-name="P6" draw:layer="layout" svg:width="0.348cm" svg:height="0.386cm" svg:x="16.255cm" svg:y="3.695cm">
          <draw:text-box>
            <text:p text:style-name="P4"><text:span text:style-name="T2"><text:s/></text:span></text:p>
          </draw:text-box>
        </draw:frame>
        <draw:frame draw:style-name="gr9" draw:text-style-name="P10" draw:layer="layout" svg:width="0.137cm" svg:height="0.158cm" svg:x="2.503cm" svg:y="4.247cm">
          <draw:text-box>
            <text:p text:style-name="P4"><text:span text:style-name="T5"><text:s/></text:span></text:p>
          </draw:text-box>
        </draw:frame>
        <draw:frame draw:style-name="gr5" draw:text-style-name="P6" draw:layer="layout" svg:width="8.267cm" svg:height="0.386cm" svg:x="11.72cm" svg:y="4.626cm">
          <draw:text-box>
            <text:p text:style-name="P4"><text:span text:style-name="T6">(Податке уноси предметни наставник - ментор) </text:span></text:p>
          </draw:text-box>
        </draw:frame>
        <draw:polygon draw:style-name="gr6" draw:text-style-name="P7" draw:layer="layout" svg:width="0.052cm" svg:height="0.057cm" svg:x="2.476cm" svg:y="5.123cm" svg:viewBox="0 0 53 58" draw:points="0,0 53,0 53,58 0,58">
          <text:p/>
        </draw:polygon>
        <draw:polygon draw:style-name="gr6" draw:text-style-name="P7" draw:layer="layout" svg:width="0.052cm" svg:height="0.052cm" svg:x="2.476cm" svg:y="5.123cm" svg:viewBox="0 0 53 53" draw:points="0,0 53,0 53,53 0,53">
          <text:p/>
        </draw:polygon>
        <draw:polygon draw:style-name="gr6" draw:text-style-name="P7" draw:layer="layout" svg:width="3.718cm" svg:height="0.052cm" svg:x="2.528cm" svg:y="5.123cm" svg:viewBox="0 0 3719 53" draw:points="0,0 3719,0 3719,53 0,53">
          <text:p/>
        </draw:polygon>
        <draw:polygon draw:style-name="gr6" draw:text-style-name="P7" draw:layer="layout" svg:width="0.02cm" svg:height="0.009cm" svg:x="6.243cm" svg:y="5.172cm" svg:viewBox="0 0 21 10" draw:points="0,0 21,0 21,10 0,10">
          <text:p/>
        </draw:polygon>
        <draw:polygon draw:style-name="gr6" draw:text-style-name="P7" draw:layer="layout" svg:width="0.052cm" svg:height="0.052cm" svg:x="6.243cm" svg:y="5.123cm" svg:viewBox="0 0 53 53" draw:points="0,0 53,0 53,53 0,53">
          <text:p/>
        </draw:polygon>
        <draw:polygon draw:style-name="gr6" draw:text-style-name="P7" draw:layer="layout" svg:width="13.69cm" svg:height="0.052cm" svg:x="6.295cm" svg:y="5.123cm" svg:viewBox="0 0 13691 53" draw:points="0,0 13691,0 13691,53 0,53">
          <text:p/>
        </draw:polygon>
        <draw:polygon draw:style-name="gr6" draw:text-style-name="P7" draw:layer="layout" svg:width="0.053cm" svg:height="0.057cm" svg:x="19.984cm" svg:y="5.123cm" svg:viewBox="0 0 54 58" draw:points="0,0 54,0 54,58 0,58">
          <text:p/>
        </draw:polygon>
        <draw:polygon draw:style-name="gr6" draw:text-style-name="P7" draw:layer="layout" svg:width="0.053cm" svg:height="0.052cm" svg:x="19.984cm" svg:y="5.123cm" svg:viewBox="0 0 54 53" draw:points="0,0 54,0 54,53 0,53">
          <text:p/>
        </draw:polygon>
        <draw:polygon draw:style-name="gr6" draw:text-style-name="P7" draw:layer="layout" svg:width="0.052cm" svg:height="1.267cm" svg:x="2.476cm" svg:y="5.178cm" svg:viewBox="0 0 53 1268" draw:points="0,0 53,0 53,1268 0,1268">
          <text:p/>
        </draw:polygon>
        <draw:polygon draw:style-name="gr6" draw:text-style-name="P7" draw:layer="layout" svg:width="0.02cm" svg:height="1.267cm" svg:x="6.243cm" svg:y="5.178cm" svg:viewBox="0 0 21 1268" draw:points="0,0 21,0 21,1268 0,1268">
          <text:p/>
        </draw:polygon>
        <draw:polygon draw:style-name="gr6" draw:text-style-name="P7" draw:layer="layout" svg:width="0.053cm" svg:height="1.267cm" svg:x="19.984cm" svg:y="5.178cm" svg:viewBox="0 0 54 1268" draw:points="0,0 54,0 54,1268 0,1268">
          <text:p/>
        </draw:polygon>
        <draw:frame draw:style-name="gr10" draw:text-style-name="P11" draw:layer="layout" svg:width="2.821cm" svg:height="0.513cm" svg:x="2.693cm" svg:y="5.404cm">
          <draw:text-box>
            <text:p text:style-name="P4"><text:span text:style-name="T7">СТУДИЈСКИ </text:span></text:p>
          </draw:text-box>
        </draw:frame>
        <draw:frame draw:style-name="gr10" draw:text-style-name="P11" draw:layer="layout" svg:width="2.484cm" svg:height="0.513cm" svg:x="2.693cm" svg:y="5.933cm">
          <draw:text-box>
            <text:p text:style-name="P4"><text:span text:style-name="T7">ПРОГРАМ: </text:span></text:p>
          </draw:text-box>
        </draw:frame>
        <draw:frame draw:style-name="gr10" draw:text-style-name="P11" draw:layer="layout" svg:width="5.795cm" svg:height="0.513cm" svg:x="6.444cm" svg:y="5.404cm">
          <draw:text-box>
            <text:p text:style-name="P4"><text:span text:style-name="T7">Рачунарство и аутоматика </text:span></text:p>
          </draw:text-box>
        </draw:frame>
        <draw:frame draw:style-name="gr10" draw:text-style-name="P11" draw:layer="layout" svg:width="3.588cm" svg:height="0.513cm" svg:x="2.693cm" svg:y="6.69cm">
          <draw:text-box>
            <text:p text:style-name="P4"><text:span text:style-name="T7">РУКОВОДИЛАЦ </text:span></text:p>
          </draw:text-box>
        </draw:frame>
        <draw:polygon draw:style-name="gr6" draw:text-style-name="P7" draw:layer="layout" svg:width="0.052cm" svg:height="0.02cm" svg:x="2.476cm" svg:y="6.442cm" svg:viewBox="0 0 53 21" draw:points="0,0 53,0 53,21 0,21">
          <text:p/>
        </draw:polygon>
        <draw:polygon draw:style-name="gr6" draw:text-style-name="P7" draw:layer="layout" svg:width="3.718cm" svg:height="0.02cm" svg:x="2.528cm" svg:y="6.442cm" svg:viewBox="0 0 3719 21" draw:points="0,0 3719,0 3719,21 0,21">
          <text:p/>
        </draw:polygon>
        <draw:polygon draw:style-name="gr6" draw:text-style-name="P7" draw:layer="layout" svg:width="0.02cm" svg:height="0.02cm" svg:x="6.243cm" svg:y="6.442cm" svg:viewBox="0 0 21 21" draw:points="0,0 21,0 21,21 0,21">
          <text:p/>
        </draw:polygon>
        <draw:polygon draw:style-name="gr6" draw:text-style-name="P7" draw:layer="layout" svg:width="13.725cm" svg:height="0.02cm" svg:x="6.26cm" svg:y="6.442cm" svg:viewBox="0 0 13726 21" draw:points="0,0 13726,0 13726,21 0,21">
          <text:p/>
        </draw:polygon>
        <draw:polygon draw:style-name="gr6" draw:text-style-name="P7" draw:layer="layout" svg:width="0.053cm" svg:height="0.02cm" svg:x="19.984cm" svg:y="6.442cm" svg:viewBox="0 0 54 21" draw:points="0,0 54,0 54,21 0,21">
          <text:p/>
        </draw:polygon>
        <draw:polygon draw:style-name="gr6" draw:text-style-name="P7" draw:layer="layout" svg:width="0.052cm" svg:height="2.022cm" svg:x="2.476cm" svg:y="6.46cm" svg:viewBox="0 0 53 2023" draw:points="0,0 53,0 53,2023 0,2023">
          <text:p/>
        </draw:polygon>
        <draw:polygon draw:style-name="gr6" draw:text-style-name="P7" draw:layer="layout" svg:width="0.052cm" svg:height="0.052cm" svg:x="2.476cm" svg:y="8.48cm" svg:viewBox="0 0 53 53" draw:points="0,0 53,0 53,53 0,53">
          <text:p/>
        </draw:polygon>
        <draw:polygon draw:style-name="gr6" draw:text-style-name="P7" draw:layer="layout" svg:width="0.052cm" svg:height="0.052cm" svg:x="2.476cm" svg:y="8.48cm" svg:viewBox="0 0 53 53" draw:points="0,0 53,0 53,53 0,53">
          <text:p/>
        </draw:polygon>
        <draw:polygon draw:style-name="gr6" draw:text-style-name="P7" draw:layer="layout" svg:width="3.718cm" svg:height="0.052cm" svg:x="2.528cm" svg:y="8.48cm" svg:viewBox="0 0 3719 53" draw:points="0,0 3719,0 3719,53 0,53">
          <text:p/>
        </draw:polygon>
        <draw:polygon draw:style-name="gr6" draw:text-style-name="P7" draw:layer="layout" svg:width="0.02cm" svg:height="2.022cm" svg:x="6.243cm" svg:y="6.46cm" svg:viewBox="0 0 21 2023" draw:points="0,0 21,0 21,2023 0,2023">
          <text:p/>
        </draw:polygon>
        <draw:polygon draw:style-name="gr6" draw:text-style-name="P7" draw:layer="layout" svg:width="0.052cm" svg:height="0.052cm" svg:x="6.243cm" svg:y="8.48cm" svg:viewBox="0 0 53 53" draw:points="0,0 53,0 53,53 0,53">
          <text:p/>
        </draw:polygon>
        <draw:polygon draw:style-name="gr6" draw:text-style-name="P7" draw:layer="layout" svg:width="13.69cm" svg:height="0.052cm" svg:x="6.295cm" svg:y="8.48cm" svg:viewBox="0 0 13691 53" draw:points="0,0 13691,0 13691,53 0,53">
          <text:p/>
        </draw:polygon>
        <draw:polygon draw:style-name="gr6" draw:text-style-name="P7" draw:layer="layout" svg:width="0.053cm" svg:height="2.022cm" svg:x="19.984cm" svg:y="6.46cm" svg:viewBox="0 0 54 2023" draw:points="0,0 54,0 54,2023 0,2023">
          <text:p/>
        </draw:polygon>
        <draw:polygon draw:style-name="gr6" draw:text-style-name="P7" draw:layer="layout" svg:width="0.053cm" svg:height="0.052cm" svg:x="19.984cm" svg:y="8.48cm" svg:viewBox="0 0 54 53" draw:points="0,0 54,0 54,53 0,53">
          <text:p/>
        </draw:polygon>
        <draw:polygon draw:style-name="gr6" draw:text-style-name="P7" draw:layer="layout" svg:width="0.053cm" svg:height="0.052cm" svg:x="19.984cm" svg:y="8.48cm" svg:viewBox="0 0 54 53" draw:points="0,0 54,0 54,53 0,53">
          <text:p/>
        </draw:polygon>
        <draw:frame draw:style-name="gr10" draw:text-style-name="P11" draw:layer="layout" svg:width="3.095cm" svg:height="0.513cm" svg:x="2.693cm" svg:y="7.215cm">
          <draw:text-box>
            <text:p text:style-name="P4"><text:span text:style-name="T7">СТУДИЈСКОГ </text:span></text:p>
          </draw:text-box>
        </draw:frame>
        <draw:frame draw:style-name="gr10" draw:text-style-name="P11" draw:layer="layout" svg:width="2.789cm" svg:height="0.513cm" svg:x="2.693cm" svg:y="7.745cm">
          <draw:text-box>
            <text:p text:style-name="P4"><text:span text:style-name="T7">ПРОГРАМА: </text:span></text:p>
          </draw:text-box>
        </draw:frame>
        <draw:frame draw:style-name="gr10" draw:text-style-name="P11" draw:layer="layout" svg:width="6.115cm" svg:height="0.513cm" svg:x="6.444cm" svg:y="6.69cm">
          <draw:text-box>
            <text:p text:style-name="P4"><text:span text:style-name="T7">проф. др. Милан Видаковић </text:span></text:p>
          </draw:text-box>
        </draw:frame>
        <draw:frame draw:style-name="gr11" draw:text-style-name="P12" draw:layer="layout" svg:width="0.211cm" svg:height="0.239cm" svg:x="2.503cm" svg:y="8.541cm">
          <draw:text-box>
            <text:p text:style-name="P4"><text:span text:style-name="T8"><text:s/></text:span></text:p>
          </draw:text-box>
        </draw:frame>
        <draw:frame draw:style-name="gr5" draw:text-style-name="P6" draw:layer="layout" svg:width="1.524cm" svg:height="0.386cm" svg:x="2.693cm" svg:y="8.966cm">
          <draw:text-box>
            <text:p text:style-name="P4"><text:span text:style-name="T2">Студент: </text:span></text:p>
          </draw:text-box>
        </draw:frame>
        <draw:polygon draw:style-name="gr6" draw:text-style-name="P7" draw:layer="layout" svg:width="0.052cm" svg:height="0.057cm" svg:x="2.476cm" svg:y="8.78cm" svg:viewBox="0 0 53 58" draw:points="0,0 53,0 53,58 0,58">
          <text:p/>
        </draw:polygon>
        <draw:polygon draw:style-name="gr6" draw:text-style-name="P7" draw:layer="layout" svg:width="0.052cm" svg:height="0.052cm" svg:x="2.476cm" svg:y="8.78cm" svg:viewBox="0 0 53 53" draw:points="0,0 53,0 53,53 0,53">
          <text:p/>
        </draw:polygon>
        <draw:polygon draw:style-name="gr6" draw:text-style-name="P7" draw:layer="layout" svg:width="2.984cm" svg:height="0.052cm" svg:x="2.528cm" svg:y="8.78cm" svg:viewBox="0 0 2985 53" draw:points="0,0 2985,0 2985,53 0,53">
          <text:p/>
        </draw:polygon>
        <draw:polygon draw:style-name="gr6" draw:text-style-name="P7" draw:layer="layout" svg:width="0.018cm" svg:height="0.006cm" svg:x="5.512cm" svg:y="8.831cm" svg:viewBox="0 0 19 7" draw:points="0,0 19,0 19,7 0,7">
          <text:p/>
        </draw:polygon>
        <draw:polygon draw:style-name="gr6" draw:text-style-name="P7" draw:layer="layout" svg:width="0.052cm" svg:height="0.052cm" svg:x="5.512cm" svg:y="8.78cm" svg:viewBox="0 0 53 53" draw:points="0,0 53,0 53,53 0,53">
          <text:p/>
        </draw:polygon>
        <draw:polygon draw:style-name="gr6" draw:text-style-name="P7" draw:layer="layout" svg:width="7.686cm" svg:height="0.052cm" svg:x="5.562cm" svg:y="8.78cm" svg:viewBox="0 0 7687 53" draw:points="0,0 7687,0 7687,53 0,53">
          <text:p/>
        </draw:polygon>
        <draw:polygon draw:style-name="gr6" draw:text-style-name="P7" draw:layer="layout" svg:width="0.017cm" svg:height="0.006cm" svg:x="13.248cm" svg:y="8.831cm" svg:viewBox="0 0 18 7" draw:points="0,0 18,0 18,7 0,7">
          <text:p/>
        </draw:polygon>
        <draw:polygon draw:style-name="gr6" draw:text-style-name="P7" draw:layer="layout" svg:width="0.052cm" svg:height="0.052cm" svg:x="13.248cm" svg:y="8.78cm" svg:viewBox="0 0 53 53" draw:points="0,0 53,0 53,53 0,53">
          <text:p/>
        </draw:polygon>
        <draw:polygon draw:style-name="gr6" draw:text-style-name="P7" draw:layer="layout" svg:width="2.702cm" svg:height="0.052cm" svg:x="13.299cm" svg:y="8.78cm" svg:viewBox="0 0 2703 53" draw:points="0,0 2703,0 2703,53 0,53">
          <text:p/>
        </draw:polygon>
        <draw:polygon draw:style-name="gr6" draw:text-style-name="P7" draw:layer="layout" svg:width="0.018cm" svg:height="0.006cm" svg:x="16.001cm" svg:y="8.831cm" svg:viewBox="0 0 19 7" draw:points="0,0 19,0 19,7 0,7">
          <text:p/>
        </draw:polygon>
        <draw:polygon draw:style-name="gr6" draw:text-style-name="P7" draw:layer="layout" svg:width="0.052cm" svg:height="0.052cm" svg:x="16.001cm" svg:y="8.78cm" svg:viewBox="0 0 53 53" draw:points="0,0 53,0 53,53 0,53">
          <text:p/>
        </draw:polygon>
        <draw:polygon draw:style-name="gr6" draw:text-style-name="P7" draw:layer="layout" svg:width="3.934cm" svg:height="0.052cm" svg:x="16.051cm" svg:y="8.78cm" svg:viewBox="0 0 3935 53" draw:points="0,0 3935,0 3935,53 0,53">
          <text:p/>
        </draw:polygon>
        <draw:polygon draw:style-name="gr6" draw:text-style-name="P7" draw:layer="layout" svg:width="0.053cm" svg:height="0.057cm" svg:x="19.984cm" svg:y="8.78cm" svg:viewBox="0 0 54 58" draw:points="0,0 54,0 54,58 0,58">
          <text:p/>
        </draw:polygon>
        <draw:polygon draw:style-name="gr6" draw:text-style-name="P7" draw:layer="layout" svg:width="0.053cm" svg:height="0.052cm" svg:x="19.984cm" svg:y="8.78cm" svg:viewBox="0 0 54 53" draw:points="0,0 54,0 54,53 0,53">
          <text:p/>
        </draw:polygon>
        <draw:polygon draw:style-name="gr6" draw:text-style-name="P7" draw:layer="layout" svg:width="0.052cm" svg:height="0.65cm" svg:x="2.476cm" svg:y="8.835cm" svg:viewBox="0 0 53 651" draw:points="0,0 53,0 53,651 0,651">
          <text:p/>
        </draw:polygon>
        <draw:polygon draw:style-name="gr6" draw:text-style-name="P7" draw:layer="layout" svg:width="0.018cm" svg:height="0.65cm" svg:x="5.512cm" svg:y="8.835cm" svg:viewBox="0 0 19 651" draw:points="0,0 19,0 19,651 0,651">
          <text:p/>
        </draw:polygon>
        <draw:polygon draw:style-name="gr6" draw:text-style-name="P7" draw:layer="layout" svg:width="0.017cm" svg:height="0.65cm" svg:x="13.248cm" svg:y="8.835cm" svg:viewBox="0 0 18 651" draw:points="0,0 18,0 18,651 0,651">
          <text:p/>
        </draw:polygon>
        <draw:polygon draw:style-name="gr6" draw:text-style-name="P7" draw:layer="layout" svg:width="0.018cm" svg:height="0.65cm" svg:x="16.001cm" svg:y="8.835cm" svg:viewBox="0 0 19 651" draw:points="0,0 19,0 19,651 0,651">
          <text:p/>
        </draw:polygon>
        <draw:polygon draw:style-name="gr6" draw:text-style-name="P7" draw:layer="layout" svg:width="0.053cm" svg:height="0.65cm" svg:x="19.984cm" svg:y="8.835cm" svg:viewBox="0 0 54 651" draw:points="0,0 54,0 54,651 0,651">
          <text:p/>
        </draw:polygon>
        <draw:frame draw:style-name="gr5" draw:text-style-name="P6" draw:layer="layout" svg:width="3.854cm" svg:height="0.386cm" svg:x="5.707cm" svg:y="8.966cm">
          <draw:text-box>
            <text:p text:style-name="P4"><text:span text:style-name="T2">Александар Стојановић</text:span></text:p>
          </draw:text-box>
        </draw:frame>
        <draw:frame draw:style-name="gr5" draw:text-style-name="P6" draw:layer="layout" svg:width="2.282cm" svg:height="0.386cm" svg:x="13.448cm" svg:y="8.966cm">
          <draw:text-box>
            <text:p text:style-name="P4"><text:span text:style-name="T2">Број индекса: </text:span></text:p>
          </draw:text-box>
        </draw:frame>
        <draw:polygon draw:style-name="gr6" draw:text-style-name="P7" draw:layer="layout" svg:width="0.052cm" svg:height="0.018cm" svg:x="2.476cm" svg:y="9.484cm" svg:viewBox="0 0 53 19" draw:points="0,0 53,0 53,19 0,19">
          <text:p/>
        </draw:polygon>
        <draw:polygon draw:style-name="gr6" draw:text-style-name="P7" draw:layer="layout" svg:width="2.984cm" svg:height="0.018cm" svg:x="2.528cm" svg:y="9.484cm" svg:viewBox="0 0 2985 19" draw:points="0,0 2985,0 2985,19 0,19">
          <text:p/>
        </draw:polygon>
        <draw:polygon draw:style-name="gr6" draw:text-style-name="P7" draw:layer="layout" svg:width="0.018cm" svg:height="0.018cm" svg:x="5.512cm" svg:y="9.484cm" svg:viewBox="0 0 19 19" draw:points="0,0 19,0 19,19 0,19">
          <text:p/>
        </draw:polygon>
        <draw:polygon draw:style-name="gr6" draw:text-style-name="P7" draw:layer="layout" svg:width="7.719cm" svg:height="0.018cm" svg:x="5.529cm" svg:y="9.484cm" svg:viewBox="0 0 7720 19" draw:points="0,0 7720,0 7720,19 0,19">
          <text:p/>
        </draw:polygon>
        <draw:polygon draw:style-name="gr6" draw:text-style-name="P7" draw:layer="layout" svg:width="0.017cm" svg:height="0.018cm" svg:x="13.248cm" svg:y="9.484cm" svg:viewBox="0 0 18 19" draw:points="0,0 18,0 18,19 0,19">
          <text:p/>
        </draw:polygon>
        <draw:polygon draw:style-name="gr6" draw:text-style-name="P7" draw:layer="layout" svg:width="2.736cm" svg:height="0.018cm" svg:x="13.265cm" svg:y="9.484cm" svg:viewBox="0 0 2737 19" draw:points="0,0 2737,0 2737,19 0,19">
          <text:p/>
        </draw:polygon>
        <draw:polygon draw:style-name="gr6" draw:text-style-name="P7" draw:layer="layout" svg:width="0.018cm" svg:height="0.018cm" svg:x="16.001cm" svg:y="9.484cm" svg:viewBox="0 0 19 19" draw:points="0,0 19,0 19,19 0,19">
          <text:p/>
        </draw:polygon>
        <draw:polygon draw:style-name="gr6" draw:text-style-name="P7" draw:layer="layout" svg:width="3.967cm" svg:height="0.018cm" svg:x="16.018cm" svg:y="9.484cm" svg:viewBox="0 0 3968 19" draw:points="0,0 3968,0 3968,19 0,19">
          <text:p/>
        </draw:polygon>
        <draw:polygon draw:style-name="gr6" draw:text-style-name="P7" draw:layer="layout" svg:width="0.053cm" svg:height="0.018cm" svg:x="19.984cm" svg:y="9.484cm" svg:viewBox="0 0 54 19" draw:points="0,0 54,0 54,19 0,19">
          <text:p/>
        </draw:polygon>
        <draw:polygon draw:style-name="gr6" draw:text-style-name="P7" draw:layer="layout" svg:width="0.052cm" svg:height="0.691cm" svg:x="2.476cm" svg:y="9.501cm" svg:viewBox="0 0 53 692" draw:points="0,0 53,0 53,692 0,692">
          <text:p/>
        </draw:polygon>
        <draw:polygon draw:style-name="gr6" draw:text-style-name="P7" draw:layer="layout" svg:width="0.018cm" svg:height="0.691cm" svg:x="5.512cm" svg:y="9.501cm" svg:viewBox="0 0 19 692" draw:points="0,0 19,0 19,692 0,692">
          <text:p/>
        </draw:polygon>
        <draw:polygon draw:style-name="gr6" draw:text-style-name="P7" draw:layer="layout" svg:width="0.053cm" svg:height="0.691cm" svg:x="19.984cm" svg:y="9.501cm" svg:viewBox="0 0 54 692" draw:points="0,0 54,0 54,692 0,692">
          <text:p/>
        </draw:polygon>
        <draw:frame draw:style-name="gr5" draw:text-style-name="P6" draw:layer="layout" svg:width="2.067cm" svg:height="0.386cm" svg:x="16.196cm" svg:y="8.966cm">
          <draw:text-box>
            <text:p text:style-name="P4"><text:span text:style-name="T2">Е2 119/2023 </text:span></text:p>
          </draw:text-box>
        </draw:frame>
        <draw:frame draw:style-name="gr5" draw:text-style-name="P6" draw:layer="layout" svg:width="1.392cm" svg:height="0.386cm" svg:x="2.693cm" svg:y="9.657cm">
          <draw:text-box>
            <text:p text:style-name="P4"><text:span text:style-name="T2">Област: </text:span></text:p>
          </draw:text-box>
        </draw:frame>
        <draw:polygon draw:style-name="gr6" draw:text-style-name="P7" draw:layer="layout" svg:width="0.052cm" svg:height="0.02cm" svg:x="2.476cm" svg:y="10.191cm" svg:viewBox="0 0 53 21" draw:points="0,0 53,0 53,21 0,21">
          <text:p/>
        </draw:polygon>
        <draw:polygon draw:style-name="gr6" draw:text-style-name="P7" draw:layer="layout" svg:width="2.984cm" svg:height="0.02cm" svg:x="2.528cm" svg:y="10.191cm" svg:viewBox="0 0 2985 21" draw:points="0,0 2985,0 2985,21 0,21">
          <text:p/>
        </draw:polygon>
        <draw:polygon draw:style-name="gr6" draw:text-style-name="P7" draw:layer="layout" svg:width="0.018cm" svg:height="0.02cm" svg:x="5.512cm" svg:y="10.191cm" svg:viewBox="0 0 19 21" draw:points="0,0 19,0 19,21 0,21">
          <text:p/>
        </draw:polygon>
        <draw:polygon draw:style-name="gr6" draw:text-style-name="P7" draw:layer="layout" svg:width="14.456cm" svg:height="0.02cm" svg:x="5.529cm" svg:y="10.191cm" svg:viewBox="0 0 14457 21" draw:points="0,0 14457,0 14457,21 0,21">
          <text:p/>
        </draw:polygon>
        <draw:polygon draw:style-name="gr6" draw:text-style-name="P7" draw:layer="layout" svg:width="0.053cm" svg:height="0.02cm" svg:x="19.984cm" svg:y="10.191cm" svg:viewBox="0 0 54 21" draw:points="0,0 54,0 54,21 0,21">
          <text:p/>
        </draw:polygon>
        <draw:polygon draw:style-name="gr6" draw:text-style-name="P7" draw:layer="layout" svg:width="0.052cm" svg:height="0.691cm" svg:x="2.476cm" svg:y="10.208cm" svg:viewBox="0 0 53 692" draw:points="0,0 53,0 53,692 0,692">
          <text:p/>
        </draw:polygon>
        <draw:polygon draw:style-name="gr6" draw:text-style-name="P7" draw:layer="layout" svg:width="0.018cm" svg:height="0.691cm" svg:x="5.512cm" svg:y="10.208cm" svg:viewBox="0 0 19 692" draw:points="0,0 19,0 19,692 0,692">
          <text:p/>
        </draw:polygon>
        <draw:polygon draw:style-name="gr6" draw:text-style-name="P7" draw:layer="layout" svg:width="0.053cm" svg:height="0.691cm" svg:x="19.984cm" svg:y="10.208cm" svg:viewBox="0 0 54 692" draw:points="0,0 54,0 54,692 0,692">
          <text:p/>
        </draw:polygon>
        <draw:polygon draw:style-name="gr12" draw:text-style-name="P13" draw:layer="layout" svg:width="17.454cm" svg:height="2.208cm" svg:x="2.528cm" svg:y="10.948cm" svg:viewBox="0 0 17455 2209" draw:points="0,0 17455,0 17455,2209 0,2209">
          <text:p/>
        </draw:polygon>
        <draw:polygon draw:style-name="gr12" draw:text-style-name="P13" draw:layer="layout" svg:width="17.123cm" svg:height="0.409cm" svg:x="2.692cm" svg:y="10.948cm" svg:viewBox="0 0 17124 410" draw:points="0,0 17124,0 17124,410 0,410">
          <text:p/>
        </draw:polygon>
        <draw:frame draw:style-name="gr5" draw:text-style-name="P6" draw:layer="layout" svg:width="7.255cm" svg:height="0.386cm" svg:x="5.707cm" svg:y="9.657cm">
          <draw:text-box>
            <text:p text:style-name="P4"><text:span text:style-name="T2">Дистрибуирани системи и програмски језици</text:span></text:p>
          </draw:text-box>
        </draw:frame>
        <draw:polygon draw:style-name="gr12" draw:text-style-name="P13" draw:layer="layout" svg:width="17.123cm" svg:height="0.407cm" svg:x="2.692cm" svg:y="11.355cm" svg:viewBox="0 0 17124 408" draw:points="0,0 17124,0 17124,408 0,408">
          <text:p/>
        </draw:polygon>
        <draw:frame draw:style-name="gr5" draw:text-style-name="P6" draw:layer="layout" svg:width="1.414cm" svg:height="0.386cm" svg:x="2.693cm" svg:y="10.359cm">
          <draw:text-box>
            <text:p text:style-name="P4"><text:span text:style-name="T2">Ментор: </text:span></text:p>
          </draw:text-box>
        </draw:frame>
        <draw:polygon draw:style-name="gr12" draw:text-style-name="P13" draw:layer="layout" svg:width="17.123cm" svg:height="0.408cm" svg:x="2.692cm" svg:y="11.761cm" svg:viewBox="0 0 17124 409" draw:points="0,0 17124,0 17124,409 0,409">
          <text:p/>
        </draw:polygon>
        <draw:frame draw:style-name="gr5" draw:text-style-name="P6" draw:layer="layout" svg:width="3.56cm" svg:height="0.386cm" svg:x="5.707cm" svg:y="10.359cm">
          <draw:text-box>
            <text:p text:style-name="P4"><text:span text:style-name="T2">проф др. Гајић Душан</text:span></text:p>
          </draw:text-box>
        </draw:frame>
        <draw:frame draw:style-name="gr5" draw:text-style-name="P6" draw:layer="layout" svg:width="17.168cm" svg:height="0.386cm" svg:x="2.769cm" svg:y="10.96cm">
          <draw:text-box>
            <text:p text:style-name="P4"><text:span text:style-name="T2">НА ОСНОВУ ПОДНЕТЕ ПРИЈАВЕ, ПРИЛОЖЕНЕ ДОКУМЕНТАЦИЈЕ И ОДРЕДБИ СТАТУТА ФАКУЛТЕТА </text:span></text:p>
          </draw:text-box>
        </draw:frame>
        <draw:polygon draw:style-name="gr12" draw:text-style-name="P13" draw:layer="layout" svg:width="17.123cm" svg:height="0.408cm" svg:x="2.692cm" svg:y="12.168cm" svg:viewBox="0 0 17124 409" draw:points="0,0 17124,0 17124,409 0,409">
          <text:p/>
        </draw:polygon>
        <draw:frame draw:style-name="gr5" draw:text-style-name="P6" draw:layer="layout" svg:width="12.05cm" svg:height="0.386cm" svg:x="2.753cm" svg:y="11.367cm">
          <draw:text-box>
            <text:p text:style-name="P4"><text:span text:style-name="T2">ИЗДАЈЕ СЕ ЗАДАТАК ЗА <text:s/>МАСТЕР РАД, СА СЛЕДЕЋИМ ЕЛЕМЕНТИМА: </text:span></text:p>
          </draw:text-box>
        </draw:frame>
        <draw:frame draw:style-name="gr5" draw:text-style-name="P6" draw:layer="layout" svg:width="0.348cm" svg:height="0.386cm" svg:x="3.328cm" svg:y="11.773cm">
          <draw:text-box>
            <text:p text:style-name="P4"><text:span text:style-name="T2">- </text:span></text:p>
          </draw:text-box>
        </draw:frame>
        <draw:polygon draw:style-name="gr12" draw:text-style-name="P13" draw:layer="layout" svg:width="17.123cm" svg:height="0.404cm" svg:x="2.692cm" svg:y="12.573cm" svg:viewBox="0 0 17124 405" draw:points="0,0 17124,0 17124,405 0,405">
          <text:p/>
        </draw:polygon>
        <draw:frame draw:style-name="gr5" draw:text-style-name="P6" draw:layer="layout" svg:width="3.65cm" svg:height="0.386cm" svg:x="3.963cm" svg:y="11.773cm">
          <draw:text-box>
            <text:p text:style-name="P4"><text:span text:style-name="T2">проблем – тема рада; </text:span></text:p>
          </draw:text-box>
        </draw:frame>
        <draw:polygon draw:style-name="gr12" draw:text-style-name="P13" draw:layer="layout" svg:width="17.123cm" svg:height="0.18cm" svg:x="2.692cm" svg:y="12.976cm" svg:viewBox="0 0 17124 181" draw:points="0,0 17124,0 17124,181 0,181">
          <text:p/>
        </draw:polygon>
        <draw:frame draw:style-name="gr5" draw:text-style-name="P6" draw:layer="layout" svg:width="0.348cm" svg:height="0.386cm" svg:x="3.328cm" svg:y="12.18cm">
          <draw:text-box>
            <text:p text:style-name="P4"><text:span text:style-name="T2">- </text:span></text:p>
          </draw:text-box>
        </draw:frame>
        <draw:frame draw:style-name="gr5" draw:text-style-name="P6" draw:layer="layout" svg:width="13.728cm" svg:height="0.386cm" svg:x="3.963cm" svg:y="12.18cm">
          <draw:text-box>
            <text:p text:style-name="P4"><text:span text:style-name="T2">начин <text:s/>решавања <text:s/>проблема <text:s/>и <text:s/>начин <text:s/>практичне <text:s/>провере <text:s/>резултата <text:s/>рада, <text:s/>ако <text:s/>је </text:span></text:p>
          </draw:text-box>
        </draw:frame>
        <draw:frame draw:style-name="gr5" draw:text-style-name="P6" draw:layer="layout" svg:width="4.23cm" svg:height="0.386cm" svg:x="3.963cm" svg:y="12.565cm">
          <draw:text-box>
            <text:p text:style-name="P4"><text:span text:style-name="T2">таква <text:s/>провера неопходна</text:span></text:p>
          </draw:text-box>
        </draw:frame>
        <draw:frame draw:style-name="gr5" draw:text-style-name="P6" draw:layer="layout" svg:width="0.348cm" svg:height="0.386cm" svg:x="11.382cm" svg:y="12.988cm">
          <draw:text-box>
            <text:p text:style-name="P4"><text:span text:style-name="T2"><text:s/></text:span></text:p>
          </draw:text-box>
        </draw:frame>
        <draw:polygon draw:style-name="gr6" draw:text-style-name="P7" draw:layer="layout" svg:width="0.052cm" svg:height="0.056cm" svg:x="2.476cm" svg:y="10.898cm" svg:viewBox="0 0 53 57" draw:points="0,0 53,0 53,57 0,57">
          <text:p/>
        </draw:polygon>
        <draw:polygon draw:style-name="gr6" draw:text-style-name="P7" draw:layer="layout" svg:width="2.984cm" svg:height="0.053cm" svg:x="2.528cm" svg:y="10.898cm" svg:viewBox="0 0 2985 54" draw:points="0,0 2985,0 2985,54 0,54">
          <text:p/>
        </draw:polygon>
        <draw:polygon draw:style-name="gr12" draw:text-style-name="P13" draw:layer="layout" svg:width="2.984cm" svg:height="0.006cm" svg:x="2.528cm" svg:y="10.948cm" svg:viewBox="0 0 2985 7" draw:points="0,0 2985,0 2985,7 0,7">
          <text:p/>
        </draw:polygon>
        <draw:polygon draw:style-name="gr12" draw:text-style-name="P13" draw:layer="layout" svg:width="0.052cm" svg:height="0.006cm" svg:x="5.512cm" svg:y="10.948cm" svg:viewBox="0 0 53 7" draw:points="0,0 53,0 53,7 0,7">
          <text:p/>
        </draw:polygon>
        <draw:polygon draw:style-name="gr6" draw:text-style-name="P7" draw:layer="layout" svg:width="0.052cm" svg:height="0.053cm" svg:x="5.512cm" svg:y="10.898cm" svg:viewBox="0 0 53 54" draw:points="0,0 53,0 53,54 0,54">
          <text:p/>
        </draw:polygon>
        <draw:polygon draw:style-name="gr6" draw:text-style-name="P7" draw:layer="layout" svg:width="14.423cm" svg:height="0.053cm" svg:x="5.562cm" svg:y="10.898cm" svg:viewBox="0 0 14424 54" draw:points="0,0 14424,0 14424,54 0,54">
          <text:p/>
        </draw:polygon>
        <draw:polygon draw:style-name="gr12" draw:text-style-name="P13" draw:layer="layout" svg:width="14.423cm" svg:height="0.006cm" svg:x="5.562cm" svg:y="10.948cm" svg:viewBox="0 0 14424 7" draw:points="0,0 14424,0 14424,7 0,7">
          <text:p/>
        </draw:polygon>
        <draw:polygon draw:style-name="gr6" draw:text-style-name="P7" draw:layer="layout" svg:width="0.053cm" svg:height="0.056cm" svg:x="19.984cm" svg:y="10.898cm" svg:viewBox="0 0 54 57" draw:points="0,0 54,0 54,57 0,57">
          <text:p/>
        </draw:polygon>
        <draw:polygon draw:style-name="gr6" draw:text-style-name="P7" draw:layer="layout" svg:width="0.052cm" svg:height="2.203cm" svg:x="2.476cm" svg:y="10.953cm" svg:viewBox="0 0 53 2204" draw:points="0,0 53,0 53,2204 0,2204">
          <text:p/>
        </draw:polygon>
        <draw:polygon draw:style-name="gr6" draw:text-style-name="P7" draw:layer="layout" svg:width="0.052cm" svg:height="0.054cm" svg:x="2.476cm" svg:y="13.153cm" svg:viewBox="0 0 53 55" draw:points="0,0 53,0 53,55 0,55">
          <text:p/>
        </draw:polygon>
        <draw:polygon draw:style-name="gr6" draw:text-style-name="P7" draw:layer="layout" svg:width="0.052cm" svg:height="0.054cm" svg:x="2.476cm" svg:y="13.153cm" svg:viewBox="0 0 53 55" draw:points="0,0 53,0 53,55 0,55">
          <text:p/>
        </draw:polygon>
        <draw:polygon draw:style-name="gr6" draw:text-style-name="P7" draw:layer="layout" svg:width="17.457cm" svg:height="0.054cm" svg:x="2.528cm" svg:y="13.153cm" svg:viewBox="0 0 17458 55" draw:points="0,0 17458,0 17458,55 0,55">
          <text:p/>
        </draw:polygon>
        <draw:polygon draw:style-name="gr6" draw:text-style-name="P7" draw:layer="layout" svg:width="0.053cm" svg:height="2.203cm" svg:x="19.984cm" svg:y="10.953cm" svg:viewBox="0 0 54 2204" draw:points="0,0 54,0 54,2204 0,2204">
          <text:p/>
        </draw:polygon>
        <draw:polygon draw:style-name="gr6" draw:text-style-name="P7" draw:layer="layout" svg:width="0.053cm" svg:height="0.054cm" svg:x="19.984cm" svg:y="13.153cm" svg:viewBox="0 0 54 55" draw:points="0,0 54,0 54,55 0,55">
          <text:p/>
        </draw:polygon>
        <draw:polygon draw:style-name="gr6" draw:text-style-name="P7" draw:layer="layout" svg:width="0.053cm" svg:height="0.054cm" svg:x="19.984cm" svg:y="13.153cm" svg:viewBox="0 0 54 55" draw:points="0,0 54,0 54,55 0,55">
          <text:p/>
        </draw:polygon>
        <draw:frame draw:style-name="gr5" draw:text-style-name="P6" draw:layer="layout" svg:width="0.348cm" svg:height="0.386cm" svg:x="11.382cm" svg:y="13.395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48cm" svg:height="0.386cm" svg:x="11.382cm" svg:y="13.801cm">
          <draw:text-box>
            <text:p text:style-name="P4"><text:span text:style-name="T2"><text:s/></text:span></text:p>
          </draw:text-box>
        </draw:frame>
        <draw:polygon draw:style-name="gr6" draw:text-style-name="P7" draw:layer="layout" svg:width="0.052cm" svg:height="0.056cm" svg:x="2.476cm" svg:y="14.263cm" svg:viewBox="0 0 53 57" draw:points="0,0 53,0 53,57 0,57">
          <text:p/>
        </draw:polygon>
        <draw:polygon draw:style-name="gr6" draw:text-style-name="P7" draw:layer="layout" svg:width="0.052cm" svg:height="0.053cm" svg:x="2.476cm" svg:y="14.263cm" svg:viewBox="0 0 53 54" draw:points="0,0 53,0 53,54 0,54">
          <text:p/>
        </draw:polygon>
        <draw:polygon draw:style-name="gr6" draw:text-style-name="P7" draw:layer="layout" svg:width="17.457cm" svg:height="0.053cm" svg:x="2.528cm" svg:y="14.263cm" svg:viewBox="0 0 17458 54" draw:points="0,0 17458,0 17458,54 0,54">
          <text:p/>
        </draw:polygon>
        <draw:polygon draw:style-name="gr6" draw:text-style-name="P7" draw:layer="layout" svg:width="0.053cm" svg:height="0.056cm" svg:x="19.984cm" svg:y="14.263cm" svg:viewBox="0 0 54 57" draw:points="0,0 54,0 54,57 0,57">
          <text:p/>
        </draw:polygon>
        <draw:polygon draw:style-name="gr6" draw:text-style-name="P7" draw:layer="layout" svg:width="0.053cm" svg:height="0.053cm" svg:x="19.984cm" svg:y="14.263cm" svg:viewBox="0 0 54 54" draw:points="0,0 54,0 54,54 0,54">
          <text:p/>
        </draw:polygon>
        <draw:polygon draw:style-name="gr6" draw:text-style-name="P7" draw:layer="layout" svg:width="0.052cm" svg:height="1.268cm" svg:x="2.476cm" svg:y="14.318cm" svg:viewBox="0 0 53 1269" draw:points="0,0 53,0 53,1269 0,1269">
          <text:p/>
        </draw:polygon>
        <draw:polygon draw:style-name="gr6" draw:text-style-name="P7" draw:layer="layout" svg:width="0.052cm" svg:height="0.053cm" svg:x="2.476cm" svg:y="15.585cm" svg:viewBox="0 0 53 54" draw:points="0,0 53,0 53,54 0,54">
          <text:p/>
        </draw:polygon>
        <draw:polygon draw:style-name="gr6" draw:text-style-name="P7" draw:layer="layout" svg:width="0.052cm" svg:height="0.053cm" svg:x="2.476cm" svg:y="15.585cm" svg:viewBox="0 0 53 54" draw:points="0,0 53,0 53,54 0,54">
          <text:p/>
        </draw:polygon>
        <draw:polygon draw:style-name="gr6" draw:text-style-name="P7" draw:layer="layout" svg:width="17.457cm" svg:height="0.053cm" svg:x="2.528cm" svg:y="15.585cm" svg:viewBox="0 0 17458 54" draw:points="0,0 17458,0 17458,54 0,54">
          <text:p/>
        </draw:polygon>
        <draw:polygon draw:style-name="gr6" draw:text-style-name="P7" draw:layer="layout" svg:width="0.053cm" svg:height="1.268cm" svg:x="19.984cm" svg:y="14.318cm" svg:viewBox="0 0 54 1269" draw:points="0,0 54,0 54,1269 0,1269">
          <text:p/>
        </draw:polygon>
        <draw:polygon draw:style-name="gr6" draw:text-style-name="P7" draw:layer="layout" svg:width="0.053cm" svg:height="0.053cm" svg:x="19.984cm" svg:y="15.585cm" svg:viewBox="0 0 54 54" draw:points="0,0 54,0 54,54 0,54">
          <text:p/>
        </draw:polygon>
        <draw:polygon draw:style-name="gr6" draw:text-style-name="P7" draw:layer="layout" svg:width="0.053cm" svg:height="0.053cm" svg:x="19.984cm" svg:y="15.585cm" svg:viewBox="0 0 54 54" draw:points="0,0 54,0 54,54 0,54">
          <text:p/>
        </draw:polygon>
        <draw:frame draw:style-name="gr5" draw:text-style-name="P6" draw:layer="layout" svg:width="0.348cm" svg:height="0.386cm" svg:x="11.382cm" svg:y="14.207cm">
          <draw:text-box>
            <text:p text:style-name="P4"><text:span text:style-name="T2"><text:s/></text:span></text:p>
          </draw:text-box>
        </draw:frame>
        <draw:frame draw:style-name="gr10" draw:text-style-name="P11" draw:layer="layout" svg:width="6.008cm" svg:height="0.513cm" svg:x="2.503cm" svg:y="13.647cm">
          <draw:text-box>
            <text:p text:style-name="P4"><text:span text:style-name="T9">НАСЛОВ <text:s/>МАСТЕР <text:s/>РАДА: </text:span></text:p>
          </draw:text-box>
        </draw:frame>
        <draw:frame draw:style-name="gr13" draw:text-style-name="P14" draw:layer="layout" svg:width="14.799cm" svg:height="0.556cm" svg:x="2.854cm" svg:y="14.394cm">
          <draw:text-box>
            <text:p text:style-name="P4"><text:span text:style-name="T10">Дизајн и имплементација </text:span><text:span text:style-name="T11">EIP</text:span><text:span text:style-name="T10">-7702-компатибилног </text:span><text:span text:style-name="T11">Ethereum</text:span></text:p>
          </draw:text-box>
        </draw:frame>
        <draw:frame draw:style-name="gr13" draw:text-style-name="P14" draw:layer="layout" svg:width="9.472cm" svg:height="0.556cm" svg:x="2.854cm" svg:y="14.949cm">
          <draw:text-box>
            <text:p text:style-name="P4"><text:span text:style-name="T10">вишепотписног дигиталног новчаника</text:span></text:p>
          </draw:text-box>
        </draw:frame>
        <draw:frame draw:style-name="gr10" draw:text-style-name="P11" draw:layer="layout" svg:width="4.042cm" svg:height="0.513cm" svg:x="2.503cm" svg:y="16.082cm">
          <draw:text-box>
            <text:p text:style-name="P4"><text:span text:style-name="T9">ТЕКСТ ЗАДАТКА: </text:span></text:p>
          </draw:text-box>
        </draw:frame>
        <draw:frame draw:style-name="gr5" draw:text-style-name="P6" draw:layer="layout" svg:width="16.63cm" svg:height="0.386cm" svg:x="2.74cm" svg:y="16.967cm">
          <draw:text-box>
            <text:p text:style-name="P4"><text:span text:style-name="T2">Размотрити проблем недостатка вишепотписне ауторизације код стандардних </text:span><text:span text:style-name="T6">Ethereum </text:span><text:span text:style-name="T2">налога и њен</text:span></text:p>
          </draw:text-box>
        </draw:frame>
        <draw:frame draw:style-name="gr5" draw:text-style-name="P6" draw:layer="layout" svg:width="16.346cm" svg:height="0.386cm" svg:x="2.74cm" svg:y="17.352cm">
          <draw:text-box>
            <text:p text:style-name="P4"><text:span text:style-name="T2">значај за безбедно управљање заједничком дигиталном имовином. Размотрити ограничење </text:span><text:span text:style-name="T6">ERC-20</text:span></text:p>
          </draw:text-box>
        </draw:frame>
        <draw:frame draw:style-name="gr5" draw:text-style-name="P6" draw:layer="layout" svg:width="16.333cm" svg:height="0.386cm" svg:x="2.74cm" svg:y="17.737cm">
          <draw:text-box>
            <text:p text:style-name="P4"><text:span text:style-name="T2">стандарда при депоновању токена у паметне уговоре, које захтева слање две одвојене трансакције.</text:span></text:p>
          </draw:text-box>
        </draw:frame>
        <draw:frame draw:style-name="gr5" draw:text-style-name="P6" draw:layer="layout" svg:width="16.974cm" svg:height="0.386cm" svg:x="2.74cm" svg:y="18.122cm">
          <draw:text-box>
            <text:p text:style-name="P4"><text:span text:style-name="T2">Размотрити модел налога у власништву спољног корисника (</text:span><text:span text:style-name="T6">EOA</text:span><text:span text:style-name="T2">) и паметних уговора, као и механизам</text:span></text:p>
          </draw:text-box>
        </draw:frame>
        <draw:frame draw:style-name="gr5" draw:text-style-name="P6" draw:layer="layout" svg:width="16.119cm" svg:height="0.386cm" svg:x="2.74cm" svg:y="18.507cm">
          <draw:text-box>
            <text:p text:style-name="P4"><text:span text:style-name="T6">EIP-7702 </text:span><text:span text:style-name="T2">делегације извршавања кода. Размотрити и упоредити постојећа решења за унапређење</text:span></text:p>
          </draw:text-box>
        </draw:frame>
        <draw:frame draw:style-name="gr5" draw:text-style-name="P6" draw:layer="layout" svg:width="16.339cm" svg:height="0.386cm" svg:x="2.74cm" svg:y="18.892cm">
          <draw:text-box>
            <text:p text:style-name="P4"><text:span text:style-name="T2">корисничког искуства </text:span><text:span text:style-name="T6">Ethereum </text:span><text:span text:style-name="T2">налога. Користећи механизам </text:span><text:span text:style-name="T6">EIP-7702 </text:span><text:span text:style-name="T2">делегације, имплементирати</text:span></text:p>
          </draw:text-box>
        </draw:frame>
        <draw:frame draw:style-name="gr5" draw:text-style-name="P6" draw:layer="layout" svg:width="15.788cm" svg:height="0.386cm" svg:x="2.74cm" svg:y="19.277cm">
          <draw:text-box>
            <text:p text:style-name="P4"><text:span text:style-name="T2">вишепотписни </text:span><text:span text:style-name="T6">Ethereum </text:span><text:span text:style-name="T2">новчаник у виду веб екстензије за </text:span><text:span text:style-name="T6">Chromium </text:span><text:span text:style-name="T2">прегледаче, који омогућава</text:span></text:p>
          </draw:text-box>
        </draw:frame>
        <draw:frame draw:style-name="gr5" draw:text-style-name="P6" draw:layer="layout" svg:width="16.32cm" svg:height="0.386cm" svg:x="2.74cm" svg:y="19.662cm">
          <draw:text-box>
            <text:p text:style-name="P4"><text:span text:style-name="T2">депоновање </text:span><text:span text:style-name="T6">ERC-20 </text:span><text:span text:style-name="T2">токена у једној трансакцији. Демонстрирати функционалност имплементираног</text:span></text:p>
          </draw:text-box>
        </draw:frame>
        <draw:polygon draw:style-name="gr6" draw:text-style-name="P7" draw:layer="layout" svg:width="0.052cm" svg:height="0.056cm" svg:x="2.476cm" svg:y="16.694cm" svg:viewBox="0 0 53 57" draw:points="0,0 53,0 53,57 0,57">
          <text:p/>
        </draw:polygon>
        <draw:polygon draw:style-name="gr6" draw:text-style-name="P7" draw:layer="layout" svg:width="0.052cm" svg:height="0.053cm" svg:x="2.476cm" svg:y="16.694cm" svg:viewBox="0 0 53 54" draw:points="0,0 53,0 53,54 0,54">
          <text:p/>
        </draw:polygon>
        <draw:polygon draw:style-name="gr6" draw:text-style-name="P7" draw:layer="layout" svg:width="17.457cm" svg:height="0.053cm" svg:x="2.528cm" svg:y="16.694cm" svg:viewBox="0 0 17458 54" draw:points="0,0 17458,0 17458,54 0,54">
          <text:p/>
        </draw:polygon>
        <draw:polygon draw:style-name="gr6" draw:text-style-name="P7" draw:layer="layout" svg:width="0.053cm" svg:height="0.056cm" svg:x="19.984cm" svg:y="16.694cm" svg:viewBox="0 0 54 57" draw:points="0,0 54,0 54,57 0,57">
          <text:p/>
        </draw:polygon>
        <draw:polygon draw:style-name="gr6" draw:text-style-name="P7" draw:layer="layout" svg:width="0.053cm" svg:height="0.053cm" svg:x="19.984cm" svg:y="16.694cm" svg:viewBox="0 0 54 54" draw:points="0,0 54,0 54,54 0,54">
          <text:p/>
        </draw:polygon>
        <draw:polygon draw:style-name="gr6" draw:text-style-name="P7" draw:layer="layout" svg:width="0.052cm" svg:height="6.768cm" svg:x="2.476cm" svg:y="16.749cm" svg:viewBox="0 0 53 6769" draw:points="0,0 53,0 53,6769 0,6769">
          <text:p/>
        </draw:polygon>
        <draw:polygon draw:style-name="gr6" draw:text-style-name="P7" draw:layer="layout" svg:width="0.052cm" svg:height="0.052cm" svg:x="2.476cm" svg:y="23.515cm" svg:viewBox="0 0 53 53" draw:points="0,0 53,0 53,53 0,53">
          <text:p/>
        </draw:polygon>
        <draw:polygon draw:style-name="gr6" draw:text-style-name="P7" draw:layer="layout" svg:width="0.052cm" svg:height="0.052cm" svg:x="2.476cm" svg:y="23.515cm" svg:viewBox="0 0 53 53" draw:points="0,0 53,0 53,53 0,53">
          <text:p/>
        </draw:polygon>
        <draw:polygon draw:style-name="gr6" draw:text-style-name="P7" draw:layer="layout" svg:width="17.457cm" svg:height="0.052cm" svg:x="2.528cm" svg:y="23.515cm" svg:viewBox="0 0 17458 53" draw:points="0,0 17458,0 17458,53 0,53">
          <text:p/>
        </draw:polygon>
        <draw:polygon draw:style-name="gr6" draw:text-style-name="P7" draw:layer="layout" svg:width="0.053cm" svg:height="6.768cm" svg:x="19.984cm" svg:y="16.749cm" svg:viewBox="0 0 54 6769" draw:points="0,0 54,0 54,6769 0,6769">
          <text:p/>
        </draw:polygon>
        <draw:polygon draw:style-name="gr6" draw:text-style-name="P7" draw:layer="layout" svg:width="0.053cm" svg:height="0.052cm" svg:x="19.984cm" svg:y="23.515cm" svg:viewBox="0 0 54 53" draw:points="0,0 54,0 54,53 0,53">
          <text:p/>
        </draw:polygon>
        <draw:polygon draw:style-name="gr6" draw:text-style-name="P7" draw:layer="layout" svg:width="0.053cm" svg:height="0.052cm" svg:x="19.984cm" svg:y="23.515cm" svg:viewBox="0 0 54 53" draw:points="0,0 54,0 54,53 0,53">
          <text:p/>
        </draw:polygon>
        <draw:frame draw:style-name="gr5" draw:text-style-name="P6" draw:layer="layout" svg:width="9.157cm" svg:height="0.386cm" svg:x="2.74cm" svg:y="20.047cm">
          <draw:text-box>
            <text:p text:style-name="P4"><text:span text:style-name="T2">система стварним трансакцијама на </text:span><text:span text:style-name="T6">Sepolia </text:span><text:span text:style-name="T2">тест мрежи.</text:span></text:p>
          </draw:text-box>
        </draw:frame>
        <draw:frame draw:style-name="gr11" draw:text-style-name="P12" draw:layer="layout" svg:width="0.211cm" svg:height="0.239cm" svg:x="2.503cm" svg:y="23.576cm">
          <draw:text-box>
            <text:p text:style-name="P4"><text:span text:style-name="T8"><text:s/></text:span></text:p>
          </draw:text-box>
        </draw:frame>
        <draw:polygon draw:style-name="gr6" draw:text-style-name="P7" draw:layer="layout" svg:width="0.052cm" svg:height="0.056cm" svg:x="2.476cm" svg:y="24.057cm" svg:viewBox="0 0 53 57" draw:points="0,0 53,0 53,57 0,57">
          <text:p/>
        </draw:polygon>
        <draw:polygon draw:style-name="gr6" draw:text-style-name="P7" draw:layer="layout" svg:width="0.052cm" svg:height="0.053cm" svg:x="2.476cm" svg:y="24.057cm" svg:viewBox="0 0 53 54" draw:points="0,0 53,0 53,54 0,54">
          <text:p/>
        </draw:polygon>
        <draw:polygon draw:style-name="gr6" draw:text-style-name="P7" draw:layer="layout" svg:width="8.723cm" svg:height="0.053cm" svg:x="2.528cm" svg:y="24.057cm" svg:viewBox="0 0 8724 54" draw:points="0,0 8724,0 8724,54 0,54">
          <text:p/>
        </draw:polygon>
        <draw:polygon draw:style-name="gr6" draw:text-style-name="P7" draw:layer="layout" svg:width="0.018cm" svg:height="0.007cm" svg:x="11.25cm" svg:y="24.107cm" svg:viewBox="0 0 19 8" draw:points="0,0 19,0 19,8 0,8">
          <text:p/>
        </draw:polygon>
        <draw:polygon draw:style-name="gr6" draw:text-style-name="P7" draw:layer="layout" svg:width="0.052cm" svg:height="0.053cm" svg:x="11.25cm" svg:y="24.057cm" svg:viewBox="0 0 53 54" draw:points="0,0 53,0 53,54 0,54">
          <text:p/>
        </draw:polygon>
        <draw:polygon draw:style-name="gr6" draw:text-style-name="P7" draw:layer="layout" svg:width="8.685cm" svg:height="0.053cm" svg:x="11.3cm" svg:y="24.057cm" svg:viewBox="0 0 8686 54" draw:points="0,0 8686,0 8686,54 0,54">
          <text:p/>
        </draw:polygon>
        <draw:polygon draw:style-name="gr6" draw:text-style-name="P7" draw:layer="layout" svg:width="0.053cm" svg:height="0.056cm" svg:x="19.984cm" svg:y="24.057cm" svg:viewBox="0 0 54 57" draw:points="0,0 54,0 54,57 0,57">
          <text:p/>
        </draw:polygon>
        <draw:polygon draw:style-name="gr6" draw:text-style-name="P7" draw:layer="layout" svg:width="0.053cm" svg:height="0.053cm" svg:x="19.984cm" svg:y="24.057cm" svg:viewBox="0 0 54 54" draw:points="0,0 54,0 54,54 0,54">
          <text:p/>
        </draw:polygon>
        <draw:polygon draw:style-name="gr6" draw:text-style-name="P7" draw:layer="layout" svg:width="0.052cm" svg:height="0.561cm" svg:x="2.476cm" svg:y="24.112cm" svg:viewBox="0 0 53 562" draw:points="0,0 53,0 53,562 0,562">
          <text:p/>
        </draw:polygon>
        <draw:polygon draw:style-name="gr6" draw:text-style-name="P7" draw:layer="layout" svg:width="0.018cm" svg:height="0.561cm" svg:x="11.25cm" svg:y="24.112cm" svg:viewBox="0 0 19 562" draw:points="0,0 19,0 19,562 0,562">
          <text:p/>
        </draw:polygon>
        <draw:polygon draw:style-name="gr6" draw:text-style-name="P7" draw:layer="layout" svg:width="0.053cm" svg:height="0.561cm" svg:x="19.984cm" svg:y="24.112cm" svg:viewBox="0 0 54 562" draw:points="0,0 54,0 54,562 0,562">
          <text:p/>
        </draw:polygon>
        <draw:frame draw:style-name="gr11" draw:text-style-name="P12" draw:layer="layout" svg:width="0.211cm" svg:height="0.239cm" svg:x="2.503cm" svg:y="23.817cm">
          <draw:text-box>
            <text:p text:style-name="P4"><text:span text:style-name="T8"><text:s/></text:span></text:p>
          </draw:text-box>
        </draw:frame>
        <draw:frame draw:style-name="gr5" draw:text-style-name="P6" draw:layer="layout" svg:width="5.65cm" svg:height="0.386cm" svg:x="2.693cm" svg:y="24.2cm">
          <draw:text-box>
            <text:p text:style-name="P4"><text:span text:style-name="T2">Руководилац студијског програма: </text:span></text:p>
          </draw:text-box>
        </draw:frame>
        <draw:polygon draw:style-name="gr6" draw:text-style-name="P7" draw:layer="layout" svg:width="0.052cm" svg:height="0.02cm" svg:x="2.476cm" svg:y="24.67cm" svg:viewBox="0 0 53 21" draw:points="0,0 53,0 53,21 0,21">
          <text:p/>
        </draw:polygon>
        <draw:polygon draw:style-name="gr6" draw:text-style-name="P7" draw:layer="layout" svg:width="8.723cm" svg:height="0.02cm" svg:x="2.528cm" svg:y="24.67cm" svg:viewBox="0 0 8724 21" draw:points="0,0 8724,0 8724,21 0,21">
          <text:p/>
        </draw:polygon>
        <draw:polygon draw:style-name="gr6" draw:text-style-name="P7" draw:layer="layout" svg:width="0.018cm" svg:height="0.02cm" svg:x="11.25cm" svg:y="24.67cm" svg:viewBox="0 0 19 21" draw:points="0,0 19,0 19,21 0,21">
          <text:p/>
        </draw:polygon>
        <draw:polygon draw:style-name="gr6" draw:text-style-name="P7" draw:layer="layout" svg:width="8.718cm" svg:height="0.02cm" svg:x="11.267cm" svg:y="24.67cm" svg:viewBox="0 0 8719 21" draw:points="0,0 8719,0 8719,21 0,21">
          <text:p/>
        </draw:polygon>
        <draw:polygon draw:style-name="gr6" draw:text-style-name="P7" draw:layer="layout" svg:width="0.053cm" svg:height="0.02cm" svg:x="19.984cm" svg:y="24.67cm" svg:viewBox="0 0 54 21" draw:points="0,0 54,0 54,21 0,21">
          <text:p/>
        </draw:polygon>
        <draw:polygon draw:style-name="gr6" draw:text-style-name="P7" draw:layer="layout" svg:width="0.052cm" svg:height="1.044cm" svg:x="2.476cm" svg:y="24.687cm" svg:viewBox="0 0 53 1045" draw:points="0,0 53,0 53,1045 0,1045">
          <text:p/>
        </draw:polygon>
        <draw:polygon draw:style-name="gr6" draw:text-style-name="P7" draw:layer="layout" svg:width="0.052cm" svg:height="0.054cm" svg:x="2.476cm" svg:y="25.729cm" svg:viewBox="0 0 53 55" draw:points="0,0 53,0 53,55 0,55">
          <text:p/>
        </draw:polygon>
        <draw:polygon draw:style-name="gr6" draw:text-style-name="P7" draw:layer="layout" svg:width="0.052cm" svg:height="0.054cm" svg:x="2.476cm" svg:y="25.729cm" svg:viewBox="0 0 53 55" draw:points="0,0 53,0 53,55 0,55">
          <text:p/>
        </draw:polygon>
        <draw:polygon draw:style-name="gr6" draw:text-style-name="P7" draw:layer="layout" svg:width="8.723cm" svg:height="0.054cm" svg:x="2.528cm" svg:y="25.729cm" svg:viewBox="0 0 8724 55" draw:points="0,0 8724,0 8724,55 0,55">
          <text:p/>
        </draw:polygon>
        <draw:polygon draw:style-name="gr6" draw:text-style-name="P7" draw:layer="layout" svg:width="0.018cm" svg:height="1.044cm" svg:x="11.25cm" svg:y="24.687cm" svg:viewBox="0 0 19 1045" draw:points="0,0 19,0 19,1045 0,1045">
          <text:p/>
        </draw:polygon>
        <draw:polygon draw:style-name="gr6" draw:text-style-name="P7" draw:layer="layout" svg:width="0.052cm" svg:height="0.054cm" svg:x="11.25cm" svg:y="25.729cm" svg:viewBox="0 0 53 55" draw:points="0,0 53,0 53,55 0,55">
          <text:p/>
        </draw:polygon>
        <draw:polygon draw:style-name="gr6" draw:text-style-name="P7" draw:layer="layout" svg:width="8.685cm" svg:height="0.054cm" svg:x="11.3cm" svg:y="25.729cm" svg:viewBox="0 0 8686 55" draw:points="0,0 8686,0 8686,55 0,55">
          <text:p/>
        </draw:polygon>
        <draw:polygon draw:style-name="gr6" draw:text-style-name="P7" draw:layer="layout" svg:width="0.053cm" svg:height="1.044cm" svg:x="19.984cm" svg:y="24.687cm" svg:viewBox="0 0 54 1045" draw:points="0,0 54,0 54,1045 0,1045">
          <text:p/>
        </draw:polygon>
        <draw:polygon draw:style-name="gr6" draw:text-style-name="P7" draw:layer="layout" svg:width="0.053cm" svg:height="0.054cm" svg:x="19.984cm" svg:y="25.729cm" svg:viewBox="0 0 54 55" draw:points="0,0 54,0 54,55 0,55">
          <text:p/>
        </draw:polygon>
        <draw:polygon draw:style-name="gr6" draw:text-style-name="P7" draw:layer="layout" svg:width="0.053cm" svg:height="0.054cm" svg:x="19.984cm" svg:y="25.729cm" svg:viewBox="0 0 54 55" draw:points="0,0 54,0 54,55 0,55">
          <text:p/>
        </draw:polygon>
        <draw:frame draw:style-name="gr5" draw:text-style-name="P6" draw:layer="layout" svg:width="2.292cm" svg:height="0.386cm" svg:x="11.445cm" svg:y="24.2cm">
          <draw:text-box>
            <text:p text:style-name="P4"><text:span text:style-name="T2">Ментор рада: </text:span></text:p>
          </draw:text-box>
        </draw:frame>
        <draw:frame draw:style-name="gr5" draw:text-style-name="P6" draw:layer="layout" svg:width="0.348cm" svg:height="0.386cm" svg:x="2.693cm" svg:y="24.911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48cm" svg:height="0.386cm" svg:x="11.445cm" svg:y="24.911cm">
          <draw:text-box>
            <text:p text:style-name="P4"><text:span text:style-name="T2"><text:s/></text:span></text:p>
          </draw:text-box>
        </draw:frame>
        <draw:frame draw:style-name="gr14" draw:text-style-name="P15" draw:layer="layout" svg:width="0.285cm" svg:height="0.323cm" svg:x="2.503cm" svg:y="25.797cm">
          <draw:text-box>
            <text:p text:style-name="P4"><text:span text:style-name="T12"><text:s/></text:span></text:p>
          </draw:text-box>
        </draw:frame>
        <draw:frame draw:style-name="gr5" draw:text-style-name="P6" draw:layer="layout" svg:width="2.346cm" svg:height="0.386cm" svg:x="2.592cm" svg:y="26.354cm">
          <draw:text-box>
            <text:p text:style-name="P4"><text:span text:style-name="T2">Примерак за: <text:s/></text:span></text:p>
          </draw:text-box>
        </draw:frame>
        <draw:frame draw:style-name="gr8" draw:text-style-name="P9" draw:layer="layout" svg:width="0.496cm" svg:height="0.497cm" svg:x="4.971cm" svg:y="26.292cm">
          <draw:text-box>
            <text:p text:style-name="P4"><text:span text:style-name="T13"></text:span></text:p>
          </draw:text-box>
        </draw:frame>
        <draw:polygon draw:style-name="gr6" draw:text-style-name="P7" draw:layer="layout" svg:width="0.018cm" svg:height="0.019cm" svg:x="2.493cm" svg:y="26.11cm" svg:viewBox="0 0 19 20" draw:points="0,0 19,0 19,20 0,20">
          <text:p/>
        </draw:polygon>
        <draw:polygon draw:style-name="gr6" draw:text-style-name="P7" draw:layer="layout" svg:width="0.018cm" svg:height="0.019cm" svg:x="2.493cm" svg:y="26.11cm" svg:viewBox="0 0 19 20" draw:points="0,0 19,0 19,20 0,20">
          <text:p/>
        </draw:polygon>
        <draw:polygon draw:style-name="gr6" draw:text-style-name="P7" draw:layer="layout" svg:width="17.491cm" svg:height="0.019cm" svg:x="2.511cm" svg:y="26.11cm" svg:viewBox="0 0 17492 20" draw:points="0,0 17492,0 17492,20 0,20">
          <text:p/>
        </draw:polygon>
        <draw:polygon draw:style-name="gr6" draw:text-style-name="P7" draw:layer="layout" svg:width="0.017cm" svg:height="0.019cm" svg:x="20.002cm" svg:y="26.11cm" svg:viewBox="0 0 18 20" draw:points="0,0 18,0 18,20 0,20">
          <text:p/>
        </draw:polygon>
        <draw:polygon draw:style-name="gr6" draw:text-style-name="P7" draw:layer="layout" svg:width="0.017cm" svg:height="0.019cm" svg:x="20.002cm" svg:y="26.11cm" svg:viewBox="0 0 18 20" draw:points="0,0 18,0 18,20 0,20">
          <text:p/>
        </draw:polygon>
        <draw:polygon draw:style-name="gr6" draw:text-style-name="P7" draw:layer="layout" svg:width="0.018cm" svg:height="0.687cm" svg:x="2.493cm" svg:y="26.127cm" svg:viewBox="0 0 19 688" draw:points="0,0 19,0 19,688 0,688">
          <text:p/>
        </draw:polygon>
        <draw:polygon draw:style-name="gr6" draw:text-style-name="P7" draw:layer="layout" svg:width="0.018cm" svg:height="0.019cm" svg:x="2.493cm" svg:y="26.813cm" svg:viewBox="0 0 19 20" draw:points="0,0 19,0 19,20 0,20">
          <text:p/>
        </draw:polygon>
        <draw:polygon draw:style-name="gr6" draw:text-style-name="P7" draw:layer="layout" svg:width="0.018cm" svg:height="0.019cm" svg:x="2.493cm" svg:y="26.813cm" svg:viewBox="0 0 19 20" draw:points="0,0 19,0 19,20 0,20">
          <text:p/>
        </draw:polygon>
        <draw:polygon draw:style-name="gr6" draw:text-style-name="P7" draw:layer="layout" svg:width="17.491cm" svg:height="0.019cm" svg:x="2.511cm" svg:y="26.813cm" svg:viewBox="0 0 17492 20" draw:points="0,0 17492,0 17492,20 0,20">
          <text:p/>
        </draw:polygon>
        <draw:polygon draw:style-name="gr6" draw:text-style-name="P7" draw:layer="layout" svg:width="0.017cm" svg:height="0.687cm" svg:x="20.002cm" svg:y="26.127cm" svg:viewBox="0 0 18 688" draw:points="0,0 18,0 18,688 0,688">
          <text:p/>
        </draw:polygon>
        <draw:polygon draw:style-name="gr6" draw:text-style-name="P7" draw:layer="layout" svg:width="0.017cm" svg:height="0.019cm" svg:x="20.002cm" svg:y="26.813cm" svg:viewBox="0 0 18 20" draw:points="0,0 18,0 18,20 0,20">
          <text:p/>
        </draw:polygon>
        <draw:polygon draw:style-name="gr6" draw:text-style-name="P7" draw:layer="layout" svg:width="0.017cm" svg:height="0.019cm" svg:x="20.002cm" svg:y="26.813cm" svg:viewBox="0 0 18 20" draw:points="0,0 18,0 18,20 0,20">
          <text:p/>
        </draw:polygon>
        <draw:frame draw:style-name="gr5" draw:text-style-name="P6" draw:layer="layout" svg:width="2.026cm" svg:height="0.386cm" svg:x="5.411cm" svg:y="26.354cm">
          <draw:text-box>
            <text:p text:style-name="P4"><text:span text:style-name="T2"><text:s/>- Студента; </text:span></text:p>
          </draw:text-box>
        </draw:frame>
        <draw:frame draw:style-name="gr8" draw:text-style-name="P9" draw:layer="layout" svg:width="0.496cm" svg:height="0.497cm" svg:x="7.457cm" svg:y="26.292cm">
          <draw:text-box>
            <text:p text:style-name="P4"><text:span text:style-name="T13"></text:span></text:p>
          </draw:text-box>
        </draw:frame>
        <draw:frame draw:style-name="gr5" draw:text-style-name="P6" draw:layer="layout" svg:width="1.819cm" svg:height="0.386cm" svg:x="7.897cm" svg:y="26.354cm">
          <draw:text-box>
            <text:p text:style-name="P4"><text:span text:style-name="T2"><text:s/>- Ментора </text:span></text:p>
          </draw:text-box>
        </draw:frame>
        <draw:frame draw:style-name="gr15" draw:text-style-name="P16" draw:layer="layout" svg:width="0.034cm" svg:height="0.039cm" svg:x="20.007cm" svg:y="26.936cm">
          <draw:text-box>
            <text:p text:style-name="P4"><text:span text:style-name="T14"><text:s/></text:span></text:p>
          </draw:text-box>
        </draw:frame>
        <draw:frame draw:style-name="gr5" draw:text-style-name="P6" draw:layer="layout" svg:width="0.348cm" svg:height="0.386cm" svg:x="20.007cm" svg:y="27.096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48cm" svg:height="0.386cm" svg:x="20.007cm" svg:y="27.608cm">
          <draw:text-box>
            <text:p text:style-name="P4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7T04:17:36.990186507</dc:date>
    <meta:editing-duration>PT2M1S</meta:editing-duration>
    <meta:editing-cycles>1</meta:editing-cycles>
    <meta:document-statistic meta:object-count="273"/>
    <meta:generator>LibreOffice/25.2.7.2$Linux_X86_64 LibreOffice_project/520$Build-2</meta:generator>
  </office:meta>
</office:document-meta>
</file>